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554cm" svg:y="0.49cm">
            <draw:object draw:notify-on-update-of-ranges="Sheet1.A28:Sheet1.A47 Sheet1.E27:Sheet1.E27 Sheet1.E28:Sheet1.E47 Sheet1.A28:Sheet1.A47 Sheet1.F27:Sheet1.F27 Sheet1.F28:Sheet1.F47 Sheet1.A28:Sheet1.A47 Sheet1.G27:Sheet1.G27 Sheet1.G28:Sheet1.G47 Sheet1.A28:Sheet1.A47 Sheet1.C27:Sheet1.C27 Sheet1.C28:Sheet1.C47 Sheet1.A28:Sheet1.A47 Sheet1.I6:Sheet1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586cm" svg:y="10.12cm">
            <draw:object draw:notify-on-update-of-ranges="Sheet1.A28:Sheet1.A47 Sheet1.M27:Sheet1.M27 Sheet1.M28:Sheet1.M47 Sheet1.A28:Sheet1.A47 Sheet1.N27:Sheet1.N27 Sheet1.N28:Sheet1.N47 Sheet1.A28:Sheet1.A47 Sheet1.O27:Sheet1.O27 Sheet1.O28:Sheet1.O47 Sheet1.A28:Sheet1.A47 Sheet1.P27:Sheet1.P27 Sheet1.P28:Sheet1.P47 Sheet1.A28:Sheet1.A47 Sheet1.Q27:Sheet1.Q27 Sheet1.Q28:Sheet1.Q47 Sheet1.A28:Sheet1.A47 Sheet1.R27:Sheet1.R27 Sheet1.R28:Sheet1.R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ep_erase_create_step_split_merg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robabilistic ranking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130026109" calcext:value-type="float">
            <text:p>26130026109</text:p>
          </table:table-cell>
          <table:table-cell office:value-type="float" office:value="146206338372" calcext:value-type="float">
            <text:p>146206338372</text:p>
          </table:table-cell>
          <table:table-cell table:style-name="ce1" office:value-type="float" office:value="0.16697" calcext:value-type="float">
            <text:p>1.67E-01</text:p>
          </table:table-cell>
          <table:table-cell/>
          <table:table-cell office:value-type="float" office:value="198.482353" calcext:value-type="float">
            <text:p>198.482353</text:p>
          </table:table-cell>
          <table:table-cell office:value-type="float" office:value="14.771301" calcext:value-type="float">
            <text:p>14.771301</text:p>
          </table:table-cell>
          <table:table-cell office:value-type="float" office:value="77.165245" calcext:value-type="float">
            <text:p>77.165245</text:p>
          </table:table-cell>
          <table:table-cell office:value-type="float" office:value="41.135636" calcext:value-type="float">
            <text:p>41.135636</text:p>
          </table:table-cell>
          <table:table-cell office:value-type="float" office:value="23.7817" calcext:value-type="float">
            <text:p>23.7817</text:p>
          </table:table-cell>
          <table:table-cell office:value-type="float" office:value="10.708911" calcext:value-type="float">
            <text:p>10.708911</text:p>
          </table:table-cell>
          <table:table-cell office:value-type="float" office:value="26.518535" calcext:value-type="float">
            <text:p>26.518535</text:p>
          </table:table-cell>
          <table:table-cell/>
          <table:table-cell office:value-type="float" office:value="43.701614" calcext:value-type="float">
            <text:p>43.701614</text:p>
          </table:table-cell>
          <table:table-cell office:value-type="float" office:value="0.21504561955319" calcext:value-type="float">
            <text:p>0.21504561955319</text:p>
          </table:table-cell>
          <table:table-cell office:value-type="float" office:value="0.505026648739812" calcext:value-type="float">
            <text:p>0.5050266487398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5511131838" calcext:value-type="float">
            <text:p>25511131838</text:p>
          </table:table-cell>
          <table:table-cell office:value-type="float" office:value="142753218048" calcext:value-type="float">
            <text:p>142753218048</text:p>
          </table:table-cell>
          <table:table-cell table:style-name="ce1" office:value-type="float" office:value="0.159651" calcext:value-type="float">
            <text:p>1.60E-01</text:p>
          </table:table-cell>
          <table:table-cell/>
          <table:table-cell office:value-type="float" office:value="159.75275" calcext:value-type="float">
            <text:p>159.75275</text:p>
          </table:table-cell>
          <table:table-cell office:value-type="float" office:value="12.476888" calcext:value-type="float">
            <text:p>12.476888</text:p>
          </table:table-cell>
          <table:table-cell office:value-type="float" office:value="58.255218" calcext:value-type="float">
            <text:p>58.255218</text:p>
          </table:table-cell>
          <table:table-cell office:value-type="float" office:value="34.055475" calcext:value-type="float">
            <text:p>34.055475</text:p>
          </table:table-cell>
          <table:table-cell office:value-type="float" office:value="19.516596" calcext:value-type="float">
            <text:p>19.516596</text:p>
          </table:table-cell>
          <table:table-cell office:value-type="float" office:value="10.516764" calcext:value-type="float">
            <text:p>10.516764</text:p>
          </table:table-cell>
          <table:table-cell office:value-type="float" office:value="21.507666" calcext:value-type="float">
            <text:p>21.507666</text:p>
          </table:table-cell>
          <table:table-cell/>
          <table:table-cell office:value-type="float" office:value="33.362336" calcext:value-type="float">
            <text:p>33.362336</text:p>
          </table:table-cell>
          <table:table-cell office:value-type="float" office:value="0.212024995790797" calcext:value-type="float">
            <text:p>0.212024995790797</text:p>
          </table:table-cell>
          <table:table-cell office:value-type="float" office:value="0.331188289648548" calcext:value-type="float">
            <text:p>0.3311882896485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041766823" calcext:value-type="float">
            <text:p>25041766823</text:p>
          </table:table-cell>
          <table:table-cell office:value-type="float" office:value="139302453456" calcext:value-type="float">
            <text:p>139302453456</text:p>
          </table:table-cell>
          <table:table-cell table:style-name="ce1" office:value-type="float" office:value="0.165021" calcext:value-type="float">
            <text:p>1.65E-01</text:p>
          </table:table-cell>
          <table:table-cell/>
          <table:table-cell office:value-type="float" office:value="155.903016" calcext:value-type="float">
            <text:p>155.903016</text:p>
          </table:table-cell>
          <table:table-cell office:value-type="float" office:value="12.05697" calcext:value-type="float">
            <text:p>12.05697</text:p>
          </table:table-cell>
          <table:table-cell office:value-type="float" office:value="55.71119" calcext:value-type="float">
            <text:p>55.71119</text:p>
          </table:table-cell>
          <table:table-cell office:value-type="float" office:value="34.303909" calcext:value-type="float">
            <text:p>34.303909</text:p>
          </table:table-cell>
          <table:table-cell office:value-type="float" office:value="18.838525" calcext:value-type="float">
            <text:p>18.838525</text:p>
          </table:table-cell>
          <table:table-cell office:value-type="float" office:value="10.496337" calcext:value-type="float">
            <text:p>10.496337</text:p>
          </table:table-cell>
          <table:table-cell office:value-type="float" office:value="21.485216" calcext:value-type="float">
            <text:p>21.485216</text:p>
          </table:table-cell>
          <table:table-cell/>
          <table:table-cell office:value-type="float" office:value="31.847688" calcext:value-type="float">
            <text:p>31.847688</text:p>
          </table:table-cell>
          <table:table-cell office:value-type="float" office:value="0.217867286549773" calcext:value-type="float">
            <text:p>0.217867286549773</text:p>
          </table:table-cell>
          <table:table-cell office:value-type="float" office:value="0.314244651703565" calcext:value-type="float">
            <text:p>0.3142446517035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201358474" calcext:value-type="float">
            <text:p>23201358474</text:p>
          </table:table-cell>
          <table:table-cell office:value-type="float" office:value="128918638728" calcext:value-type="float">
            <text:p>128918638728</text:p>
          </table:table-cell>
          <table:table-cell table:style-name="ce1" office:value-type="float" office:value="0.156046" calcext:value-type="float">
            <text:p>1.56E-01</text:p>
          </table:table-cell>
          <table:table-cell/>
          <table:table-cell office:value-type="float" office:value="147.420216" calcext:value-type="float">
            <text:p>147.420216</text:p>
          </table:table-cell>
          <table:table-cell office:value-type="float" office:value="11.93362" calcext:value-type="float">
            <text:p>11.93362</text:p>
          </table:table-cell>
          <table:table-cell office:value-type="float" office:value="49.807618" calcext:value-type="float">
            <text:p>49.807618</text:p>
          </table:table-cell>
          <table:table-cell office:value-type="float" office:value="33.316025" calcext:value-type="float">
            <text:p>33.316025</text:p>
          </table:table-cell>
          <table:table-cell office:value-type="float" office:value="17.730221" calcext:value-type="float">
            <text:p>17.730221</text:p>
          </table:table-cell>
          <table:table-cell office:value-type="float" office:value="10.567377" calcext:value-type="float">
            <text:p>10.567377</text:p>
          </table:table-cell>
          <table:table-cell office:value-type="float" office:value="20.70764" calcext:value-type="float">
            <text:p>20.70764</text:p>
          </table:table-cell>
          <table:table-cell/>
          <table:table-cell office:value-type="float" office:value="28.163836" calcext:value-type="float">
            <text:p>28.163836</text:p>
          </table:table-cell>
          <table:table-cell office:value-type="float" office:value="0.214460078084124" calcext:value-type="float">
            <text:p>0.214460078084124</text:p>
          </table:table-cell>
          <table:table-cell office:value-type="float" office:value="0.245015797513416" calcext:value-type="float">
            <text:p>0.2450157975134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1582417038" calcext:value-type="float">
            <text:p>21582417038</text:p>
          </table:table-cell>
          <table:table-cell office:value-type="float" office:value="118563823980" calcext:value-type="float">
            <text:p>118563823980</text:p>
          </table:table-cell>
          <table:table-cell table:style-name="ce1" office:value-type="float" office:value="0.144008" calcext:value-type="float">
            <text:p>1.44E-01</text:p>
          </table:table-cell>
          <table:table-cell/>
          <table:table-cell office:value-type="float" office:value="150.965557" calcext:value-type="float">
            <text:p>150.965557</text:p>
          </table:table-cell>
          <table:table-cell office:value-type="float" office:value="12.057068" calcext:value-type="float">
            <text:p>12.057068</text:p>
          </table:table-cell>
          <table:table-cell office:value-type="float" office:value="52.592677" calcext:value-type="float">
            <text:p>52.592677</text:p>
          </table:table-cell>
          <table:table-cell office:value-type="float" office:value="32.854472" calcext:value-type="float">
            <text:p>32.854472</text:p>
          </table:table-cell>
          <table:table-cell office:value-type="float" office:value="18.994045" calcext:value-type="float">
            <text:p>18.994045</text:p>
          </table:table-cell>
          <table:table-cell office:value-type="float" office:value="10.654068" calcext:value-type="float">
            <text:p>10.654068</text:p>
          </table:table-cell>
          <table:table-cell office:value-type="float" office:value="20.412491" calcext:value-type="float">
            <text:p>20.412491</text:p>
          </table:table-cell>
          <table:table-cell/>
          <table:table-cell office:value-type="float" office:value="30.08756" calcext:value-type="float">
            <text:p>30.08756</text:p>
          </table:table-cell>
          <table:table-cell office:value-type="float" office:value="0.210831200206111" calcext:value-type="float">
            <text:p>0.210831200206111</text:p>
          </table:table-cell>
          <table:table-cell office:value-type="float" office:value="0.286455682374651" calcext:value-type="float">
            <text:p>0.2864556823746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914092163" calcext:value-type="float">
            <text:p>19914092163</text:p>
          </table:table-cell>
          <table:table-cell office:value-type="float" office:value="108143372160" calcext:value-type="float">
            <text:p>108143372160</text:p>
          </table:table-cell>
          <table:table-cell table:style-name="ce1" office:value-type="float" office:value="0.147691" calcext:value-type="float">
            <text:p>1.48E-01</text:p>
          </table:table-cell>
          <table:table-cell/>
          <table:table-cell office:value-type="float" office:value="147.61605" calcext:value-type="float">
            <text:p>147.61605</text:p>
          </table:table-cell>
          <table:table-cell office:value-type="float" office:value="12.237704" calcext:value-type="float">
            <text:p>12.237704</text:p>
          </table:table-cell>
          <table:table-cell office:value-type="float" office:value="49.892776" calcext:value-type="float">
            <text:p>49.892776</text:p>
          </table:table-cell>
          <table:table-cell office:value-type="float" office:value="33.295342" calcext:value-type="float">
            <text:p>33.295342</text:p>
          </table:table-cell>
          <table:table-cell office:value-type="float" office:value="18.397065" calcext:value-type="float">
            <text:p>18.397065</text:p>
          </table:table-cell>
          <table:table-cell office:value-type="float" office:value="10.629882" calcext:value-type="float">
            <text:p>10.629882</text:p>
          </table:table-cell>
          <table:table-cell office:value-type="float" office:value="19.988185" calcext:value-type="float">
            <text:p>19.988185</text:p>
          </table:table-cell>
          <table:table-cell/>
          <table:table-cell office:value-type="float" office:value="28.822528" calcext:value-type="float">
            <text:p>28.822528</text:p>
          </table:table-cell>
          <table:table-cell office:value-type="float" office:value="0.203927421063209" calcext:value-type="float">
            <text:p>0.203927421063209</text:p>
          </table:table-cell>
          <table:table-cell office:value-type="float" office:value="0.250994073272186" calcext:value-type="float">
            <text:p>0.2509940732721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177713210" calcext:value-type="float">
            <text:p>18177713210</text:p>
          </table:table-cell>
          <table:table-cell office:value-type="float" office:value="97644243636" calcext:value-type="float">
            <text:p>97644243636</text:p>
          </table:table-cell>
          <table:table-cell table:style-name="ce1" office:value-type="float" office:value="0.154508" calcext:value-type="float">
            <text:p>1.55E-01</text:p>
          </table:table-cell>
          <table:table-cell/>
          <table:table-cell office:value-type="float" office:value="155.816677" calcext:value-type="float">
            <text:p>155.816677</text:p>
          </table:table-cell>
          <table:table-cell office:value-type="float" office:value="12.738989" calcext:value-type="float">
            <text:p>12.738989</text:p>
          </table:table-cell>
          <table:table-cell office:value-type="float" office:value="54.403564" calcext:value-type="float">
            <text:p>54.403564</text:p>
          </table:table-cell>
          <table:table-cell office:value-type="float" office:value="33.675624" calcext:value-type="float">
            <text:p>33.675624</text:p>
          </table:table-cell>
          <table:table-cell office:value-type="float" office:value="20.86235" calcext:value-type="float">
            <text:p>20.86235</text:p>
          </table:table-cell>
          <table:table-cell office:value-type="float" office:value="10.741503" calcext:value-type="float">
            <text:p>10.741503</text:p>
          </table:table-cell>
          <table:table-cell office:value-type="float" office:value="20.238145" calcext:value-type="float">
            <text:p>20.238145</text:p>
          </table:table-cell>
          <table:table-cell/>
          <table:table-cell office:value-type="float" office:value="32.270515" calcext:value-type="float">
            <text:p>32.270515</text:p>
          </table:table-cell>
          <table:table-cell office:value-type="float" office:value="0.211664837190897" calcext:value-type="float">
            <text:p>0.211664837190897</text:p>
          </table:table-cell>
          <table:table-cell office:value-type="float" office:value="0.328921214934195" calcext:value-type="float">
            <text:p>0.3289212149341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444056649" calcext:value-type="float">
            <text:p>16444056649</text:p>
          </table:table-cell>
          <table:table-cell office:value-type="float" office:value="87259355352" calcext:value-type="float">
            <text:p>87259355352</text:p>
          </table:table-cell>
          <table:table-cell table:style-name="ce1" office:value-type="float" office:value="0.148202" calcext:value-type="float">
            <text:p>1.48E-01</text:p>
          </table:table-cell>
          <table:table-cell/>
          <table:table-cell office:value-type="float" office:value="139.365001" calcext:value-type="float">
            <text:p>139.365001</text:p>
          </table:table-cell>
          <table:table-cell office:value-type="float" office:value="12.106841" calcext:value-type="float">
            <text:p>12.106841</text:p>
          </table:table-cell>
          <table:table-cell office:value-type="float" office:value="45.960799" calcext:value-type="float">
            <text:p>45.960799</text:p>
          </table:table-cell>
          <table:table-cell office:value-type="float" office:value="30.933176" calcext:value-type="float">
            <text:p>30.933176</text:p>
          </table:table-cell>
          <table:table-cell office:value-type="float" office:value="17.834343" calcext:value-type="float">
            <text:p>17.834343</text:p>
          </table:table-cell>
          <table:table-cell office:value-type="float" office:value="10.865169" calcext:value-type="float">
            <text:p>10.865169</text:p>
          </table:table-cell>
          <table:table-cell office:value-type="float" office:value="18.975895" calcext:value-type="float">
            <text:p>18.975895</text:p>
          </table:table-cell>
          <table:table-cell/>
          <table:table-cell office:value-type="float" office:value="25.857708" calcext:value-type="float">
            <text:p>25.857708</text:p>
          </table:table-cell>
          <table:table-cell office:value-type="float" office:value="0.21081505480228" calcext:value-type="float">
            <text:p>0.21081505480228</text:p>
          </table:table-cell>
          <table:table-cell office:value-type="float" office:value="0.221822642123192" calcext:value-type="float">
            <text:p>0.221822642123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4689158362" calcext:value-type="float">
            <text:p>14689158362</text:p>
          </table:table-cell>
          <table:table-cell office:value-type="float" office:value="76543246980" calcext:value-type="float">
            <text:p>76543246980</text:p>
          </table:table-cell>
          <table:table-cell table:style-name="ce1" office:value-type="float" office:value="0.139572" calcext:value-type="float">
            <text:p>1.40E-01</text:p>
          </table:table-cell>
          <table:table-cell/>
          <table:table-cell office:value-type="float" office:value="139.119349" calcext:value-type="float">
            <text:p>139.119349</text:p>
          </table:table-cell>
          <table:table-cell office:value-type="float" office:value="12.533015" calcext:value-type="float">
            <text:p>12.533015</text:p>
          </table:table-cell>
          <table:table-cell office:value-type="float" office:value="44.093728" calcext:value-type="float">
            <text:p>44.093728</text:p>
          </table:table-cell>
          <table:table-cell office:value-type="float" office:value="30.98461" calcext:value-type="float">
            <text:p>30.98461</text:p>
          </table:table-cell>
          <table:table-cell office:value-type="float" office:value="18.713433" calcext:value-type="float">
            <text:p>18.713433</text:p>
          </table:table-cell>
          <table:table-cell office:value-type="float" office:value="11.074484" calcext:value-type="float">
            <text:p>11.074484</text:p>
          </table:table-cell>
          <table:table-cell office:value-type="float" office:value="18.641752" calcext:value-type="float">
            <text:p>18.641752</text:p>
          </table:table-cell>
          <table:table-cell/>
          <table:table-cell office:value-type="float" office:value="26.410482" calcext:value-type="float">
            <text:p>26.410482</text:p>
          </table:table-cell>
          <table:table-cell office:value-type="float" office:value="0.194309129288966" calcext:value-type="float">
            <text:p>0.194309129288966</text:p>
          </table:table-cell>
          <table:table-cell office:value-type="float" office:value="0.163332622470808" calcext:value-type="float">
            <text:p>0.1633326224708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913015431" calcext:value-type="float">
            <text:p>12913015431</text:p>
          </table:table-cell>
          <table:table-cell office:value-type="float" office:value="66178310400" calcext:value-type="float">
            <text:p>66178310400</text:p>
          </table:table-cell>
          <table:table-cell table:style-name="ce1" office:value-type="float" office:value="0.134137" calcext:value-type="float">
            <text:p>1.34E-01</text:p>
          </table:table-cell>
          <table:table-cell/>
          <table:table-cell office:value-type="float" office:value="141.35851" calcext:value-type="float">
            <text:p>141.35851</text:p>
          </table:table-cell>
          <table:table-cell office:value-type="float" office:value="12.510633" calcext:value-type="float">
            <text:p>12.510633</text:p>
          </table:table-cell>
          <table:table-cell office:value-type="float" office:value="46.252026" calcext:value-type="float">
            <text:p>46.252026</text:p>
          </table:table-cell>
          <table:table-cell office:value-type="float" office:value="30.218844" calcext:value-type="float">
            <text:p>30.218844</text:p>
          </table:table-cell>
          <table:table-cell office:value-type="float" office:value="18.133337" calcext:value-type="float">
            <text:p>18.133337</text:p>
          </table:table-cell>
          <table:table-cell office:value-type="float" office:value="11.174536" calcext:value-type="float">
            <text:p>11.174536</text:p>
          </table:table-cell>
          <table:table-cell office:value-type="float" office:value="19.463696" calcext:value-type="float">
            <text:p>19.463696</text:p>
          </table:table-cell>
          <table:table-cell/>
          <table:table-cell office:value-type="float" office:value="26.749745" calcext:value-type="float">
            <text:p>26.749745</text:p>
          </table:table-cell>
          <table:table-cell office:value-type="float" office:value="0.203462390230699" calcext:value-type="float">
            <text:p>0.203462390230699</text:p>
          </table:table-cell>
          <table:table-cell office:value-type="float" office:value="0.227832595455685" calcext:value-type="float">
            <text:p>0.2278325954556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902497402" calcext:value-type="float">
            <text:p>11902497402</text:p>
          </table:table-cell>
          <table:table-cell office:value-type="float" office:value="59740832664" calcext:value-type="float">
            <text:p>59740832664</text:p>
          </table:table-cell>
          <table:table-cell table:style-name="ce1" office:value-type="float" office:value="0.140425" calcext:value-type="float">
            <text:p>1.40E-01</text:p>
          </table:table-cell>
          <table:table-cell/>
          <table:table-cell office:value-type="float" office:value="131.461165" calcext:value-type="float">
            <text:p>131.461165</text:p>
          </table:table-cell>
          <table:table-cell office:value-type="float" office:value="11.091779" calcext:value-type="float">
            <text:p>11.091779</text:p>
          </table:table-cell>
          <table:table-cell office:value-type="float" office:value="47.983494" calcext:value-type="float">
            <text:p>47.983494</text:p>
          </table:table-cell>
          <table:table-cell office:value-type="float" office:value="26.494969" calcext:value-type="float">
            <text:p>26.494969</text:p>
          </table:table-cell>
          <table:table-cell office:value-type="float" office:value="15.566423" calcext:value-type="float">
            <text:p>15.566423</text:p>
          </table:table-cell>
          <table:table-cell office:value-type="float" office:value="8.588055" calcext:value-type="float">
            <text:p>8.588055</text:p>
          </table:table-cell>
          <table:table-cell office:value-type="float" office:value="18.744572" calcext:value-type="float">
            <text:p>18.744572</text:p>
          </table:table-cell>
          <table:table-cell/>
          <table:table-cell office:value-type="float" office:value="21.851333" calcext:value-type="float">
            <text:p>21.851333</text:p>
          </table:table-cell>
          <table:table-cell office:value-type="float" office:value="0.188225776437545" calcext:value-type="float">
            <text:p>0.188225776437545</text:p>
          </table:table-cell>
          <table:table-cell office:value-type="float" office:value="0.236722475123384" calcext:value-type="float">
            <text:p>0.2367224751233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740935620" calcext:value-type="float">
            <text:p>10740935620</text:p>
          </table:table-cell>
          <table:table-cell office:value-type="float" office:value="52931986560" calcext:value-type="float">
            <text:p>52931986560</text:p>
          </table:table-cell>
          <table:table-cell table:style-name="ce1" office:value-type="float" office:value="0.133818" calcext:value-type="float">
            <text:p>1.34E-01</text:p>
          </table:table-cell>
          <table:table-cell/>
          <table:table-cell office:value-type="float" office:value="126.081526" calcext:value-type="float">
            <text:p>126.081526</text:p>
          </table:table-cell>
          <table:table-cell office:value-type="float" office:value="11.087671" calcext:value-type="float">
            <text:p>11.087671</text:p>
          </table:table-cell>
          <table:table-cell office:value-type="float" office:value="43.083993" calcext:value-type="float">
            <text:p>43.083993</text:p>
          </table:table-cell>
          <table:table-cell office:value-type="float" office:value="25.340267" calcext:value-type="float">
            <text:p>25.340267</text:p>
          </table:table-cell>
          <table:table-cell office:value-type="float" office:value="15.382417" calcext:value-type="float">
            <text:p>15.382417</text:p>
          </table:table-cell>
          <table:table-cell office:value-type="float" office:value="8.673366" calcext:value-type="float">
            <text:p>8.673366</text:p>
          </table:table-cell>
          <table:table-cell office:value-type="float" office:value="19.141448" calcext:value-type="float">
            <text:p>19.141448</text:p>
          </table:table-cell>
          <table:table-cell/>
          <table:table-cell office:value-type="float" office:value="16.701768" calcext:value-type="float">
            <text:p>16.701768</text:p>
          </table:table-cell>
          <table:table-cell office:value-type="float" office:value="0.18993993098406" calcext:value-type="float">
            <text:p>0.18993993098406</text:p>
          </table:table-cell>
          <table:table-cell office:value-type="float" office:value="0.146596047783179" calcext:value-type="float">
            <text:p>0.1465960477831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537591877" calcext:value-type="float">
            <text:p>9537591877</text:p>
          </table:table-cell>
          <table:table-cell office:value-type="float" office:value="46162253592" calcext:value-type="float">
            <text:p>46162253592</text:p>
          </table:table-cell>
          <table:table-cell table:style-name="ce1" office:value-type="float" office:value="0.139408" calcext:value-type="float">
            <text:p>1.39E-01</text:p>
          </table:table-cell>
          <table:table-cell/>
          <table:table-cell office:value-type="float" office:value="126.949928" calcext:value-type="float">
            <text:p>126.949928</text:p>
          </table:table-cell>
          <table:table-cell office:value-type="float" office:value="11.174111" calcext:value-type="float">
            <text:p>11.174111</text:p>
          </table:table-cell>
          <table:table-cell office:value-type="float" office:value="44.842992" calcext:value-type="float">
            <text:p>44.842992</text:p>
          </table:table-cell>
          <table:table-cell office:value-type="float" office:value="24.973407" calcext:value-type="float">
            <text:p>24.973407</text:p>
          </table:table-cell>
          <table:table-cell office:value-type="float" office:value="15.271442" calcext:value-type="float">
            <text:p>15.271442</text:p>
          </table:table-cell>
          <table:table-cell office:value-type="float" office:value="8.779792" calcext:value-type="float">
            <text:p>8.779792</text:p>
          </table:table-cell>
          <table:table-cell office:value-type="float" office:value="18.52702" calcext:value-type="float">
            <text:p>18.52702</text:p>
          </table:table-cell>
          <table:table-cell/>
          <table:table-cell office:value-type="float" office:value="17.333073" calcext:value-type="float">
            <text:p>17.333073</text:p>
          </table:table-cell>
          <table:table-cell office:value-type="float" office:value="0.1837055632177" calcext:value-type="float">
            <text:p>0.1837055632177</text:p>
          </table:table-cell>
          <table:table-cell office:value-type="float" office:value="0.198693254009671" calcext:value-type="float">
            <text:p>0.1986932540096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340978131" calcext:value-type="float">
            <text:p>8340978131</text:p>
          </table:table-cell>
          <table:table-cell office:value-type="float" office:value="39216240720" calcext:value-type="float">
            <text:p>39216240720</text:p>
          </table:table-cell>
          <table:table-cell table:style-name="ce1" office:value-type="float" office:value="0.129465" calcext:value-type="float">
            <text:p>1.29E-01</text:p>
          </table:table-cell>
          <table:table-cell/>
          <table:table-cell office:value-type="float" office:value="125.7927" calcext:value-type="float">
            <text:p>125.7927</text:p>
          </table:table-cell>
          <table:table-cell office:value-type="float" office:value="11.077785" calcext:value-type="float">
            <text:p>11.077785</text:p>
          </table:table-cell>
          <table:table-cell office:value-type="float" office:value="45.124245" calcext:value-type="float">
            <text:p>45.124245</text:p>
          </table:table-cell>
          <table:table-cell office:value-type="float" office:value="24.345248" calcext:value-type="float">
            <text:p>24.345248</text:p>
          </table:table-cell>
          <table:table-cell office:value-type="float" office:value="15.23038" calcext:value-type="float">
            <text:p>15.23038</text:p>
          </table:table-cell>
          <table:table-cell office:value-type="float" office:value="8.937186" calcext:value-type="float">
            <text:p>8.937186</text:p>
          </table:table-cell>
          <table:table-cell office:value-type="float" office:value="18.182267" calcext:value-type="float">
            <text:p>18.182267</text:p>
          </table:table-cell>
          <table:table-cell/>
          <table:table-cell office:value-type="float" office:value="17.512699" calcext:value-type="float">
            <text:p>17.512699</text:p>
          </table:table-cell>
          <table:table-cell office:value-type="float" office:value="0.175008435396657" calcext:value-type="float">
            <text:p>0.175008435396657</text:p>
          </table:table-cell>
          <table:table-cell office:value-type="float" office:value="0.199588315626685" calcext:value-type="float">
            <text:p>0.1995883156266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158491638" calcext:value-type="float">
            <text:p>7158491638</text:p>
          </table:table-cell>
          <table:table-cell office:value-type="float" office:value="32427089280" calcext:value-type="float">
            <text:p>32427089280</text:p>
          </table:table-cell>
          <table:table-cell table:style-name="ce1" office:value-type="float" office:value="0.112818" calcext:value-type="float">
            <text:p>1.13E-01</text:p>
          </table:table-cell>
          <table:table-cell/>
          <table:table-cell office:value-type="float" office:value="118.497593" calcext:value-type="float">
            <text:p>118.497593</text:p>
          </table:table-cell>
          <table:table-cell office:value-type="float" office:value="10.957621" calcext:value-type="float">
            <text:p>10.957621</text:p>
          </table:table-cell>
          <table:table-cell office:value-type="float" office:value="40.283262" calcext:value-type="float">
            <text:p>40.283262</text:p>
          </table:table-cell>
          <table:table-cell office:value-type="float" office:value="23.034278" calcext:value-type="float">
            <text:p>23.034278</text:p>
          </table:table-cell>
          <table:table-cell office:value-type="float" office:value="14.667753" calcext:value-type="float">
            <text:p>14.667753</text:p>
          </table:table-cell>
          <table:table-cell office:value-type="float" office:value="9.110905" calcext:value-type="float">
            <text:p>9.110905</text:p>
          </table:table-cell>
          <table:table-cell office:value-type="float" office:value="17.097424" calcext:value-type="float">
            <text:p>17.097424</text:p>
          </table:table-cell>
          <table:table-cell/>
          <table:table-cell office:value-type="float" office:value="13.004415" calcext:value-type="float">
            <text:p>13.004415</text:p>
          </table:table-cell>
          <table:table-cell office:value-type="float" office:value="0.16398445981138" calcext:value-type="float">
            <text:p>0.16398445981138</text:p>
          </table:table-cell>
          <table:table-cell office:value-type="float" office:value="0.109358183867338" calcext:value-type="float">
            <text:p>0.1093581838673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945659" calcext:value-type="float">
            <text:p>5829945659</text:p>
          </table:table-cell>
          <table:table-cell office:value-type="float" office:value="26133876000" calcext:value-type="float">
            <text:p>26133876000</text:p>
          </table:table-cell>
          <table:table-cell table:style-name="ce1" office:value-type="float" office:value="0.0949869" calcext:value-type="float">
            <text:p>9.50E-02</text:p>
          </table:table-cell>
          <table:table-cell/>
          <table:table-cell office:value-type="float" office:value="121.16408" calcext:value-type="float">
            <text:p>121.16408</text:p>
          </table:table-cell>
          <table:table-cell office:value-type="float" office:value="10.789337" calcext:value-type="float">
            <text:p>10.789337</text:p>
          </table:table-cell>
          <table:table-cell office:value-type="float" office:value="43.40635" calcext:value-type="float">
            <text:p>43.40635</text:p>
          </table:table-cell>
          <table:table-cell office:value-type="float" office:value="24.123152" calcext:value-type="float">
            <text:p>24.123152</text:p>
          </table:table-cell>
          <table:table-cell office:value-type="float" office:value="15.24239" calcext:value-type="float">
            <text:p>15.24239</text:p>
          </table:table-cell>
          <table:table-cell office:value-type="float" office:value="9.0342" calcext:value-type="float">
            <text:p>9.0342</text:p>
          </table:table-cell>
          <table:table-cell office:value-type="float" office:value="15.403721" calcext:value-type="float">
            <text:p>15.403721</text:p>
          </table:table-cell>
          <table:table-cell/>
          <table:table-cell office:value-type="float" office:value="15.699138" calcext:value-type="float">
            <text:p>15.699138</text:p>
          </table:table-cell>
          <table:table-cell office:value-type="float" office:value="0.164726733251687" calcext:value-type="float">
            <text:p>0.164726733251687</text:p>
          </table:table-cell>
          <table:table-cell office:value-type="float" office:value="0.143933881909237" calcext:value-type="float">
            <text:p>0.1439338819092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22618479" calcext:value-type="float">
            <text:p>4422618479</text:p>
          </table:table-cell>
          <table:table-cell office:value-type="float" office:value="19963312488" calcext:value-type="float">
            <text:p>19963312488</text:p>
          </table:table-cell>
          <table:table-cell table:style-name="ce1" office:value-type="float" office:value="0.0920538" calcext:value-type="float">
            <text:p>9.21E-02</text:p>
          </table:table-cell>
          <table:table-cell/>
          <table:table-cell office:value-type="float" office:value="115.106236" calcext:value-type="float">
            <text:p>115.106236</text:p>
          </table:table-cell>
          <table:table-cell office:value-type="float" office:value="10.282561" calcext:value-type="float">
            <text:p>10.282561</text:p>
          </table:table-cell>
          <table:table-cell office:value-type="float" office:value="40.346819" calcext:value-type="float">
            <text:p>40.346819</text:p>
          </table:table-cell>
          <table:table-cell office:value-type="float" office:value="22.762449" calcext:value-type="float">
            <text:p>22.762449</text:p>
          </table:table-cell>
          <table:table-cell office:value-type="float" office:value="15.201855" calcext:value-type="float">
            <text:p>15.201855</text:p>
          </table:table-cell>
          <table:table-cell office:value-type="float" office:value="8.935038" calcext:value-type="float">
            <text:p>8.935038</text:p>
          </table:table-cell>
          <table:table-cell office:value-type="float" office:value="14.090857" calcext:value-type="float">
            <text:p>14.090857</text:p>
          </table:table-cell>
          <table:table-cell/>
          <table:table-cell office:value-type="float" office:value="11.506178" calcext:value-type="float">
            <text:p>11.506178</text:p>
          </table:table-cell>
          <table:table-cell office:value-type="float" office:value="0.151770221740158" calcext:value-type="float">
            <text:p>0.151770221740158</text:p>
          </table:table-cell>
          <table:table-cell office:value-type="float" office:value="0.101459681217234" calcext:value-type="float">
            <text:p>0.1014596812172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53559159" calcext:value-type="float">
            <text:p>2953559159</text:p>
          </table:table-cell>
          <table:table-cell office:value-type="float" office:value="13798434528" calcext:value-type="float">
            <text:p>13798434528</text:p>
          </table:table-cell>
          <table:table-cell table:style-name="ce1" office:value-type="float" office:value="0.0924416" calcext:value-type="float">
            <text:p>9.24E-02</text:p>
          </table:table-cell>
          <table:table-cell/>
          <table:table-cell office:value-type="float" office:value="114.432439" calcext:value-type="float">
            <text:p>114.432439</text:p>
          </table:table-cell>
          <table:table-cell office:value-type="float" office:value="10.273514" calcext:value-type="float">
            <text:p>10.273514</text:p>
          </table:table-cell>
          <table:table-cell office:value-type="float" office:value="40.982185" calcext:value-type="float">
            <text:p>40.982185</text:p>
          </table:table-cell>
          <table:table-cell office:value-type="float" office:value="23.112227" calcext:value-type="float">
            <text:p>23.112227</text:p>
          </table:table-cell>
          <table:table-cell office:value-type="float" office:value="15.175461" calcext:value-type="float">
            <text:p>15.175461</text:p>
          </table:table-cell>
          <table:table-cell office:value-type="float" office:value="8.787827" calcext:value-type="float">
            <text:p>8.787827</text:p>
          </table:table-cell>
          <table:table-cell office:value-type="float" office:value="13.034923" calcext:value-type="float">
            <text:p>13.034923</text:p>
          </table:table-cell>
          <table:table-cell/>
          <table:table-cell office:value-type="float" office:value="10.085324" calcext:value-type="float">
            <text:p>10.085324</text:p>
          </table:table-cell>
          <table:table-cell office:value-type="float" office:value="0.153047754433735" calcext:value-type="float">
            <text:p>0.153047754433735</text:p>
          </table:table-cell>
          <table:table-cell office:value-type="float" office:value="0.0541473221962091" calcext:value-type="float">
            <text:p>0.05414732219620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6217247" calcext:value-type="float">
            <text:p>1466217247</text:p>
          </table:table-cell>
          <table:table-cell office:value-type="float" office:value="7690090536" calcext:value-type="float">
            <text:p>7690090536</text:p>
          </table:table-cell>
          <table:table-cell table:style-name="ce1" office:value-type="float" office:value="0.0827269" calcext:value-type="float">
            <text:p>8.27E-02</text:p>
          </table:table-cell>
          <table:table-cell/>
          <table:table-cell office:value-type="float" office:value="115.944744" calcext:value-type="float">
            <text:p>115.944744</text:p>
          </table:table-cell>
          <table:table-cell office:value-type="float" office:value="10.379926" calcext:value-type="float">
            <text:p>10.379926</text:p>
          </table:table-cell>
          <table:table-cell office:value-type="float" office:value="44.143753" calcext:value-type="float">
            <text:p>44.143753</text:p>
          </table:table-cell>
          <table:table-cell office:value-type="float" office:value="24.951973" calcext:value-type="float">
            <text:p>24.951973</text:p>
          </table:table-cell>
          <table:table-cell office:value-type="float" office:value="16.051071" calcext:value-type="float">
            <text:p>16.051071</text:p>
          </table:table-cell>
          <table:table-cell office:value-type="float" office:value="8.319769" calcext:value-type="float">
            <text:p>8.319769</text:p>
          </table:table-cell>
          <table:table-cell office:value-type="float" office:value="9.554763" calcext:value-type="float">
            <text:p>9.554763</text:p>
          </table:table-cell>
          <table:table-cell/>
          <table:table-cell office:value-type="float" office:value="8.652897" calcext:value-type="float">
            <text:p>8.652897</text:p>
          </table:table-cell>
          <table:table-cell office:value-type="float" office:value="0.129300023597562" calcext:value-type="float">
            <text:p>0.129300023597562</text:p>
          </table:table-cell>
          <table:table-cell table:style-name="ce1" office:value-type="float" office:value="0.0586084121352549" calcext:value-type="float">
            <text:p>5.86E-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6644599" calcext:value-type="float">
            <text:p>756644599</text:p>
          </table:table-cell>
          <table:table-cell office:value-type="float" office:value="3954058164" calcext:value-type="float">
            <text:p>3954058164</text:p>
          </table:table-cell>
          <table:table-cell table:style-name="ce1" office:value-type="float" office:value="0.0888102" calcext:value-type="float">
            <text:p>8.88E-02</text:p>
          </table:table-cell>
          <table:table-cell/>
          <table:table-cell office:value-type="float" office:value="111.361617" calcext:value-type="float">
            <text:p>111.361617</text:p>
          </table:table-cell>
          <table:table-cell office:value-type="float" office:value="10.12919" calcext:value-type="float">
            <text:p>10.12919</text:p>
          </table:table-cell>
          <table:table-cell office:value-type="float" office:value="43.598496" calcext:value-type="float">
            <text:p>43.598496</text:p>
          </table:table-cell>
          <table:table-cell office:value-type="float" office:value="24.991326" calcext:value-type="float">
            <text:p>24.991326</text:p>
          </table:table-cell>
          <table:table-cell office:value-type="float" office:value="16.140653" calcext:value-type="float">
            <text:p>16.140653</text:p>
          </table:table-cell>
          <table:table-cell office:value-type="float" office:value="8.383438" calcext:value-type="float">
            <text:p>8.383438</text:p>
          </table:table-cell>
          <table:table-cell office:value-type="float" office:value="5.5646" calcext:value-type="float">
            <text:p>5.5646</text:p>
          </table:table-cell>
          <table:table-cell/>
          <table:table-cell office:value-type="float" office:value="6.869518" calcext:value-type="float">
            <text:p>6.869518</text:p>
          </table:table-cell>
          <table:table-cell office:value-type="float" office:value="0.0962906800361838" calcext:value-type="float">
            <text:p>0.0962906800361838</text:p>
          </table:table-cell>
          <table:table-cell table:style-name="ce1" office:value-type="float" office:value="0.0220234265009862" calcext:value-type="float">
            <text:p>2.20E-0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548" calcext:value-type="float">
            <text:p>1548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28]/[.A$47]" office:value-type="float" office:value="43" calcext:value-type="float">
            <text:p>43</text:p>
          </table:table-cell>
          <table:table-cell table:formula="of:=[.E6]/[.E$25]" office:value-type="float" office:value="34.5340813157645" calcext:value-type="float">
            <text:p>34.5340813157645</text:p>
          </table:table-cell>
          <table:table-cell table:formula="of:=[.F6]/[.F$25]" office:value-type="float" office:value="36.9762740728363" calcext:value-type="float">
            <text:p>36.9762740728363</text:p>
          </table:table-cell>
          <table:table-cell/>
          <table:table-cell table:formula="of:=[.F29]/[.F$48]" office:value-type="string" office:string-value="" calcext:value-type="error">
            <text:p>#DIV/0!</text:p>
          </table:table-cell>
          <table:table-cell/>
          <table:table-cell table:formula="of:=SUM([.J6:.O6])" office:value-type="float" office:value="194.081328" calcext:value-type="float">
            <text:p>194.081328</text:p>
          </table:table-cell>
          <table:table-cell/>
          <table:table-cell table:formula="of:=[.J6] / [.$K28]" office:value-type="float" office:value="0.07610882073107" calcext:value-type="float">
            <text:p>0.07610882073107</text:p>
          </table:table-cell>
          <table:table-cell table:formula="of:=[.K6] / [.$K28]" office:value-type="float" office:value="0.397592317587604" calcext:value-type="float">
            <text:p>0.397592317587604</text:p>
          </table:table-cell>
          <table:table-cell table:formula="of:=[.L6] / [.$K28]" office:value-type="float" office:value="0.211950507675834" calcext:value-type="float">
            <text:p>0.211950507675834</text:p>
          </table:table-cell>
          <table:table-cell table:formula="of:=[.M6] / [.$K28]" office:value-type="float" office:value="0.122534713900968" calcext:value-type="float">
            <text:p>0.122534713900968</text:p>
          </table:table-cell>
          <table:table-cell table:formula="of:=[.N6] / [.$K28]" office:value-type="float" office:value="0.0551774408715917" calcext:value-type="float">
            <text:p>0.0551774408715917</text:p>
          </table:table-cell>
          <table:table-cell table:formula="of:=[.O6] / [.$K28]" office:value-type="float" office:value="0.136636199232932" calcext:value-type="float">
            <text:p>0.136636199232932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5 iterations, starting with 1 graphs having 15 nodes" calcext:value-type="string">
            <text:p>for 5 iterations, starting with 1 graphs having 15 nodes</text:p>
          </table:table-cell>
        </table:table-row>
        <table:table-row table:style-name="ro1">
          <table:table-cell table:formula="of:=[.A7]*[.B7]*[.C7]" office:value-type="float" office:value="1512" calcext:value-type="float">
            <text:p>1512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29]/[.A$47]" office:value-type="float" office:value="42" calcext:value-type="float">
            <text:p>42</text:p>
          </table:table-cell>
          <table:table-cell table:formula="of:=[.E7]/[.E$25]" office:value-type="float" office:value="33.7161355168809" calcext:value-type="float">
            <text:p>33.7161355168809</text:p>
          </table:table-cell>
          <table:table-cell table:formula="of:=[.F7]/[.F$25]" office:value-type="float" office:value="36.1029636204411" calcext:value-type="float">
            <text:p>36.1029636204411</text:p>
          </table:table-cell>
          <table:table-cell/>
          <table:table-cell table:formula="of:=[.F30]/[.F$48]" office:value-type="string" office:string-value="" calcext:value-type="error">
            <text:p>#DIV/0!</text:p>
          </table:table-cell>
          <table:table-cell/>
          <table:table-cell table:formula="of:=SUM([.J7:.O7])" office:value-type="float" office:value="156.328607" calcext:value-type="float">
            <text:p>156.328607</text:p>
          </table:table-cell>
          <table:table-cell/>
          <table:table-cell table:formula="of:=[.J7] / [.$K29]" office:value-type="float" office:value="0.0798119310306398" calcext:value-type="float">
            <text:p>0.0798119310306398</text:p>
          </table:table-cell>
          <table:table-cell table:formula="of:=[.K7] / [.$K29]" office:value-type="float" office:value="0.372645922700507" calcext:value-type="float">
            <text:p>0.372645922700507</text:p>
          </table:table-cell>
          <table:table-cell table:formula="of:=[.L7] / [.$K29]" office:value-type="float" office:value="0.217845445267737" calcext:value-type="float">
            <text:p>0.217845445267737</text:p>
          </table:table-cell>
          <table:table-cell table:formula="of:=[.M7] / [.$K29]" office:value-type="float" office:value="0.124843407579267" calcext:value-type="float">
            <text:p>0.124843407579267</text:p>
          </table:table-cell>
          <table:table-cell table:formula="of:=[.N7] / [.$K29]" office:value-type="float" office:value="0.0672734453521997" calcext:value-type="float">
            <text:p>0.0672734453521997</text:p>
          </table:table-cell>
          <table:table-cell table:formula="of:=[.O7] / [.$K29]" office:value-type="float" office:value="0.13757984806965" calcext:value-type="float">
            <text:p>0.13757984806965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476" calcext:value-type="float">
            <text:p>1476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30]/[.A$47]" office:value-type="float" office:value="41" calcext:value-type="float">
            <text:p>41</text:p>
          </table:table-cell>
          <table:table-cell table:formula="of:=[.E8]/[.E$25]" office:value-type="float" office:value="33.0958112383222" calcext:value-type="float">
            <text:p>33.0958112383222</text:p>
          </table:table-cell>
          <table:table-cell table:formula="of:=[.F8]/[.F$25]" office:value-type="float" office:value="35.2302489438039" calcext:value-type="float">
            <text:p>35.2302489438039</text:p>
          </table:table-cell>
          <table:table-cell/>
          <table:table-cell table:formula="of:=[.F31]/[.F$48]" office:value-type="string" office:string-value="" calcext:value-type="error">
            <text:p>#DIV/0!</text:p>
          </table:table-cell>
          <table:table-cell/>
          <table:table-cell table:formula="of:=SUM([.J8:.O8])" office:value-type="float" office:value="152.892147" calcext:value-type="float">
            <text:p>152.892147</text:p>
          </table:table-cell>
          <table:table-cell/>
          <table:table-cell table:formula="of:=[.J8] / [.$K30]" office:value-type="float" office:value="0.078859315122313" calcext:value-type="float">
            <text:p>0.078859315122313</text:p>
          </table:table-cell>
          <table:table-cell table:formula="of:=[.K8] / [.$K30]" office:value-type="float" office:value="0.364382285769066" calcext:value-type="float">
            <text:p>0.364382285769066</text:p>
          </table:table-cell>
          <table:table-cell table:formula="of:=[.L8] / [.$K30]" office:value-type="float" office:value="0.224366716493294" calcext:value-type="float">
            <text:p>0.224366716493294</text:p>
          </table:table-cell>
          <table:table-cell table:formula="of:=[.M8] / [.$K30]" office:value-type="float" office:value="0.123214470917202" calcext:value-type="float">
            <text:p>0.123214470917202</text:p>
          </table:table-cell>
          <table:table-cell table:formula="of:=[.N8] / [.$K30]" office:value-type="float" office:value="0.0686519040117868" calcext:value-type="float">
            <text:p>0.0686519040117868</text:p>
          </table:table-cell>
          <table:table-cell table:formula="of:=[.O8] / [.$K30]" office:value-type="float" office:value="0.140525307686339" calcext:value-type="float">
            <text:p>0.140525307686339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368" calcext:value-type="float">
            <text:p>1368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31]/[.A$47]" office:value-type="float" office:value="38" calcext:value-type="float">
            <text:p>38</text:p>
          </table:table-cell>
          <table:table-cell table:formula="of:=[.E9]/[.E$25]" office:value-type="float" office:value="30.6634825711615" calcext:value-type="float">
            <text:p>30.6634825711615</text:p>
          </table:table-cell>
          <table:table-cell table:formula="of:=[.F9]/[.F$25]" office:value-type="float" office:value="32.6041331161359" calcext:value-type="float">
            <text:p>32.6041331161359</text:p>
          </table:table-cell>
          <table:table-cell/>
          <table:table-cell table:formula="of:=[.F32]/[.F$48]" office:value-type="string" office:string-value="" calcext:value-type="error">
            <text:p>#DIV/0!</text:p>
          </table:table-cell>
          <table:table-cell/>
          <table:table-cell table:formula="of:=SUM([.J9:.O9])" office:value-type="float" office:value="144.062501" calcext:value-type="float">
            <text:p>144.062501</text:p>
          </table:table-cell>
          <table:table-cell/>
          <table:table-cell table:formula="of:=[.J9] / [.$K31]" office:value-type="float" office:value="0.0828364072341074" calcext:value-type="float">
            <text:p>0.0828364072341074</text:p>
          </table:table-cell>
          <table:table-cell table:formula="of:=[.K9] / [.$K31]" office:value-type="float" office:value="0.345736174606604" calcext:value-type="float">
            <text:p>0.345736174606604</text:p>
          </table:table-cell>
          <table:table-cell table:formula="of:=[.L9] / [.$K31]" office:value-type="float" office:value="0.231260909457625" calcext:value-type="float">
            <text:p>0.231260909457625</text:p>
          </table:table-cell>
          <table:table-cell table:formula="of:=[.M9] / [.$K31]" office:value-type="float" office:value="0.123073116716195" calcext:value-type="float">
            <text:p>0.123073116716195</text:p>
          </table:table-cell>
          <table:table-cell table:formula="of:=[.N9] / [.$K31]" office:value-type="float" office:value="0.0733527248704366" calcext:value-type="float">
            <text:p>0.0733527248704366</text:p>
          </table:table-cell>
          <table:table-cell table:formula="of:=[.O9] / [.$K31]" office:value-type="float" office:value="0.143740667115032" calcext:value-type="float">
            <text:p>0.143740667115032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1260" calcext:value-type="float">
            <text:p>1260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32]/[.A$47]" office:value-type="float" office:value="35" calcext:value-type="float">
            <text:p>35</text:p>
          </table:table-cell>
          <table:table-cell table:formula="of:=[.E10]/[.E$25]" office:value-type="float" office:value="28.5238499905026" calcext:value-type="float">
            <text:p>28.5238499905026</text:p>
          </table:table-cell>
          <table:table-cell table:formula="of:=[.F10]/[.F$25]" office:value-type="float" office:value="29.9853515204892" calcext:value-type="float">
            <text:p>29.9853515204892</text:p>
          </table:table-cell>
          <table:table-cell/>
          <table:table-cell table:formula="of:=[.F33]/[.F$48]" office:value-type="string" office:string-value="" calcext:value-type="error">
            <text:p>#DIV/0!</text:p>
          </table:table-cell>
          <table:table-cell/>
          <table:table-cell table:formula="of:=SUM([.J10:.O10])" office:value-type="float" office:value="147.564821" calcext:value-type="float">
            <text:p>147.564821</text:p>
          </table:table-cell>
          <table:table-cell/>
          <table:table-cell table:formula="of:=[.J10] / [.$K32]" office:value-type="float" office:value="0.0817069266122716" calcext:value-type="float">
            <text:p>0.0817069266122716</text:p>
          </table:table-cell>
          <table:table-cell table:formula="of:=[.K10] / [.$K32]" office:value-type="float" office:value="0.356403895207517" calcext:value-type="float">
            <text:p>0.356403895207517</text:p>
          </table:table-cell>
          <table:table-cell table:formula="of:=[.L10] / [.$K32]" office:value-type="float" office:value="0.222644338788579" calcext:value-type="float">
            <text:p>0.222644338788579</text:p>
          </table:table-cell>
          <table:table-cell table:formula="of:=[.M10] / [.$K32]" office:value-type="float" office:value="0.128716620067597" calcext:value-type="float">
            <text:p>0.128716620067597</text:p>
          </table:table-cell>
          <table:table-cell table:formula="of:=[.N10] / [.$K32]" office:value-type="float" office:value="0.0721992404951313" calcext:value-type="float">
            <text:p>0.0721992404951313</text:p>
          </table:table-cell>
          <table:table-cell table:formula="of:=[.O10] / [.$K32]" office:value-type="float" office:value="0.138328978828904" calcext:value-type="float">
            <text:p>0.138328978828904</text:p>
          </table:table-cell>
          <table:table-cell table:number-columns-repeated="2"/>
        </table:table-row>
        <table:table-row table:style-name="ro2">
          <table:table-cell table:formula="of:=[.A11]*[.B11]*[.C11]" office:value-type="float" office:value="1152" calcext:value-type="float">
            <text:p>1152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33]/[.A$47]" office:value-type="float" office:value="32" calcext:value-type="float">
            <text:p>32</text:p>
          </table:table-cell>
          <table:table-cell table:formula="of:=[.E11]/[.E$25]" office:value-type="float" office:value="26.3189510495667" calcext:value-type="float">
            <text:p>26.3189510495667</text:p>
          </table:table-cell>
          <table:table-cell table:formula="of:=[.F11]/[.F$25]" office:value-type="float" office:value="27.3499699990756" calcext:value-type="float">
            <text:p>27.3499699990756</text:p>
          </table:table-cell>
          <table:table-cell/>
          <table:table-cell table:formula="of:=[.F34]/[.F$48]" office:value-type="string" office:string-value="" calcext:value-type="error">
            <text:p>#DIV/0!</text:p>
          </table:table-cell>
          <table:table-cell/>
          <table:table-cell table:formula="of:=SUM([.J11:.O11])" office:value-type="float" office:value="144.440954" calcext:value-type="float">
            <text:p>144.440954</text:p>
          </table:table-cell>
          <table:table-cell/>
          <table:table-cell table:formula="of:=[.J11] / [.$K33]" office:value-type="float" office:value="0.0847246134915448" calcext:value-type="float">
            <text:p>0.0847246134915448</text:p>
          </table:table-cell>
          <table:table-cell table:formula="of:=[.K11] / [.$K33]" office:value-type="float" office:value="0.345419873092226" calcext:value-type="float">
            <text:p>0.345419873092226</text:p>
          </table:table-cell>
          <table:table-cell table:formula="of:=[.L11] / [.$K33]" office:value-type="float" office:value="0.230511784074758" calcext:value-type="float">
            <text:p>0.230511784074758</text:p>
          </table:table-cell>
          <table:table-cell table:formula="of:=[.M11] / [.$K33]" office:value-type="float" office:value="0.12736737393745" calcext:value-type="float">
            <text:p>0.12736737393745</text:p>
          </table:table-cell>
          <table:table-cell table:formula="of:=[.N11] / [.$K33]" office:value-type="float" office:value="0.073593269122274" calcext:value-type="float">
            <text:p>0.073593269122274</text:p>
          </table:table-cell>
          <table:table-cell table:formula="of:=[.O11] / [.$K33]" office:value-type="float" office:value="0.138383086281748" calcext:value-type="float">
            <text:p>0.138383086281748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1044" calcext:value-type="float">
            <text:p>1044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34]/[.A$47]" office:value-type="float" office:value="29" calcext:value-type="float">
            <text:p>29</text:p>
          </table:table-cell>
          <table:table-cell table:formula="of:=[.E12]/[.E$25]" office:value-type="float" office:value="24.0241101754035" calcext:value-type="float">
            <text:p>24.0241101754035</text:p>
          </table:table-cell>
          <table:table-cell table:formula="of:=[.F12]/[.F$25]" office:value-type="float" office:value="24.6946907673258" calcext:value-type="float">
            <text:p>24.6946907673258</text:p>
          </table:table-cell>
          <table:table-cell/>
          <table:table-cell table:formula="of:=[.F35]/[.F$48]" office:value-type="string" office:string-value="" calcext:value-type="error">
            <text:p>#DIV/0!</text:p>
          </table:table-cell>
          <table:table-cell/>
          <table:table-cell table:formula="of:=SUM([.J12:.O12])" office:value-type="float" office:value="152.660175" calcext:value-type="float">
            <text:p>152.660175</text:p>
          </table:table-cell>
          <table:table-cell/>
          <table:table-cell table:formula="of:=[.J12] / [.$K34]" office:value-type="float" office:value="0.0834467076957039" calcext:value-type="float">
            <text:p>0.0834467076957039</text:p>
          </table:table-cell>
          <table:table-cell table:formula="of:=[.K12] / [.$K34]" office:value-type="float" office:value="0.356370376229426" calcext:value-type="float">
            <text:p>0.356370376229426</text:p>
          </table:table-cell>
          <table:table-cell table:formula="of:=[.L12] / [.$K34]" office:value-type="float" office:value="0.220592069935725" calcext:value-type="float">
            <text:p>0.220592069935725</text:p>
          </table:table-cell>
          <table:table-cell table:formula="of:=[.M12] / [.$K34]" office:value-type="float" office:value="0.136658758579309" calcext:value-type="float">
            <text:p>0.136658758579309</text:p>
          </table:table-cell>
          <table:table-cell table:formula="of:=[.N12] / [.$K34]" office:value-type="float" office:value="0.0703621818853542" calcext:value-type="float">
            <text:p>0.0703621818853542</text:p>
          </table:table-cell>
          <table:table-cell table:formula="of:=[.O12] / [.$K34]" office:value-type="float" office:value="0.132569905674483" calcext:value-type="float">
            <text:p>0.132569905674483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936" calcext:value-type="float">
            <text:p>936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35]/[.A$47]" office:value-type="float" office:value="26" calcext:value-type="float">
            <text:p>26</text:p>
          </table:table-cell>
          <table:table-cell table:formula="of:=[.E13]/[.E$25]" office:value-type="float" office:value="21.7328672810628" calcext:value-type="float">
            <text:p>21.7328672810628</text:p>
          </table:table-cell>
          <table:table-cell table:formula="of:=[.F13]/[.F$25]" office:value-type="float" office:value="22.0683034322709" calcext:value-type="float">
            <text:p>22.0683034322709</text:p>
          </table:table-cell>
          <table:table-cell/>
          <table:table-cell table:formula="of:=[.F36]/[.F$48]" office:value-type="string" office:string-value="" calcext:value-type="error">
            <text:p>#DIV/0!</text:p>
          </table:table-cell>
          <table:table-cell/>
          <table:table-cell table:formula="of:=SUM([.J13:.O13])" office:value-type="float" office:value="136.676223" calcext:value-type="float">
            <text:p>136.676223</text:p>
          </table:table-cell>
          <table:table-cell/>
          <table:table-cell table:formula="of:=[.J13] / [.$K35]" office:value-type="float" office:value="0.0885804475296336" calcext:value-type="float">
            <text:p>0.0885804475296336</text:p>
          </table:table-cell>
          <table:table-cell table:formula="of:=[.K13] / [.$K35]" office:value-type="float" office:value="0.336275015442884" calcext:value-type="float">
            <text:p>0.336275015442884</text:p>
          </table:table-cell>
          <table:table-cell table:formula="of:=[.L13] / [.$K35]" office:value-type="float" office:value="0.2263244865934" calcext:value-type="float">
            <text:p>0.2263244865934</text:p>
          </table:table-cell>
          <table:table-cell table:formula="of:=[.M13] / [.$K35]" office:value-type="float" office:value="0.13048606852415" calcext:value-type="float">
            <text:p>0.13048606852415</text:p>
          </table:table-cell>
          <table:table-cell table:formula="of:=[.N13] / [.$K35]" office:value-type="float" office:value="0.0794956778985618" calcext:value-type="float">
            <text:p>0.0794956778985618</text:p>
          </table:table-cell>
          <table:table-cell table:formula="of:=[.O13] / [.$K35]" office:value-type="float" office:value="0.138838304011371" calcext:value-type="float">
            <text:p>0.138838304011371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828" calcext:value-type="float">
            <text:p>828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36]/[.A$47]" office:value-type="float" office:value="23" calcext:value-type="float">
            <text:p>23</text:p>
          </table:table-cell>
          <table:table-cell table:formula="of:=[.E14]/[.E$25]" office:value-type="float" office:value="19.4135508023365" calcext:value-type="float">
            <text:p>19.4135508023365</text:p>
          </table:table-cell>
          <table:table-cell table:formula="of:=[.F14]/[.F$25]" office:value-type="float" office:value="19.3581489713261" calcext:value-type="float">
            <text:p>19.3581489713261</text:p>
          </table:table-cell>
          <table:table-cell/>
          <table:table-cell table:formula="of:=[.F37]/[.F$48]" office:value-type="string" office:string-value="" calcext:value-type="error">
            <text:p>#DIV/0!</text:p>
          </table:table-cell>
          <table:table-cell/>
          <table:table-cell table:formula="of:=SUM([.J14:.O14])" office:value-type="float" office:value="136.041022" calcext:value-type="float">
            <text:p>136.041022</text:p>
          </table:table-cell>
          <table:table-cell/>
          <table:table-cell table:formula="of:=[.J14] / [.$K36]" office:value-type="float" office:value="0.0921267336553823" calcext:value-type="float">
            <text:p>0.0921267336553823</text:p>
          </table:table-cell>
          <table:table-cell table:formula="of:=[.K14] / [.$K36]" office:value-type="float" office:value="0.324120822908843" calcext:value-type="float">
            <text:p>0.324120822908843</text:p>
          </table:table-cell>
          <table:table-cell table:formula="of:=[.L14] / [.$K36]" office:value-type="float" office:value="0.227759315127756" calcext:value-type="float">
            <text:p>0.227759315127756</text:p>
          </table:table-cell>
          <table:table-cell table:formula="of:=[.M14] / [.$K36]" office:value-type="float" office:value="0.137557280332693" calcext:value-type="float">
            <text:p>0.137557280332693</text:p>
          </table:table-cell>
          <table:table-cell table:formula="of:=[.N14] / [.$K36]" office:value-type="float" office:value="0.0814054748868323" calcext:value-type="float">
            <text:p>0.0814054748868323</text:p>
          </table:table-cell>
          <table:table-cell table:formula="of:=[.O14] / [.$K36]" office:value-type="float" office:value="0.137030373088494" calcext:value-type="float">
            <text:p>0.137030373088494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720" calcext:value-type="float">
            <text:p>720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37]/[.A$47]" office:value-type="float" office:value="20" calcext:value-type="float">
            <text:p>20</text:p>
          </table:table-cell>
          <table:table-cell table:formula="of:=[.E15]/[.E$25]" office:value-type="float" office:value="17.0661568827243" calcext:value-type="float">
            <text:p>17.0661568827243</text:p>
          </table:table-cell>
          <table:table-cell table:formula="of:=[.F15]/[.F$25]" office:value-type="float" office:value="16.7368075165219" calcext:value-type="float">
            <text:p>16.7368075165219</text:p>
          </table:table-cell>
          <table:table-cell/>
          <table:table-cell table:formula="of:=[.F38]/[.F$48]" office:value-type="string" office:string-value="" calcext:value-type="error">
            <text:p>#DIV/0!</text:p>
          </table:table-cell>
          <table:table-cell/>
          <table:table-cell table:formula="of:=SUM([.J15:.O15])" office:value-type="float" office:value="137.753072" calcext:value-type="float">
            <text:p>137.753072</text:p>
          </table:table-cell>
          <table:table-cell/>
          <table:table-cell table:formula="of:=[.J15] / [.$K37]" office:value-type="float" office:value="0.090819266810979" calcext:value-type="float">
            <text:p>0.090819266810979</text:p>
          </table:table-cell>
          <table:table-cell table:formula="of:=[.K15] / [.$K37]" office:value-type="float" office:value="0.335760395964164" calcext:value-type="float">
            <text:p>0.335760395964164</text:p>
          </table:table-cell>
          <table:table-cell table:formula="of:=[.L15] / [.$K37]" office:value-type="float" office:value="0.219369655872357" calcext:value-type="float">
            <text:p>0.219369655872357</text:p>
          </table:table-cell>
          <table:table-cell table:formula="of:=[.M15] / [.$K37]" office:value-type="float" office:value="0.131636534392496" calcext:value-type="float">
            <text:p>0.131636534392496</text:p>
          </table:table-cell>
          <table:table-cell table:formula="of:=[.N15] / [.$K37]" office:value-type="float" office:value="0.0811200493590444" calcext:value-type="float">
            <text:p>0.0811200493590444</text:p>
          </table:table-cell>
          <table:table-cell table:formula="of:=[.O15] / [.$K37]" office:value-type="float" office:value="0.141294097600959" calcext:value-type="float">
            <text:p>0.141294097600959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648" calcext:value-type="float">
            <text:p>648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38]/[.A$47]" office:value-type="float" office:value="18" calcext:value-type="float">
            <text:p>18</text:p>
          </table:table-cell>
          <table:table-cell table:formula="of:=[.E16]/[.E$25]" office:value-type="float" office:value="15.7306315511016" calcext:value-type="float">
            <text:p>15.7306315511016</text:p>
          </table:table-cell>
          <table:table-cell table:formula="of:=[.F16]/[.F$25]" office:value-type="float" office:value="15.1087389679582" calcext:value-type="float">
            <text:p>15.1087389679582</text:p>
          </table:table-cell>
          <table:table-cell/>
          <table:table-cell table:formula="of:=[.F39]/[.F$48]" office:value-type="string" office:string-value="" calcext:value-type="error">
            <text:p>#DIV/0!</text:p>
          </table:table-cell>
          <table:table-cell/>
          <table:table-cell table:formula="of:=SUM([.J16:.O16])" office:value-type="float" office:value="128.469292" calcext:value-type="float">
            <text:p>128.469292</text:p>
          </table:table-cell>
          <table:table-cell/>
          <table:table-cell table:formula="of:=[.J16] / [.$K38]" office:value-type="float" office:value="0.0863379787288" calcext:value-type="float">
            <text:p>0.0863379787288</text:p>
          </table:table-cell>
          <table:table-cell table:formula="of:=[.K16] / [.$K38]" office:value-type="float" office:value="0.373501661393137" calcext:value-type="float">
            <text:p>0.373501661393137</text:p>
          </table:table-cell>
          <table:table-cell table:formula="of:=[.L16] / [.$K38]" office:value-type="float" office:value="0.20623581392509" calcext:value-type="float">
            <text:p>0.20623581392509</text:p>
          </table:table-cell>
          <table:table-cell table:formula="of:=[.M16] / [.$K38]" office:value-type="float" office:value="0.121168434554773" calcext:value-type="float">
            <text:p>0.121168434554773</text:p>
          </table:table-cell>
          <table:table-cell table:formula="of:=[.N16] / [.$K38]" office:value-type="float" office:value="0.0668490879516951" calcext:value-type="float">
            <text:p>0.0668490879516951</text:p>
          </table:table-cell>
          <table:table-cell table:formula="of:=[.O16] / [.$K38]" office:value-type="float" office:value="0.145907023446506" calcext:value-type="float">
            <text:p>0.145907023446506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576" calcext:value-type="float">
            <text:p>576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39]/[.A$47]" office:value-type="float" office:value="16" calcext:value-type="float">
            <text:p>16</text:p>
          </table:table-cell>
          <table:table-cell table:formula="of:=[.E17]/[.E$25]" office:value-type="float" office:value="14.1954831028933" calcext:value-type="float">
            <text:p>14.1954831028933</text:p>
          </table:table-cell>
          <table:table-cell table:formula="of:=[.F17]/[.F$25]" office:value-type="float" office:value="13.3867496037168" calcext:value-type="float">
            <text:p>13.3867496037168</text:p>
          </table:table-cell>
          <table:table-cell/>
          <table:table-cell table:formula="of:=[.F40]/[.F$48]" office:value-type="string" office:string-value="" calcext:value-type="error">
            <text:p>#DIV/0!</text:p>
          </table:table-cell>
          <table:table-cell/>
          <table:table-cell table:formula="of:=SUM([.J17:.O17])" office:value-type="float" office:value="122.709162" calcext:value-type="float">
            <text:p>122.709162</text:p>
          </table:table-cell>
          <table:table-cell/>
          <table:table-cell table:formula="of:=[.J17] / [.$K39]" office:value-type="float" office:value="0.09035731985522" calcext:value-type="float">
            <text:p>0.09035731985522</text:p>
          </table:table-cell>
          <table:table-cell table:formula="of:=[.K17] / [.$K39]" office:value-type="float" office:value="0.351106570184221" calcext:value-type="float">
            <text:p>0.351106570184221</text:p>
          </table:table-cell>
          <table:table-cell table:formula="of:=[.L17] / [.$K39]" office:value-type="float" office:value="0.206506723597379" calcext:value-type="float">
            <text:p>0.206506723597379</text:p>
          </table:table-cell>
          <table:table-cell table:formula="of:=[.M17] / [.$K39]" office:value-type="float" office:value="0.1253567113432" calcext:value-type="float">
            <text:p>0.1253567113432</text:p>
          </table:table-cell>
          <table:table-cell table:formula="of:=[.N17] / [.$K39]" office:value-type="float" office:value="0.0706823016198253" calcext:value-type="float">
            <text:p>0.0706823016198253</text:p>
          </table:table-cell>
          <table:table-cell table:formula="of:=[.O17] / [.$K39]" office:value-type="float" office:value="0.155990373400154" calcext:value-type="float">
            <text:p>0.155990373400154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504" calcext:value-type="float">
            <text:p>504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40]/[.A$47]" office:value-type="float" office:value="14" calcext:value-type="float">
            <text:p>14</text:p>
          </table:table-cell>
          <table:table-cell table:formula="of:=[.E18]/[.E$25]" office:value-type="float" office:value="12.6051145935689" calcext:value-type="float">
            <text:p>12.6051145935689</text:p>
          </table:table-cell>
          <table:table-cell table:formula="of:=[.F18]/[.F$25]" office:value-type="float" office:value="11.6746521364525" calcext:value-type="float">
            <text:p>11.6746521364525</text:p>
          </table:table-cell>
          <table:table-cell/>
          <table:table-cell table:formula="of:=[.F41]/[.F$48]" office:value-type="string" office:string-value="" calcext:value-type="error">
            <text:p>#DIV/0!</text:p>
          </table:table-cell>
          <table:table-cell/>
          <table:table-cell table:formula="of:=SUM([.J18:.O18])" office:value-type="float" office:value="123.568764" calcext:value-type="float">
            <text:p>123.568764</text:p>
          </table:table-cell>
          <table:table-cell/>
          <table:table-cell table:formula="of:=[.J18] / [.$K40]" office:value-type="float" office:value="0.0904282816974685" calcext:value-type="float">
            <text:p>0.0904282816974685</text:p>
          </table:table-cell>
          <table:table-cell table:formula="of:=[.K18] / [.$K40]" office:value-type="float" office:value="0.362899089935058" calcext:value-type="float">
            <text:p>0.362899089935058</text:p>
          </table:table-cell>
          <table:table-cell table:formula="of:=[.L18] / [.$K40]" office:value-type="float" office:value="0.202101293171468" calcext:value-type="float">
            <text:p>0.202101293171468</text:p>
          </table:table-cell>
          <table:table-cell table:formula="of:=[.M18] / [.$K40]" office:value-type="float" office:value="0.123586588597746" calcext:value-type="float">
            <text:p>0.123586588597746</text:p>
          </table:table-cell>
          <table:table-cell table:formula="of:=[.N18] / [.$K40]" office:value-type="float" office:value="0.0710518719763192" calcext:value-type="float">
            <text:p>0.0710518719763192</text:p>
          </table:table-cell>
          <table:table-cell table:formula="of:=[.O18] / [.$K40]" office:value-type="float" office:value="0.149932874621939" calcext:value-type="float">
            <text:p>0.149932874621939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432" calcext:value-type="float">
            <text:p>432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41]/[.A$47]" office:value-type="float" office:value="12" calcext:value-type="float">
            <text:p>12</text:p>
          </table:table-cell>
          <table:table-cell table:formula="of:=[.E19]/[.E$25]" office:value-type="float" office:value="11.0236406128103" calcext:value-type="float">
            <text:p>11.0236406128103</text:p>
          </table:table-cell>
          <table:table-cell table:formula="of:=[.F19]/[.F$25]" office:value-type="float" office:value="9.91797264821419" calcext:value-type="float">
            <text:p>9.91797264821419</text:p>
          </table:table-cell>
          <table:table-cell/>
          <table:table-cell table:formula="of:=[.F42]/[.F$48]" office:value-type="string" office:string-value="" calcext:value-type="error">
            <text:p>#DIV/0!</text:p>
          </table:table-cell>
          <table:table-cell/>
          <table:table-cell table:formula="of:=SUM([.J19:.O19])" office:value-type="float" office:value="122.897111" calcext:value-type="float">
            <text:p>122.897111</text:p>
          </table:table-cell>
          <table:table-cell/>
          <table:table-cell table:formula="of:=[.J19] / [.$K41]" office:value-type="float" office:value="0.0901386933334828" calcext:value-type="float">
            <text:p>0.0901386933334828</text:p>
          </table:table-cell>
          <table:table-cell table:formula="of:=[.K19] / [.$K41]" office:value-type="float" office:value="0.367170917467702" calcext:value-type="float">
            <text:p>0.367170917467702</text:p>
          </table:table-cell>
          <table:table-cell table:formula="of:=[.L19] / [.$K41]" office:value-type="float" office:value="0.19809455081495" calcext:value-type="float">
            <text:p>0.19809455081495</text:p>
          </table:table-cell>
          <table:table-cell table:formula="of:=[.M19] / [.$K41]" office:value-type="float" office:value="0.123927892820849" calcext:value-type="float">
            <text:p>0.123927892820849</text:p>
          </table:table-cell>
          <table:table-cell table:formula="of:=[.N19] / [.$K41]" office:value-type="float" office:value="0.0727208795005767" calcext:value-type="float">
            <text:p>0.0727208795005767</text:p>
          </table:table-cell>
          <table:table-cell table:formula="of:=[.O19] / [.$K41]" office:value-type="float" office:value="0.14794706606244" calcext:value-type="float">
            <text:p>0.14794706606244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360" calcext:value-type="float">
            <text:p>360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42]/[.A$47]" office:value-type="float" office:value="10" calcext:value-type="float">
            <text:p>10</text:p>
          </table:table-cell>
          <table:table-cell table:formula="of:=[.E20]/[.E$25]" office:value-type="float" office:value="9.4608375549906" calcext:value-type="float">
            <text:p>9.4608375549906</text:p>
          </table:table-cell>
          <table:table-cell table:formula="of:=[.F20]/[.F$25]" office:value-type="float" office:value="8.2009641575925" calcext:value-type="float">
            <text:p>8.2009641575925</text:p>
          </table:table-cell>
          <table:table-cell/>
          <table:table-cell table:formula="of:=[.F43]/[.F$48]" office:value-type="string" office:string-value="" calcext:value-type="error">
            <text:p>#DIV/0!</text:p>
          </table:table-cell>
          <table:table-cell/>
          <table:table-cell table:formula="of:=SUM([.J20:.O20])" office:value-type="float" office:value="115.151243" calcext:value-type="float">
            <text:p>115.151243</text:p>
          </table:table-cell>
          <table:table-cell/>
          <table:table-cell table:formula="of:=[.J20] / [.$K42]" office:value-type="float" office:value="0.0951585125312108" calcext:value-type="float">
            <text:p>0.0951585125312108</text:p>
          </table:table-cell>
          <table:table-cell table:formula="of:=[.K20] / [.$K42]" office:value-type="float" office:value="0.349829154688326" calcext:value-type="float">
            <text:p>0.349829154688326</text:p>
          </table:table-cell>
          <table:table-cell table:formula="of:=[.L20] / [.$K42]" office:value-type="float" office:value="0.200034992240596" calcext:value-type="float">
            <text:p>0.200034992240596</text:p>
          </table:table-cell>
          <table:table-cell table:formula="of:=[.M20] / [.$K42]" office:value-type="float" office:value="0.127378156048216" calcext:value-type="float">
            <text:p>0.127378156048216</text:p>
          </table:table-cell>
          <table:table-cell table:formula="of:=[.N20] / [.$K42]" office:value-type="float" office:value="0.0791212041019826" calcext:value-type="float">
            <text:p>0.0791212041019826</text:p>
          </table:table-cell>
          <table:table-cell table:formula="of:=[.O20] / [.$K42]" office:value-type="float" office:value="0.148477980389669" calcext:value-type="float">
            <text:p>0.148477980389669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288" calcext:value-type="float">
            <text:p>288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43]/[.A$47]" office:value-type="float" office:value="8" calcext:value-type="float">
            <text:p>8</text:p>
          </table:table-cell>
          <table:table-cell table:formula="of:=[.E21]/[.E$25]" office:value-type="float" office:value="7.70499870970466" calcext:value-type="float">
            <text:p>7.70499870970466</text:p>
          </table:table-cell>
          <table:table-cell table:formula="of:=[.F21]/[.F$25]" office:value-type="float" office:value="6.60938077187071" calcext:value-type="float">
            <text:p>6.60938077187071</text:p>
          </table:table-cell>
          <table:table-cell/>
          <table:table-cell table:formula="of:=[.F44]/[.F$48]" office:value-type="string" office:string-value="" calcext:value-type="error">
            <text:p>#DIV/0!</text:p>
          </table:table-cell>
          <table:table-cell/>
          <table:table-cell table:formula="of:=SUM([.J21:.O21])" office:value-type="float" office:value="117.99915" calcext:value-type="float">
            <text:p>117.99915</text:p>
          </table:table-cell>
          <table:table-cell/>
          <table:table-cell table:formula="of:=[.J21] / [.$K43]" office:value-type="float" office:value="0.0914357179691548" calcext:value-type="float">
            <text:p>0.0914357179691548</text:p>
          </table:table-cell>
          <table:table-cell table:formula="of:=[.K21] / [.$K43]" office:value-type="float" office:value="0.367853073517902" calcext:value-type="float">
            <text:p>0.367853073517902</text:p>
          </table:table-cell>
          <table:table-cell table:formula="of:=[.L21] / [.$K43]" office:value-type="float" office:value="0.204434964150165" calcext:value-type="float">
            <text:p>0.204434964150165</text:p>
          </table:table-cell>
          <table:table-cell table:formula="of:=[.M21] / [.$K43]" office:value-type="float" office:value="0.129173727098882" calcext:value-type="float">
            <text:p>0.129173727098882</text:p>
          </table:table-cell>
          <table:table-cell table:formula="of:=[.N21] / [.$K43]" office:value-type="float" office:value="0.0765615684519761" calcext:value-type="float">
            <text:p>0.0765615684519761</text:p>
          </table:table-cell>
          <table:table-cell table:formula="of:=[.O21] / [.$K43]" office:value-type="float" office:value="0.130540948811919" calcext:value-type="float">
            <text:p>0.130540948811919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216" calcext:value-type="float">
            <text:p>216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44]/[.A$47]" office:value-type="float" office:value="6" calcext:value-type="float">
            <text:p>6</text:p>
          </table:table-cell>
          <table:table-cell table:formula="of:=[.E22]/[.E$25]" office:value-type="float" office:value="5.84504070318488" calcext:value-type="float">
            <text:p>5.84504070318488</text:p>
          </table:table-cell>
          <table:table-cell table:formula="of:=[.F22]/[.F$25]" office:value-type="float" office:value="5.0488160922258" calcext:value-type="float">
            <text:p>5.0488160922258</text:p>
          </table:table-cell>
          <table:table-cell/>
          <table:table-cell table:formula="of:=[.F45]/[.F$48]" office:value-type="string" office:string-value="" calcext:value-type="error">
            <text:p>#DIV/0!</text:p>
          </table:table-cell>
          <table:table-cell/>
          <table:table-cell table:formula="of:=SUM([.J22:.O22])" office:value-type="float" office:value="111.619579" calcext:value-type="float">
            <text:p>111.619579</text:p>
          </table:table-cell>
          <table:table-cell/>
          <table:table-cell table:formula="of:=[.J22] / [.$K44]" office:value-type="float" office:value="0.0921214816622808" calcext:value-type="float">
            <text:p>0.0921214816622808</text:p>
          </table:table-cell>
          <table:table-cell table:formula="of:=[.K22] / [.$K44]" office:value-type="float" office:value="0.361467220728363" calcext:value-type="float">
            <text:p>0.361467220728363</text:p>
          </table:table-cell>
          <table:table-cell table:formula="of:=[.L22] / [.$K44]" office:value-type="float" office:value="0.203928819692108" calcext:value-type="float">
            <text:p>0.203928819692108</text:p>
          </table:table-cell>
          <table:table-cell table:formula="of:=[.M22] / [.$K44]" office:value-type="float" office:value="0.136193445058595" calcext:value-type="float">
            <text:p>0.136193445058595</text:p>
          </table:table-cell>
          <table:table-cell table:formula="of:=[.N22] / [.$K44]" office:value-type="float" office:value="0.0800490207905192" calcext:value-type="float">
            <text:p>0.0800490207905192</text:p>
          </table:table-cell>
          <table:table-cell table:formula="of:=[.O22] / [.$K44]" office:value-type="float" office:value="0.126240012068134" calcext:value-type="float">
            <text:p>0.126240012068134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144" calcext:value-type="float">
            <text:p>144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45]/[.A$47]" office:value-type="float" office:value="4" calcext:value-type="float">
            <text:p>4</text:p>
          </table:table-cell>
          <table:table-cell table:formula="of:=[.E23]/[.E$25]" office:value-type="float" office:value="3.90349599125335" calcext:value-type="float">
            <text:p>3.90349599125335</text:p>
          </table:table-cell>
          <table:table-cell table:formula="of:=[.F23]/[.F$25]" office:value-type="float" office:value="3.48968931555656" calcext:value-type="float">
            <text:p>3.48968931555656</text:p>
          </table:table-cell>
          <table:table-cell/>
          <table:table-cell table:formula="of:=[.F46]/[.F$48]" office:value-type="string" office:string-value="" calcext:value-type="error">
            <text:p>#DIV/0!</text:p>
          </table:table-cell>
          <table:table-cell/>
          <table:table-cell table:formula="of:=SUM([.J23:.O23])" office:value-type="float" office:value="111.366137" calcext:value-type="float">
            <text:p>111.366137</text:p>
          </table:table-cell>
          <table:table-cell/>
          <table:table-cell table:formula="of:=[.J23] / [.$K45]" office:value-type="float" office:value="0.0922498910059168" calcext:value-type="float">
            <text:p>0.0922498910059168</text:p>
          </table:table-cell>
          <table:table-cell table:formula="of:=[.K23] / [.$K45]" office:value-type="float" office:value="0.367995030661789" calcext:value-type="float">
            <text:p>0.367995030661789</text:p>
          </table:table-cell>
          <table:table-cell table:formula="of:=[.L23] / [.$K45]" office:value-type="float" office:value="0.207533704792149" calcext:value-type="float">
            <text:p>0.207533704792149</text:p>
          </table:table-cell>
          <table:table-cell table:formula="of:=[.M23] / [.$K45]" office:value-type="float" office:value="0.136266385894305" calcext:value-type="float">
            <text:p>0.136266385894305</text:p>
          </table:table-cell>
          <table:table-cell table:formula="of:=[.N23] / [.$K45]" office:value-type="float" office:value="0.078909327707039" calcext:value-type="float">
            <text:p>0.078909327707039</text:p>
          </table:table-cell>
          <table:table-cell table:formula="of:=[.O23] / [.$K45]" office:value-type="float" office:value="0.117045659938802" calcext:value-type="float">
            <text:p>0.117045659938802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72" calcext:value-type="float">
            <text:p>72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46]/[.A$47]" office:value-type="float" office:value="2" calcext:value-type="float">
            <text:p>2</text:p>
          </table:table-cell>
          <table:table-cell table:formula="of:=[.E24]/[.E$25]" office:value-type="float" office:value="1.93778855877355" calcext:value-type="float">
            <text:p>1.93778855877355</text:p>
          </table:table-cell>
          <table:table-cell table:formula="of:=[.F24]/[.F$25]" office:value-type="float" office:value="1.94486024662332" calcext:value-type="float">
            <text:p>1.94486024662332</text:p>
          </table:table-cell>
          <table:table-cell/>
          <table:table-cell table:formula="of:=[.F47]/[.F$48]" office:value-type="string" office:string-value="" calcext:value-type="error">
            <text:p>#DIV/0!</text:p>
          </table:table-cell>
          <table:table-cell/>
          <table:table-cell table:formula="of:=SUM([.J24:.O24])" office:value-type="float" office:value="113.401255" calcext:value-type="float">
            <text:p>113.401255</text:p>
          </table:table-cell>
          <table:table-cell/>
          <table:table-cell table:formula="of:=[.J24] / [.$K46]" office:value-type="float" office:value="0.0915327259826181" calcext:value-type="float">
            <text:p>0.0915327259826181</text:p>
          </table:table-cell>
          <table:table-cell table:formula="of:=[.K24] / [.$K46]" office:value-type="float" office:value="0.389270409749874" calcext:value-type="float">
            <text:p>0.389270409749874</text:p>
          </table:table-cell>
          <table:table-cell table:formula="of:=[.L24] / [.$K46]" office:value-type="float" office:value="0.220032600168314" calcext:value-type="float">
            <text:p>0.220032600168314</text:p>
          </table:table-cell>
          <table:table-cell table:formula="of:=[.M24] / [.$K46]" office:value-type="float" office:value="0.141542269527793" calcext:value-type="float">
            <text:p>0.141542269527793</text:p>
          </table:table-cell>
          <table:table-cell table:formula="of:=[.N24] / [.$K46]" office:value-type="float" office:value="0.0733657577246389" calcext:value-type="float">
            <text:p>0.0733657577246389</text:p>
          </table:table-cell>
          <table:table-cell table:formula="of:=[.O24] / [.$K46]" office:value-type="float" office:value="0.0842562368467615" calcext:value-type="float">
            <text:p>0.0842562368467615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I$25]" office:value-type="float" office:value="111.361617" calcext:value-type="float">
            <text:p>111.361617</text:p>
          </table:table-cell>
          <table:table-cell/>
          <table:table-cell table:formula="of:=[.A47]/[.A$47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string" office:string-value="" calcext:value-type="error">
            <text:p>#DIV/0!</text:p>
          </table:table-cell>
          <table:table-cell/>
          <table:table-cell table:formula="of:=SUM([.J25:.O25])" office:value-type="float" office:value="108.807703" calcext:value-type="float">
            <text:p>108.807703</text:p>
          </table:table-cell>
          <table:table-cell/>
          <table:table-cell table:formula="of:=[.J25] / [.$K47]" office:value-type="float" office:value="0.0930925818735462" calcext:value-type="float">
            <text:p>0.0930925818735462</text:p>
          </table:table-cell>
          <table:table-cell table:formula="of:=[.K25] / [.$K47]" office:value-type="float" office:value="0.400693101663951" calcext:value-type="float">
            <text:p>0.400693101663951</text:p>
          </table:table-cell>
          <table:table-cell table:formula="of:=[.L25] / [.$K47]" office:value-type="float" office:value="0.229683425997882" calcext:value-type="float">
            <text:p>0.229683425997882</text:p>
          </table:table-cell>
          <table:table-cell table:formula="of:=[.M25] / [.$K47]" office:value-type="float" office:value="0.148341087579066" calcext:value-type="float">
            <text:p>0.148341087579066</text:p>
          </table:table-cell>
          <table:table-cell table:formula="of:=[.N25] / [.$K47]" office:value-type="float" office:value="0.0770482031037821" calcext:value-type="float">
            <text:p>0.0770482031037821</text:p>
          </table:table-cell>
          <table:table-cell table:formula="of:=[.O25] / [.$K47]" office:value-type="float" office:value="0.0511415997817728" calcext:value-type="float">
            <text:p>0.0511415997817728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18"/>
        </table:table-row>
        <table:table-row table:style-name="ro1">
          <table:table-cell table:style-name="ce1" table:formula="of:=MAX([.G8:.G25])" office:value-type="float" office:value="0.165021" calcext:value-type="float">
            <text:p>1.65E-01</text:p>
          </table:table-cell>
          <table:table-cell table:style-name="ce1" table:formula="of:=MIN([.G8:.G25])" office:value-type="float" office:value="0.0827269" calcext:value-type="float">
            <text:p>8.27E-02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C27:Sheet1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2:23:42.8664442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3T12:28:08.263243905</dc:date>
    <meta:editing-duration>PT12H10M30S</meta:editing-duration>
    <meta:editing-cycles>91</meta:editing-cycles>
    <meta:generator>LibreOffice/7.2.4.1$Linux_X86_64 LibreOffice_project/20$Build-1</meta:generator>
    <meta:document-statistic meta:table-count="1" meta:cell-count="62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2.957cm" svg:y="0.228cm" style:legend-expansion="custom" svg:width="14.503cm" svg:height="1.088cm" style:legend-expansion-aspect-ratio="13.3299632352941" chart:style-name="ch2"/>
        <chart:plot-area chart:style-name="ch3" table:cell-range-address="Sheet1.A28:Sheet1.A47 Sheet1.E27:Sheet1.G47 Sheet1.C27:Sheet1.C47 Sheet1.I6:Sheet1.I25" chart:data-source-has-labels="row" svg:x="0.554cm" svg:y="1.338cm" svg:width="18.595cm" svg:height="7.134cm">
          <chart:coordinate-region svg:x="1.361cm" svg:y="1.537cm" svg:width="17.167cm" svg:height="6.288cm"/>
          <chart:axis chart:dimension="x" chart:name="primary-x" chart:style-name="ch4">
            <chart:title svg:x="9.18cm" svg:y="8.255cm" chart:style-name="ch5">
              <text:p>#processes</text:p>
            </chart:title>
          </chart:axis>
          <chart:axis chart:dimension="y" chart:name="primary-y" chart:style-name="ch6">
            <chart:title svg:x="0.206cm" svg:y="5.75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14cm" svg:y="6.078cm" chart:style-name="ch7">
              <text:p>Relative #objects</text:p>
            </chart:title>
          </chart:axis>
          <chart:series chart:attached-axis="secondary-y" chart:style-name="ch10" chart:values-cell-range-address="Sheet1.E28:Sheet1.E47" chart:label-cell-address="Sheet1.E27:Sheet1.E27" chart:class="chart:scatter">
            <chart:domain table:cell-range-address="Sheet1.A28:Sheet1.A47"/>
            <chart:data-point chart:repeated="20"/>
          </chart:series>
          <chart:series chart:attached-axis="secondary-y" chart:style-name="ch11" chart:values-cell-range-address="Sheet1.F28:Sheet1.F47" chart:label-cell-address="Sheet1.F27:Sheet1.F27" chart:class="chart:scatter">
            <chart:data-point chart:repeated="20"/>
          </chart:series>
          <chart:series chart:attached-axis="secondary-y" chart:style-name="ch12" chart:values-cell-range-address="Sheet1.G28:Sheet1.G47" chart:label-cell-address="Sheet1.G27:Sheet1.G27" chart:class="chart:scatter">
            <chart:data-point chart:repeated="20"/>
          </chart:series>
          <chart:series chart:attached-axis="primary-y" chart:style-name="ch13" chart:values-cell-range-address="Sheet1.C28:Sheet1.C47" chart:label-cell-address="Sheet1.C27:Sheet1.C27" chart:class="chart:scatter">
            <chart:data-point chart:repeated="20"/>
          </chart:series>
          <chart:series chart:attached-axis="primary-y" chart:style-name="ch14" chart:values-cell-range-address="Sheet1.I6:Sheet1.I25" loext:label-string="&quot;runtime&quot;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27:Sheet1.E27</svg:desc>
                </draw:g>
              </table:table-cell>
              <table:table-cell office:value-type="string">
                <text:p>#objects</text:p>
                <draw:g>
                  <svg:desc>Sheet1.F27:Sheet1.F27</svg:desc>
                </draw:g>
              </table:table-cell>
              <table:table-cell office:value-type="string">
                <text:p>symbolic #objects</text:p>
                <draw:g>
                  <svg:desc>Sheet1.G27:Sheet1.G27</svg:desc>
                </draw:g>
              </table:table-cell>
              <table:table-cell office:value-type="string">
                <text:p>ref. runtime</text:p>
                <draw:g>
                  <svg:desc>Sheet1.C27:Sheet1.C27</svg:desc>
                </draw:g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8">
                <text:p>1548</text:p>
                <draw:g>
                  <svg:desc>Sheet1.A28:Sheet1.A47</svg:desc>
                </draw:g>
              </table:table-cell>
              <table:table-cell office:value-type="float" office:value="43">
                <text:p>43</text:p>
                <draw:g>
                  <svg:desc>Sheet1.E28:Sheet1.E47</svg:desc>
                </draw:g>
              </table:table-cell>
              <table:table-cell office:value-type="float" office:value="34.5340813157645">
                <text:p>34.5340813157645</text:p>
                <draw:g>
                  <svg:desc>Sheet1.F28:Sheet1.F47</svg:desc>
                </draw:g>
              </table:table-cell>
              <table:table-cell office:value-type="float" office:value="36.9762740728363">
                <text:p>36.9762740728363</text:p>
                <draw:g>
                  <svg:desc>Sheet1.G28:Sheet1.G47</svg:desc>
                </draw:g>
              </table:table-cell>
              <table:table-cell office:value-type="float" office:value="111.361617">
                <text:p>111.361617</text:p>
                <draw:g>
                  <svg:desc>Sheet1.C28:Sheet1.C47</svg:desc>
                </draw:g>
              </table:table-cell>
              <table:table-cell office:value-type="float" office:value="198.482353">
                <text:p>198.482353</text:p>
                <draw:g>
                  <svg:desc>Sheet1.I6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2">
                <text:p>1512</text:p>
              </table:table-cell>
              <table:table-cell office:value-type="float" office:value="42">
                <text:p>42</text:p>
              </table:table-cell>
              <table:table-cell office:value-type="float" office:value="33.7161355168809">
                <text:p>33.7161355168809</text:p>
              </table:table-cell>
              <table:table-cell office:value-type="float" office:value="36.1029636204411">
                <text:p>36.1029636204411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59.75275">
                <text:p>159.75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">
                <text:p>1476</text:p>
              </table:table-cell>
              <table:table-cell office:value-type="float" office:value="41">
                <text:p>41</text:p>
              </table:table-cell>
              <table:table-cell office:value-type="float" office:value="33.0958112383222">
                <text:p>33.0958112383222</text:p>
              </table:table-cell>
              <table:table-cell office:value-type="float" office:value="35.2302489438039">
                <text:p>35.2302489438039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55.903016">
                <text:p>155.903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30.6634825711615">
                <text:p>30.6634825711615</text:p>
              </table:table-cell>
              <table:table-cell office:value-type="float" office:value="32.6041331161359">
                <text:p>32.6041331161359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47.420216">
                <text:p>147.420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28.5238499905026">
                <text:p>28.5238499905026</text:p>
              </table:table-cell>
              <table:table-cell office:value-type="float" office:value="29.9853515204892">
                <text:p>29.9853515204892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50.965557">
                <text:p>150.965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6.3189510495667">
                <text:p>26.3189510495667</text:p>
              </table:table-cell>
              <table:table-cell office:value-type="float" office:value="27.3499699990756">
                <text:p>27.3499699990756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47.61605">
                <text:p>147.61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4.0241101754035">
                <text:p>24.0241101754035</text:p>
              </table:table-cell>
              <table:table-cell office:value-type="float" office:value="24.6946907673258">
                <text:p>24.6946907673258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55.816677">
                <text:p>155.816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21.7328672810628">
                <text:p>21.7328672810628</text:p>
              </table:table-cell>
              <table:table-cell office:value-type="float" office:value="22.0683034322709">
                <text:p>22.0683034322709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39.365001">
                <text:p>139.365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9.4135508023365">
                <text:p>19.4135508023365</text:p>
              </table:table-cell>
              <table:table-cell office:value-type="float" office:value="19.3581489713261">
                <text:p>19.3581489713261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39.119349">
                <text:p>139.119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7.0661568827243">
                <text:p>17.0661568827243</text:p>
              </table:table-cell>
              <table:table-cell office:value-type="float" office:value="16.7368075165219">
                <text:p>16.7368075165219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41.35851">
                <text:p>141.35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5.7306315511016">
                <text:p>15.7306315511016</text:p>
              </table:table-cell>
              <table:table-cell office:value-type="float" office:value="15.1087389679582">
                <text:p>15.1087389679582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31.461165">
                <text:p>131.461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4.1954831028933">
                <text:p>14.1954831028933</text:p>
              </table:table-cell>
              <table:table-cell office:value-type="float" office:value="13.3867496037168">
                <text:p>13.3867496037168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26.081526">
                <text:p>126.081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2.6051145935689">
                <text:p>12.6051145935689</text:p>
              </table:table-cell>
              <table:table-cell office:value-type="float" office:value="11.6746521364525">
                <text:p>11.6746521364525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26.949928">
                <text:p>126.949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11.0236406128103">
                <text:p>11.0236406128103</text:p>
              </table:table-cell>
              <table:table-cell office:value-type="float" office:value="9.91797264821419">
                <text:p>9.91797264821419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25.7927">
                <text:p>125.7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9.4608375549906">
                <text:p>9.4608375549906</text:p>
              </table:table-cell>
              <table:table-cell office:value-type="float" office:value="8.2009641575925">
                <text:p>8.2009641575925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18.497593">
                <text:p>118.497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7.70499870970466">
                <text:p>7.70499870970466</text:p>
              </table:table-cell>
              <table:table-cell office:value-type="float" office:value="6.60938077187071">
                <text:p>6.60938077187071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21.16408">
                <text:p>121.16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5.84504070318488">
                <text:p>5.84504070318488</text:p>
              </table:table-cell>
              <table:table-cell office:value-type="float" office:value="5.0488160922258">
                <text:p>5.0488160922258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15.106236">
                <text:p>115.106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3.90349599125335">
                <text:p>3.90349599125335</text:p>
              </table:table-cell>
              <table:table-cell office:value-type="float" office:value="3.48968931555656">
                <text:p>3.48968931555656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14.432439">
                <text:p>114.432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93778855877355">
                <text:p>1.93778855877355</text:p>
              </table:table-cell>
              <table:table-cell office:value-type="float" office:value="1.94486024662332">
                <text:p>1.94486024662332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15.944744">
                <text:p>115.944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1.361617">
                <text:p>111.361617</text:p>
              </table:table-cell>
              <table:table-cell office:value-type="float" office:value="111.361617">
                <text:p>111.361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37cm" svg:y="0.192cm" style:legend-expansion="custom" svg:width="14.655cm" svg:height="1.036cm" style:legend-expansion-aspect-ratio="14.1457528957529" chart:style-name="ch2"/>
        <chart:plot-area chart:style-name="ch3" table:cell-range-address="Sheet1.A28:Sheet1.A47 Sheet1.M27:Sheet1.R47" chart:data-source-has-labels="row" svg:x="0.709cm" svg:y="1.186cm" svg:width="18.971cm" svg:height="7.211cm">
          <chart:coordinate-region svg:x="1.621cm" svg:y="1.385cm" svg:width="17.687cm" svg:height="6.365cm"/>
          <chart:axis chart:dimension="x" chart:name="primary-x" chart:style-name="ch4">
            <chart:title svg:x="9.354cm" svg:y="8.24cm" chart:style-name="ch5">
              <text:p>#processes</text:p>
            </chart:title>
          </chart:axis>
          <chart:axis chart:dimension="y" chart:name="primary-y" chart:style-name="ch6">
            <chart:title svg:x="0.149cm" svg:y="6.443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28:Sheet1.M47" chart:label-cell-address="Sheet1.M27:Sheet1.M27" chart:class="chart:scatter">
            <chart:domain table:cell-range-address="Sheet1.A28:Sheet1.A47"/>
            <chart:data-point chart:repeated="20"/>
          </chart:series>
          <chart:series chart:style-name="ch10" chart:values-cell-range-address="Sheet1.N28:Sheet1.N47" chart:label-cell-address="Sheet1.N27:Sheet1.N27" chart:class="chart:scatter">
            <chart:data-point chart:repeated="20"/>
          </chart:series>
          <chart:series chart:style-name="ch11" chart:values-cell-range-address="Sheet1.O28:Sheet1.O47" chart:label-cell-address="Sheet1.O27:Sheet1.O27" chart:class="chart:scatter">
            <chart:data-point chart:repeated="20"/>
          </chart:series>
          <chart:series chart:style-name="ch12" chart:values-cell-range-address="Sheet1.P28:Sheet1.P47" chart:label-cell-address="Sheet1.P27:Sheet1.P27" chart:class="chart:scatter">
            <chart:data-point chart:repeated="20"/>
          </chart:series>
          <chart:series chart:style-name="ch13" chart:values-cell-range-address="Sheet1.Q28:Sheet1.Q47" chart:label-cell-address="Sheet1.Q27:Sheet1.Q27" chart:class="chart:scatter">
            <chart:data-point chart:repeated="20"/>
          </chart:series>
          <chart:series chart:style-name="ch14" chart:values-cell-range-address="Sheet1.R28:Sheet1.R47" chart:label-cell-address="Sheet1.R27:Sheet1.R2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27:Sheet1.M27</svg:desc>
                </draw:g>
              </table:table-cell>
              <table:table-cell office:value-type="string">
                <text:p>symbolic step</text:p>
                <draw:g>
                  <svg:desc>Sheet1.N27:Sheet1.N27</svg:desc>
                </draw:g>
              </table:table-cell>
              <table:table-cell office:value-type="string">
                <text:p>duplicates elimination</text:p>
                <draw:g>
                  <svg:desc>Sheet1.O27:Sheet1.O27</svg:desc>
                </draw:g>
              </table:table-cell>
              <table:table-cell office:value-type="string">
                <text:p>pre-object generation</text:p>
                <draw:g>
                  <svg:desc>Sheet1.P27:Sheet1.P27</svg:desc>
                </draw:g>
              </table:table-cell>
              <table:table-cell office:value-type="string">
                <text:p>object generation</text:p>
                <draw:g>
                  <svg:desc>Sheet1.Q27:Sheet1.Q27</svg:desc>
                </draw:g>
              </table:table-cell>
              <table:table-cell office:value-type="string">
                <text:p>communication</text:p>
                <draw:g>
                  <svg:desc>Sheet1.R27:Sheet1.R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8">
                <text:p>1548</text:p>
                <draw:g>
                  <svg:desc>Sheet1.A28:Sheet1.A47</svg:desc>
                </draw:g>
              </table:table-cell>
              <table:table-cell office:value-type="float" office:value="0.07610882073107">
                <text:p>0.07610882073107</text:p>
                <draw:g>
                  <svg:desc>Sheet1.M28:Sheet1.M47</svg:desc>
                </draw:g>
              </table:table-cell>
              <table:table-cell office:value-type="float" office:value="0.397592317587604">
                <text:p>0.397592317587604</text:p>
                <draw:g>
                  <svg:desc>Sheet1.N28:Sheet1.N47</svg:desc>
                </draw:g>
              </table:table-cell>
              <table:table-cell office:value-type="float" office:value="0.211950507675834">
                <text:p>0.211950507675834</text:p>
                <draw:g>
                  <svg:desc>Sheet1.O28:Sheet1.O47</svg:desc>
                </draw:g>
              </table:table-cell>
              <table:table-cell office:value-type="float" office:value="0.122534713900968">
                <text:p>0.122534713900968</text:p>
                <draw:g>
                  <svg:desc>Sheet1.P28:Sheet1.P47</svg:desc>
                </draw:g>
              </table:table-cell>
              <table:table-cell office:value-type="float" office:value="0.0551774408715917">
                <text:p>0.0551774408715917</text:p>
                <draw:g>
                  <svg:desc>Sheet1.Q28:Sheet1.Q47</svg:desc>
                </draw:g>
              </table:table-cell>
              <table:table-cell office:value-type="float" office:value="0.136636199232932">
                <text:p>0.136636199232932</text:p>
                <draw:g>
                  <svg:desc>Sheet1.R28:Sheet1.R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2">
                <text:p>1512</text:p>
              </table:table-cell>
              <table:table-cell office:value-type="float" office:value="0.0798119310306398">
                <text:p>0.0798119310306398</text:p>
              </table:table-cell>
              <table:table-cell office:value-type="float" office:value="0.372645922700507">
                <text:p>0.372645922700507</text:p>
              </table:table-cell>
              <table:table-cell office:value-type="float" office:value="0.217845445267737">
                <text:p>0.217845445267737</text:p>
              </table:table-cell>
              <table:table-cell office:value-type="float" office:value="0.124843407579267">
                <text:p>0.124843407579267</text:p>
              </table:table-cell>
              <table:table-cell office:value-type="float" office:value="0.0672734453521997">
                <text:p>0.0672734453521997</text:p>
              </table:table-cell>
              <table:table-cell office:value-type="float" office:value="0.13757984806965">
                <text:p>0.13757984806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">
                <text:p>1476</text:p>
              </table:table-cell>
              <table:table-cell office:value-type="float" office:value="0.078859315122313">
                <text:p>0.078859315122313</text:p>
              </table:table-cell>
              <table:table-cell office:value-type="float" office:value="0.364382285769066">
                <text:p>0.364382285769066</text:p>
              </table:table-cell>
              <table:table-cell office:value-type="float" office:value="0.224366716493294">
                <text:p>0.224366716493294</text:p>
              </table:table-cell>
              <table:table-cell office:value-type="float" office:value="0.123214470917202">
                <text:p>0.123214470917202</text:p>
              </table:table-cell>
              <table:table-cell office:value-type="float" office:value="0.0686519040117868">
                <text:p>0.0686519040117868</text:p>
              </table:table-cell>
              <table:table-cell office:value-type="float" office:value="0.140525307686339">
                <text:p>0.140525307686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8">
                <text:p>1368</text:p>
              </table:table-cell>
              <table:table-cell office:value-type="float" office:value="0.0828364072341074">
                <text:p>0.0828364072341074</text:p>
              </table:table-cell>
              <table:table-cell office:value-type="float" office:value="0.345736174606604">
                <text:p>0.345736174606604</text:p>
              </table:table-cell>
              <table:table-cell office:value-type="float" office:value="0.231260909457625">
                <text:p>0.231260909457625</text:p>
              </table:table-cell>
              <table:table-cell office:value-type="float" office:value="0.123073116716195">
                <text:p>0.123073116716195</text:p>
              </table:table-cell>
              <table:table-cell office:value-type="float" office:value="0.0733527248704366">
                <text:p>0.0733527248704366</text:p>
              </table:table-cell>
              <table:table-cell office:value-type="float" office:value="0.143740667115032">
                <text:p>0.143740667115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0">
                <text:p>1260</text:p>
              </table:table-cell>
              <table:table-cell office:value-type="float" office:value="0.0817069266122716">
                <text:p>0.0817069266122716</text:p>
              </table:table-cell>
              <table:table-cell office:value-type="float" office:value="0.356403895207517">
                <text:p>0.356403895207517</text:p>
              </table:table-cell>
              <table:table-cell office:value-type="float" office:value="0.222644338788579">
                <text:p>0.222644338788579</text:p>
              </table:table-cell>
              <table:table-cell office:value-type="float" office:value="0.128716620067597">
                <text:p>0.128716620067597</text:p>
              </table:table-cell>
              <table:table-cell office:value-type="float" office:value="0.0721992404951313">
                <text:p>0.0721992404951313</text:p>
              </table:table-cell>
              <table:table-cell office:value-type="float" office:value="0.138328978828904">
                <text:p>0.138328978828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2">
                <text:p>1152</text:p>
              </table:table-cell>
              <table:table-cell office:value-type="float" office:value="0.0847246134915448">
                <text:p>0.0847246134915448</text:p>
              </table:table-cell>
              <table:table-cell office:value-type="float" office:value="0.345419873092226">
                <text:p>0.345419873092226</text:p>
              </table:table-cell>
              <table:table-cell office:value-type="float" office:value="0.230511784074758">
                <text:p>0.230511784074758</text:p>
              </table:table-cell>
              <table:table-cell office:value-type="float" office:value="0.12736737393745">
                <text:p>0.12736737393745</text:p>
              </table:table-cell>
              <table:table-cell office:value-type="float" office:value="0.073593269122274">
                <text:p>0.073593269122274</text:p>
              </table:table-cell>
              <table:table-cell office:value-type="float" office:value="0.138383086281748">
                <text:p>0.138383086281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4">
                <text:p>1044</text:p>
              </table:table-cell>
              <table:table-cell office:value-type="float" office:value="0.0834467076957039">
                <text:p>0.0834467076957039</text:p>
              </table:table-cell>
              <table:table-cell office:value-type="float" office:value="0.356370376229426">
                <text:p>0.356370376229426</text:p>
              </table:table-cell>
              <table:table-cell office:value-type="float" office:value="0.220592069935725">
                <text:p>0.220592069935725</text:p>
              </table:table-cell>
              <table:table-cell office:value-type="float" office:value="0.136658758579309">
                <text:p>0.136658758579309</text:p>
              </table:table-cell>
              <table:table-cell office:value-type="float" office:value="0.0703621818853542">
                <text:p>0.0703621818853542</text:p>
              </table:table-cell>
              <table:table-cell office:value-type="float" office:value="0.132569905674483">
                <text:p>0.132569905674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6">
                <text:p>936</text:p>
              </table:table-cell>
              <table:table-cell office:value-type="float" office:value="0.0885804475296336">
                <text:p>0.0885804475296336</text:p>
              </table:table-cell>
              <table:table-cell office:value-type="float" office:value="0.336275015442884">
                <text:p>0.336275015442884</text:p>
              </table:table-cell>
              <table:table-cell office:value-type="float" office:value="0.2263244865934">
                <text:p>0.2263244865934</text:p>
              </table:table-cell>
              <table:table-cell office:value-type="float" office:value="0.13048606852415">
                <text:p>0.13048606852415</text:p>
              </table:table-cell>
              <table:table-cell office:value-type="float" office:value="0.0794956778985618">
                <text:p>0.0794956778985618</text:p>
              </table:table-cell>
              <table:table-cell office:value-type="float" office:value="0.138838304011371">
                <text:p>0.138838304011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8">
                <text:p>828</text:p>
              </table:table-cell>
              <table:table-cell office:value-type="float" office:value="0.0921267336553823">
                <text:p>0.0921267336553823</text:p>
              </table:table-cell>
              <table:table-cell office:value-type="float" office:value="0.324120822908843">
                <text:p>0.324120822908843</text:p>
              </table:table-cell>
              <table:table-cell office:value-type="float" office:value="0.227759315127756">
                <text:p>0.227759315127756</text:p>
              </table:table-cell>
              <table:table-cell office:value-type="float" office:value="0.137557280332693">
                <text:p>0.137557280332693</text:p>
              </table:table-cell>
              <table:table-cell office:value-type="float" office:value="0.0814054748868323">
                <text:p>0.0814054748868323</text:p>
              </table:table-cell>
              <table:table-cell office:value-type="float" office:value="0.137030373088494">
                <text:p>0.137030373088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">
                <text:p>720</text:p>
              </table:table-cell>
              <table:table-cell office:value-type="float" office:value="0.090819266810979">
                <text:p>0.090819266810979</text:p>
              </table:table-cell>
              <table:table-cell office:value-type="float" office:value="0.335760395964164">
                <text:p>0.335760395964164</text:p>
              </table:table-cell>
              <table:table-cell office:value-type="float" office:value="0.219369655872357">
                <text:p>0.219369655872357</text:p>
              </table:table-cell>
              <table:table-cell office:value-type="float" office:value="0.131636534392496">
                <text:p>0.131636534392496</text:p>
              </table:table-cell>
              <table:table-cell office:value-type="float" office:value="0.0811200493590444">
                <text:p>0.0811200493590444</text:p>
              </table:table-cell>
              <table:table-cell office:value-type="float" office:value="0.141294097600959">
                <text:p>0.141294097600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863379787288">
                <text:p>0.0863379787288</text:p>
              </table:table-cell>
              <table:table-cell office:value-type="float" office:value="0.373501661393137">
                <text:p>0.373501661393137</text:p>
              </table:table-cell>
              <table:table-cell office:value-type="float" office:value="0.20623581392509">
                <text:p>0.20623581392509</text:p>
              </table:table-cell>
              <table:table-cell office:value-type="float" office:value="0.121168434554773">
                <text:p>0.121168434554773</text:p>
              </table:table-cell>
              <table:table-cell office:value-type="float" office:value="0.0668490879516951">
                <text:p>0.0668490879516951</text:p>
              </table:table-cell>
              <table:table-cell office:value-type="float" office:value="0.145907023446506">
                <text:p>0.145907023446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6">
                <text:p>576</text:p>
              </table:table-cell>
              <table:table-cell office:value-type="float" office:value="0.09035731985522">
                <text:p>0.09035731985522</text:p>
              </table:table-cell>
              <table:table-cell office:value-type="float" office:value="0.351106570184221">
                <text:p>0.351106570184221</text:p>
              </table:table-cell>
              <table:table-cell office:value-type="float" office:value="0.206506723597379">
                <text:p>0.206506723597379</text:p>
              </table:table-cell>
              <table:table-cell office:value-type="float" office:value="0.1253567113432">
                <text:p>0.1253567113432</text:p>
              </table:table-cell>
              <table:table-cell office:value-type="float" office:value="0.0706823016198253">
                <text:p>0.0706823016198253</text:p>
              </table:table-cell>
              <table:table-cell office:value-type="float" office:value="0.155990373400154">
                <text:p>0.155990373400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0.0904282816974685">
                <text:p>0.0904282816974685</text:p>
              </table:table-cell>
              <table:table-cell office:value-type="float" office:value="0.362899089935058">
                <text:p>0.362899089935058</text:p>
              </table:table-cell>
              <table:table-cell office:value-type="float" office:value="0.202101293171468">
                <text:p>0.202101293171468</text:p>
              </table:table-cell>
              <table:table-cell office:value-type="float" office:value="0.123586588597746">
                <text:p>0.123586588597746</text:p>
              </table:table-cell>
              <table:table-cell office:value-type="float" office:value="0.0710518719763192">
                <text:p>0.0710518719763192</text:p>
              </table:table-cell>
              <table:table-cell office:value-type="float" office:value="0.149932874621939">
                <text:p>0.1499328746219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">
                <text:p>432</text:p>
              </table:table-cell>
              <table:table-cell office:value-type="float" office:value="0.0901386933334828">
                <text:p>0.0901386933334828</text:p>
              </table:table-cell>
              <table:table-cell office:value-type="float" office:value="0.367170917467702">
                <text:p>0.367170917467702</text:p>
              </table:table-cell>
              <table:table-cell office:value-type="float" office:value="0.19809455081495">
                <text:p>0.19809455081495</text:p>
              </table:table-cell>
              <table:table-cell office:value-type="float" office:value="0.123927892820849">
                <text:p>0.123927892820849</text:p>
              </table:table-cell>
              <table:table-cell office:value-type="float" office:value="0.0727208795005767">
                <text:p>0.0727208795005767</text:p>
              </table:table-cell>
              <table:table-cell office:value-type="float" office:value="0.14794706606244">
                <text:p>0.14794706606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  <table:table-cell office:value-type="float" office:value="0.0951585125312108">
                <text:p>0.0951585125312108</text:p>
              </table:table-cell>
              <table:table-cell office:value-type="float" office:value="0.349829154688326">
                <text:p>0.349829154688326</text:p>
              </table:table-cell>
              <table:table-cell office:value-type="float" office:value="0.200034992240596">
                <text:p>0.200034992240596</text:p>
              </table:table-cell>
              <table:table-cell office:value-type="float" office:value="0.127378156048216">
                <text:p>0.127378156048216</text:p>
              </table:table-cell>
              <table:table-cell office:value-type="float" office:value="0.0791212041019826">
                <text:p>0.0791212041019826</text:p>
              </table:table-cell>
              <table:table-cell office:value-type="float" office:value="0.148477980389669">
                <text:p>0.148477980389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">
                <text:p>288</text:p>
              </table:table-cell>
              <table:table-cell office:value-type="float" office:value="0.0914357179691548">
                <text:p>0.0914357179691548</text:p>
              </table:table-cell>
              <table:table-cell office:value-type="float" office:value="0.367853073517902">
                <text:p>0.367853073517902</text:p>
              </table:table-cell>
              <table:table-cell office:value-type="float" office:value="0.204434964150165">
                <text:p>0.204434964150165</text:p>
              </table:table-cell>
              <table:table-cell office:value-type="float" office:value="0.129173727098882">
                <text:p>0.129173727098882</text:p>
              </table:table-cell>
              <table:table-cell office:value-type="float" office:value="0.0765615684519761">
                <text:p>0.0765615684519761</text:p>
              </table:table-cell>
              <table:table-cell office:value-type="float" office:value="0.130540948811919">
                <text:p>0.130540948811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0.0921214816622808">
                <text:p>0.0921214816622808</text:p>
              </table:table-cell>
              <table:table-cell office:value-type="float" office:value="0.361467220728363">
                <text:p>0.361467220728363</text:p>
              </table:table-cell>
              <table:table-cell office:value-type="float" office:value="0.203928819692108">
                <text:p>0.203928819692108</text:p>
              </table:table-cell>
              <table:table-cell office:value-type="float" office:value="0.136193445058595">
                <text:p>0.136193445058595</text:p>
              </table:table-cell>
              <table:table-cell office:value-type="float" office:value="0.0800490207905192">
                <text:p>0.0800490207905192</text:p>
              </table:table-cell>
              <table:table-cell office:value-type="float" office:value="0.126240012068134">
                <text:p>0.12624001206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0.0922498910059168">
                <text:p>0.0922498910059168</text:p>
              </table:table-cell>
              <table:table-cell office:value-type="float" office:value="0.367995030661789">
                <text:p>0.367995030661789</text:p>
              </table:table-cell>
              <table:table-cell office:value-type="float" office:value="0.207533704792149">
                <text:p>0.207533704792149</text:p>
              </table:table-cell>
              <table:table-cell office:value-type="float" office:value="0.136266385894305">
                <text:p>0.136266385894305</text:p>
              </table:table-cell>
              <table:table-cell office:value-type="float" office:value="0.078909327707039">
                <text:p>0.078909327707039</text:p>
              </table:table-cell>
              <table:table-cell office:value-type="float" office:value="0.117045659938802">
                <text:p>0.117045659938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0.0915327259826181">
                <text:p>0.0915327259826181</text:p>
              </table:table-cell>
              <table:table-cell office:value-type="float" office:value="0.389270409749874">
                <text:p>0.389270409749874</text:p>
              </table:table-cell>
              <table:table-cell office:value-type="float" office:value="0.220032600168314">
                <text:p>0.220032600168314</text:p>
              </table:table-cell>
              <table:table-cell office:value-type="float" office:value="0.141542269527793">
                <text:p>0.141542269527793</text:p>
              </table:table-cell>
              <table:table-cell office:value-type="float" office:value="0.0733657577246389">
                <text:p>0.0733657577246389</text:p>
              </table:table-cell>
              <table:table-cell office:value-type="float" office:value="0.0842562368467615">
                <text:p>0.0842562368467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0930925818735462">
                <text:p>0.0930925818735462</text:p>
              </table:table-cell>
              <table:table-cell office:value-type="float" office:value="0.400693101663951">
                <text:p>0.400693101663951</text:p>
              </table:table-cell>
              <table:table-cell office:value-type="float" office:value="0.229683425997882">
                <text:p>0.229683425997882</text:p>
              </table:table-cell>
              <table:table-cell office:value-type="float" office:value="0.148341087579066">
                <text:p>0.148341087579066</text:p>
              </table:table-cell>
              <table:table-cell office:value-type="float" office:value="0.0770482031037821">
                <text:p>0.0770482031037821</text:p>
              </table:table-cell>
              <table:table-cell office:value-type="float" office:value="0.0511415997817728">
                <text:p>0.0511415997817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