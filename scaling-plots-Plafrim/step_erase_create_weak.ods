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618cm" svg:y="0.476cm">
            <draw:object draw:notify-on-update-of-ranges="Sheet1.A52:Sheet1.A72 Sheet1.E51:Sheet1.E51 Sheet1.E52:Sheet1.E72 Sheet1.A52:Sheet1.A72 Sheet1.F51:Sheet1.F51 Sheet1.F52:Sheet1.F72 Sheet1.A52:Sheet1.A72 Sheet1.G51:Sheet1.G51 Sheet1.G52:Sheet1.G72 Sheet1.A52:Sheet1.A72 Sheet1.C52:Sheet1.C71 Sheet1.A52:Sheet1.A72 Sheet1.I6:Sheet1.I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677cm" svg:y="9.805cm">
            <draw:object draw:notify-on-update-of-ranges="Sheet1.A52:Sheet1.A72 Sheet1.M51:Sheet1.M51 Sheet1.M52:Sheet1.M72 Sheet1.A52:Sheet1.A72 Sheet1.N51:Sheet1.N51 Sheet1.N52:Sheet1.N72 Sheet1.A52:Sheet1.A72 Sheet1.O51:Sheet1.O51 Sheet1.O52:Sheet1.O72 Sheet1.A52:Sheet1.A72 Sheet1.P51:Sheet1.P51 Sheet1.P52:Sheet1.P72 Sheet1.A52:Sheet1.A72 Sheet1.Q51:Sheet1.Q51 Sheet1.Q52:Sheet1.Q72 Sheet1.A52:Sheet1.A72 Sheet1.R51:Sheet1.R51 Sheet1.R52:Sheet1.R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631cm" svg:y="19.469cm">
            <draw:object draw:notify-on-update-of-ranges="Sheet1.G52:Sheet1.G72 Sheet1.G6:Sheet1.G26 Sheet1.I52:Sheet1.I71 Sheet1.G29:Sheet1.G48 Sheet1.G52:Sheet1.G72 Sheet1.F52:Sheet1.F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994959633" calcext:value-type="float">
            <text:p>4994959633</text:p>
          </table:table-cell>
          <table:table-cell office:value-type="float" office:value="119995246332" calcext:value-type="float">
            <text:p>119995246332</text:p>
          </table:table-cell>
          <table:table-cell office:value-type="float" office:value="0.713169" calcext:value-type="float">
            <text:p>7.13E-01</text:p>
          </table:table-cell>
          <table:table-cell/>
          <table:table-cell office:value-type="float" office:value="63.469882" calcext:value-type="float">
            <text:p>63.469882</text:p>
          </table:table-cell>
          <table:table-cell office:value-type="float" office:value="2.848401" calcext:value-type="float">
            <text:p>2.848401</text:p>
          </table:table-cell>
          <table:table-cell office:value-type="float" office:value="18.655114" calcext:value-type="float">
            <text:p>18.655114</text:p>
          </table:table-cell>
          <table:table-cell office:value-type="float" office:value="24.420106" calcext:value-type="float">
            <text:p>24.420106</text:p>
          </table:table-cell>
          <table:table-cell office:value-type="float" office:value="1.277407" calcext:value-type="float">
            <text:p>1.277407</text:p>
          </table:table-cell>
          <table:table-cell office:value-type="float" office:value="1.973333" calcext:value-type="float">
            <text:p>1.973333</text:p>
          </table:table-cell>
          <table:table-cell office:value-type="float" office:value="13.313998" calcext:value-type="float">
            <text:p>13.313998</text:p>
          </table:table-cell>
          <table:table-cell/>
          <table:table-cell office:value-type="float" office:value="16.234038" calcext:value-type="float">
            <text:p>16.234038</text:p>
          </table:table-cell>
          <table:table-cell office:value-type="float" office:value="0.717912659073395" calcext:value-type="float">
            <text:p>0.717912659073395</text:p>
          </table:table-cell>
          <table:table-cell office:value-type="float" office:value="0.00731639578914606" calcext:value-type="float">
            <text:p>0.007316395789146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53324249" calcext:value-type="float">
            <text:p>4953324249</text:p>
          </table:table-cell>
          <table:table-cell office:value-type="float" office:value="117134068464" calcext:value-type="float">
            <text:p>117134068464</text:p>
          </table:table-cell>
          <table:table-cell office:value-type="float" office:value="0.710976" calcext:value-type="float">
            <text:p>7.11E-01</text:p>
          </table:table-cell>
          <table:table-cell/>
          <table:table-cell office:value-type="float" office:value="63.536977" calcext:value-type="float">
            <text:p>63.536977</text:p>
          </table:table-cell>
          <table:table-cell office:value-type="float" office:value="2.867008" calcext:value-type="float">
            <text:p>2.867008</text:p>
          </table:table-cell>
          <table:table-cell office:value-type="float" office:value="18.569402" calcext:value-type="float">
            <text:p>18.569402</text:p>
          </table:table-cell>
          <table:table-cell office:value-type="float" office:value="24.478149" calcext:value-type="float">
            <text:p>24.478149</text:p>
          </table:table-cell>
          <table:table-cell office:value-type="float" office:value="1.372059" calcext:value-type="float">
            <text:p>1.372059</text:p>
          </table:table-cell>
          <table:table-cell office:value-type="float" office:value="2.102913" calcext:value-type="float">
            <text:p>2.102913</text:p>
          </table:table-cell>
          <table:table-cell office:value-type="float" office:value="13.122225" calcext:value-type="float">
            <text:p>13.122225</text:p>
          </table:table-cell>
          <table:table-cell/>
          <table:table-cell office:value-type="float" office:value="16.597016" calcext:value-type="float">
            <text:p>16.597016</text:p>
          </table:table-cell>
          <table:table-cell office:value-type="float" office:value="0.708050084963017" calcext:value-type="float">
            <text:p>0.708050084963017</text:p>
          </table:table-cell>
          <table:table-cell office:value-type="float" office:value="0.00765420401335445" calcext:value-type="float">
            <text:p>0.007654204013354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44478880" calcext:value-type="float">
            <text:p>4944478880</text:p>
          </table:table-cell>
          <table:table-cell office:value-type="float" office:value="114166003716" calcext:value-type="float">
            <text:p>114166003716</text:p>
          </table:table-cell>
          <table:table-cell office:value-type="float" office:value="0.706199" calcext:value-type="float">
            <text:p>7.06E-01</text:p>
          </table:table-cell>
          <table:table-cell/>
          <table:table-cell office:value-type="float" office:value="64.092908" calcext:value-type="float">
            <text:p>64.092908</text:p>
          </table:table-cell>
          <table:table-cell office:value-type="float" office:value="3.050073" calcext:value-type="float">
            <text:p>3.050073</text:p>
          </table:table-cell>
          <table:table-cell office:value-type="float" office:value="18.542918" calcext:value-type="float">
            <text:p>18.542918</text:p>
          </table:table-cell>
          <table:table-cell office:value-type="float" office:value="24.21273" calcext:value-type="float">
            <text:p>24.21273</text:p>
          </table:table-cell>
          <table:table-cell office:value-type="float" office:value="1.477567" calcext:value-type="float">
            <text:p>1.477567</text:p>
          </table:table-cell>
          <table:table-cell office:value-type="float" office:value="2.255464" calcext:value-type="float">
            <text:p>2.255464</text:p>
          </table:table-cell>
          <table:table-cell office:value-type="float" office:value="13.452692" calcext:value-type="float">
            <text:p>13.452692</text:p>
          </table:table-cell>
          <table:table-cell/>
          <table:table-cell office:value-type="float" office:value="16.704998" calcext:value-type="float">
            <text:p>16.704998</text:p>
          </table:table-cell>
          <table:table-cell office:value-type="float" office:value="0.737217037258452" calcext:value-type="float">
            <text:p>0.737217037258452</text:p>
          </table:table-cell>
          <table:table-cell office:value-type="float" office:value="0.00776615424544442" calcext:value-type="float">
            <text:p>0.007766154245444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94894651" calcext:value-type="float">
            <text:p>4794894651</text:p>
          </table:table-cell>
          <table:table-cell office:value-type="float" office:value="105385094784" calcext:value-type="float">
            <text:p>105385094784</text:p>
          </table:table-cell>
          <table:table-cell office:value-type="float" office:value="0.695933" calcext:value-type="float">
            <text:p>6.96E-01</text:p>
          </table:table-cell>
          <table:table-cell/>
          <table:table-cell office:value-type="float" office:value="62.321128" calcext:value-type="float">
            <text:p>62.321128</text:p>
          </table:table-cell>
          <table:table-cell office:value-type="float" office:value="2.6498" calcext:value-type="float">
            <text:p>2.6498</text:p>
          </table:table-cell>
          <table:table-cell office:value-type="float" office:value="18.494432" calcext:value-type="float">
            <text:p>18.494432</text:p>
          </table:table-cell>
          <table:table-cell office:value-type="float" office:value="24.625488" calcext:value-type="float">
            <text:p>24.625488</text:p>
          </table:table-cell>
          <table:table-cell office:value-type="float" office:value="1.047334" calcext:value-type="float">
            <text:p>1.047334</text:p>
          </table:table-cell>
          <table:table-cell office:value-type="float" office:value="1.710704" calcext:value-type="float">
            <text:p>1.710704</text:p>
          </table:table-cell>
          <table:table-cell office:value-type="float" office:value="12.837267" calcext:value-type="float">
            <text:p>12.837267</text:p>
          </table:table-cell>
          <table:table-cell/>
          <table:table-cell office:value-type="float" office:value="15.931819" calcext:value-type="float">
            <text:p>15.931819</text:p>
          </table:table-cell>
          <table:table-cell office:value-type="float" office:value="0.632453005355182" calcext:value-type="float">
            <text:p>0.632453005355182</text:p>
          </table:table-cell>
          <table:table-cell office:value-type="float" office:value="0.00825042199883893" calcext:value-type="float">
            <text:p>0.008250421998838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656393474" calcext:value-type="float">
            <text:p>4656393474</text:p>
          </table:table-cell>
          <table:table-cell office:value-type="float" office:value="96728590980" calcext:value-type="float">
            <text:p>96728590980</text:p>
          </table:table-cell>
          <table:table-cell office:value-type="float" office:value="0.681847" calcext:value-type="float">
            <text:p>6.82E-01</text:p>
          </table:table-cell>
          <table:table-cell/>
          <table:table-cell office:value-type="float" office:value="62.879789" calcext:value-type="float">
            <text:p>62.879789</text:p>
          </table:table-cell>
          <table:table-cell office:value-type="float" office:value="2.751082" calcext:value-type="float">
            <text:p>2.751082</text:p>
          </table:table-cell>
          <table:table-cell office:value-type="float" office:value="18.482859" calcext:value-type="float">
            <text:p>18.482859</text:p>
          </table:table-cell>
          <table:table-cell office:value-type="float" office:value="24.701155" calcext:value-type="float">
            <text:p>24.701155</text:p>
          </table:table-cell>
          <table:table-cell office:value-type="float" office:value="1.275078" calcext:value-type="float">
            <text:p>1.275078</text:p>
          </table:table-cell>
          <table:table-cell office:value-type="float" office:value="2.013777" calcext:value-type="float">
            <text:p>2.013777</text:p>
          </table:table-cell>
          <table:table-cell office:value-type="float" office:value="12.6692" calcext:value-type="float">
            <text:p>12.6692</text:p>
          </table:table-cell>
          <table:table-cell/>
          <table:table-cell office:value-type="float" office:value="16.904431" calcext:value-type="float">
            <text:p>16.904431</text:p>
          </table:table-cell>
          <table:table-cell office:value-type="float" office:value="0.649021661725983" calcext:value-type="float">
            <text:p>0.649021661725983</text:p>
          </table:table-cell>
          <table:table-cell office:value-type="float" office:value="0.0087317504085773" calcext:value-type="float">
            <text:p>0.00873175040857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10209605" calcext:value-type="float">
            <text:p>4510209605</text:p>
          </table:table-cell>
          <table:table-cell office:value-type="float" office:value="88109308800" calcext:value-type="float">
            <text:p>88109308800</text:p>
          </table:table-cell>
          <table:table-cell office:value-type="float" office:value="0.668748" calcext:value-type="float">
            <text:p>6.69E-01</text:p>
          </table:table-cell>
          <table:table-cell/>
          <table:table-cell office:value-type="float" office:value="62.570577" calcext:value-type="float">
            <text:p>62.570577</text:p>
          </table:table-cell>
          <table:table-cell office:value-type="float" office:value="2.883296" calcext:value-type="float">
            <text:p>2.883296</text:p>
          </table:table-cell>
          <table:table-cell office:value-type="float" office:value="18.399661" calcext:value-type="float">
            <text:p>18.399661</text:p>
          </table:table-cell>
          <table:table-cell office:value-type="float" office:value="23.940308" calcext:value-type="float">
            <text:p>23.940308</text:p>
          </table:table-cell>
          <table:table-cell office:value-type="float" office:value="1.315331" calcext:value-type="float">
            <text:p>1.315331</text:p>
          </table:table-cell>
          <table:table-cell office:value-type="float" office:value="2.07333" calcext:value-type="float">
            <text:p>2.07333</text:p>
          </table:table-cell>
          <table:table-cell office:value-type="float" office:value="12.850092" calcext:value-type="float">
            <text:p>12.850092</text:p>
          </table:table-cell>
          <table:table-cell/>
          <table:table-cell office:value-type="float" office:value="16.18127" calcext:value-type="float">
            <text:p>16.18127</text:p>
          </table:table-cell>
          <table:table-cell office:value-type="float" office:value="0.667480383932244" calcext:value-type="float">
            <text:p>0.667480383932244</text:p>
          </table:table-cell>
          <table:table-cell office:value-type="float" office:value="0.0101662863151748" calcext:value-type="float">
            <text:p>0.01016628631517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359419470" calcext:value-type="float">
            <text:p>4359419470</text:p>
          </table:table-cell>
          <table:table-cell office:value-type="float" office:value="79473151152" calcext:value-type="float">
            <text:p>79473151152</text:p>
          </table:table-cell>
          <table:table-cell office:value-type="float" office:value="0.657807" calcext:value-type="float">
            <text:p>6.58E-01</text:p>
          </table:table-cell>
          <table:table-cell/>
          <table:table-cell office:value-type="float" office:value="63.4547" calcext:value-type="float">
            <text:p>63.4547</text:p>
          </table:table-cell>
          <table:table-cell office:value-type="float" office:value="3.012075" calcext:value-type="float">
            <text:p>3.012075</text:p>
          </table:table-cell>
          <table:table-cell office:value-type="float" office:value="18.331228" calcext:value-type="float">
            <text:p>18.331228</text:p>
          </table:table-cell>
          <table:table-cell office:value-type="float" office:value="24.655085" calcext:value-type="float">
            <text:p>24.655085</text:p>
          </table:table-cell>
          <table:table-cell office:value-type="float" office:value="1.449317" calcext:value-type="float">
            <text:p>1.449317</text:p>
          </table:table-cell>
          <table:table-cell office:value-type="float" office:value="2.247508" calcext:value-type="float">
            <text:p>2.247508</text:p>
          </table:table-cell>
          <table:table-cell office:value-type="float" office:value="12.619188" calcext:value-type="float">
            <text:p>12.619188</text:p>
          </table:table-cell>
          <table:table-cell/>
          <table:table-cell office:value-type="float" office:value="17.833192" calcext:value-type="float">
            <text:p>17.833192</text:p>
          </table:table-cell>
          <table:table-cell office:value-type="float" office:value="0.675473263082999" calcext:value-type="float">
            <text:p>0.675473263082999</text:p>
          </table:table-cell>
          <table:table-cell office:value-type="float" office:value="0.00959691829468495" calcext:value-type="float">
            <text:p>0.009596918294684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158788085" calcext:value-type="float">
            <text:p>4158788085</text:p>
          </table:table-cell>
          <table:table-cell office:value-type="float" office:value="70916064336" calcext:value-type="float">
            <text:p>70916064336</text:p>
          </table:table-cell>
          <table:table-cell office:value-type="float" office:value="0.63772" calcext:value-type="float">
            <text:p>6.38E-01</text:p>
          </table:table-cell>
          <table:table-cell/>
          <table:table-cell office:value-type="float" office:value="61.184233" calcext:value-type="float">
            <text:p>61.184233</text:p>
          </table:table-cell>
          <table:table-cell office:value-type="float" office:value="2.920829" calcext:value-type="float">
            <text:p>2.920829</text:p>
          </table:table-cell>
          <table:table-cell office:value-type="float" office:value="18.261773" calcext:value-type="float">
            <text:p>18.261773</text:p>
          </table:table-cell>
          <table:table-cell office:value-type="float" office:value="22.982637" calcext:value-type="float">
            <text:p>22.982637</text:p>
          </table:table-cell>
          <table:table-cell office:value-type="float" office:value="1.381651" calcext:value-type="float">
            <text:p>1.381651</text:p>
          </table:table-cell>
          <table:table-cell office:value-type="float" office:value="2.236612" calcext:value-type="float">
            <text:p>2.236612</text:p>
          </table:table-cell>
          <table:table-cell office:value-type="float" office:value="12.412142" calcext:value-type="float">
            <text:p>12.412142</text:p>
          </table:table-cell>
          <table:table-cell/>
          <table:table-cell office:value-type="float" office:value="17.022114" calcext:value-type="float">
            <text:p>17.022114</text:p>
          </table:table-cell>
          <table:table-cell office:value-type="float" office:value="0.638259776547062" calcext:value-type="float">
            <text:p>0.638259776547062</text:p>
          </table:table-cell>
          <table:table-cell office:value-type="float" office:value="0.00936933752752688" calcext:value-type="float">
            <text:p>0.009369337527526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72013502" calcext:value-type="float">
            <text:p>3972013502</text:p>
          </table:table-cell>
          <table:table-cell office:value-type="float" office:value="62352091224" calcext:value-type="float">
            <text:p>62352091224</text:p>
          </table:table-cell>
          <table:table-cell office:value-type="float" office:value="0.618444" calcext:value-type="float">
            <text:p>6.18E-01</text:p>
          </table:table-cell>
          <table:table-cell/>
          <table:table-cell office:value-type="float" office:value="60.361979" calcext:value-type="float">
            <text:p>60.361979</text:p>
          </table:table-cell>
          <table:table-cell office:value-type="float" office:value="2.865419" calcext:value-type="float">
            <text:p>2.865419</text:p>
          </table:table-cell>
          <table:table-cell office:value-type="float" office:value="18.077393" calcext:value-type="float">
            <text:p>18.077393</text:p>
          </table:table-cell>
          <table:table-cell office:value-type="float" office:value="22.949122" calcext:value-type="float">
            <text:p>22.949122</text:p>
          </table:table-cell>
          <table:table-cell office:value-type="float" office:value="1.379463" calcext:value-type="float">
            <text:p>1.379463</text:p>
          </table:table-cell>
          <table:table-cell office:value-type="float" office:value="2.229282" calcext:value-type="float">
            <text:p>2.229282</text:p>
          </table:table-cell>
          <table:table-cell office:value-type="float" office:value="12.123553" calcext:value-type="float">
            <text:p>12.123553</text:p>
          </table:table-cell>
          <table:table-cell/>
          <table:table-cell office:value-type="float" office:value="16.845371" calcext:value-type="float">
            <text:p>16.845371</text:p>
          </table:table-cell>
          <table:table-cell office:value-type="float" office:value="0.585728384796031" calcext:value-type="float">
            <text:p>0.585728384796031</text:p>
          </table:table-cell>
          <table:table-cell office:value-type="float" office:value="0.0127296970278276" calcext:value-type="float">
            <text:p>0.01272969702782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744046809" calcext:value-type="float">
            <text:p>3744046809</text:p>
          </table:table-cell>
          <table:table-cell office:value-type="float" office:value="53789849280" calcext:value-type="float">
            <text:p>53789849280</text:p>
          </table:table-cell>
          <table:table-cell office:value-type="float" office:value="0.599541" calcext:value-type="float">
            <text:p>6.00E-01</text:p>
          </table:table-cell>
          <table:table-cell/>
          <table:table-cell office:value-type="float" office:value="60.369633" calcext:value-type="float">
            <text:p>60.369633</text:p>
          </table:table-cell>
          <table:table-cell office:value-type="float" office:value="2.978028" calcext:value-type="float">
            <text:p>2.978028</text:p>
          </table:table-cell>
          <table:table-cell office:value-type="float" office:value="17.972424" calcext:value-type="float">
            <text:p>17.972424</text:p>
          </table:table-cell>
          <table:table-cell office:value-type="float" office:value="22.705348" calcext:value-type="float">
            <text:p>22.705348</text:p>
          </table:table-cell>
          <table:table-cell office:value-type="float" office:value="1.452292" calcext:value-type="float">
            <text:p>1.452292</text:p>
          </table:table-cell>
          <table:table-cell office:value-type="float" office:value="2.310277" calcext:value-type="float">
            <text:p>2.310277</text:p>
          </table:table-cell>
          <table:table-cell office:value-type="float" office:value="12.089044" calcext:value-type="float">
            <text:p>12.089044</text:p>
          </table:table-cell>
          <table:table-cell/>
          <table:table-cell office:value-type="float" office:value="17.189462" calcext:value-type="float">
            <text:p>17.189462</text:p>
          </table:table-cell>
          <table:table-cell office:value-type="float" office:value="0.586666663965919" calcext:value-type="float">
            <text:p>0.586666663965919</text:p>
          </table:table-cell>
          <table:table-cell office:value-type="float" office:value="0.00934226564564785" calcext:value-type="float">
            <text:p>0.009342265645647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604523492" calcext:value-type="float">
            <text:p>3604523492</text:p>
          </table:table-cell>
          <table:table-cell office:value-type="float" office:value="47969471376" calcext:value-type="float">
            <text:p>47969471376</text:p>
          </table:table-cell>
          <table:table-cell office:value-type="float" office:value="0.586596" calcext:value-type="float">
            <text:p>5.87E-01</text:p>
          </table:table-cell>
          <table:table-cell/>
          <table:table-cell office:value-type="float" office:value="55.720879" calcext:value-type="float">
            <text:p>55.720879</text:p>
          </table:table-cell>
          <table:table-cell office:value-type="float" office:value="2.581877" calcext:value-type="float">
            <text:p>2.581877</text:p>
          </table:table-cell>
          <table:table-cell office:value-type="float" office:value="17.719686" calcext:value-type="float">
            <text:p>17.719686</text:p>
          </table:table-cell>
          <table:table-cell office:value-type="float" office:value="18.189913" calcext:value-type="float">
            <text:p>18.189913</text:p>
          </table:table-cell>
          <table:table-cell office:value-type="float" office:value="1.568635" calcext:value-type="float">
            <text:p>1.568635</text:p>
          </table:table-cell>
          <table:table-cell office:value-type="float" office:value="2.532966" calcext:value-type="float">
            <text:p>2.532966</text:p>
          </table:table-cell>
          <table:table-cell office:value-type="float" office:value="11.933459" calcext:value-type="float">
            <text:p>11.933459</text:p>
          </table:table-cell>
          <table:table-cell/>
          <table:table-cell office:value-type="float" office:value="11.706547" calcext:value-type="float">
            <text:p>11.706547</text:p>
          </table:table-cell>
          <table:table-cell office:value-type="float" office:value="0.590451372060574" calcext:value-type="float">
            <text:p>0.590451372060574</text:p>
          </table:table-cell>
          <table:table-cell office:value-type="float" office:value="0.00934428881409992" calcext:value-type="float">
            <text:p>0.00934428881409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08539073" calcext:value-type="float">
            <text:p>3408539073</text:p>
          </table:table-cell>
          <table:table-cell office:value-type="float" office:value="42364215936" calcext:value-type="float">
            <text:p>42364215936</text:p>
          </table:table-cell>
          <table:table-cell office:value-type="float" office:value="0.566594" calcext:value-type="float">
            <text:p>5.67E-01</text:p>
          </table:table-cell>
          <table:table-cell/>
          <table:table-cell office:value-type="float" office:value="54.601024" calcext:value-type="float">
            <text:p>54.601024</text:p>
          </table:table-cell>
          <table:table-cell office:value-type="float" office:value="2.563174" calcext:value-type="float">
            <text:p>2.563174</text:p>
          </table:table-cell>
          <table:table-cell office:value-type="float" office:value="17.615388" calcext:value-type="float">
            <text:p>17.615388</text:p>
          </table:table-cell>
          <table:table-cell office:value-type="float" office:value="17.999957" calcext:value-type="float">
            <text:p>17.999957</text:p>
          </table:table-cell>
          <table:table-cell office:value-type="float" office:value="1.419832" calcext:value-type="float">
            <text:p>1.419832</text:p>
          </table:table-cell>
          <table:table-cell office:value-type="float" office:value="2.26683" calcext:value-type="float">
            <text:p>2.26683</text:p>
          </table:table-cell>
          <table:table-cell office:value-type="float" office:value="11.590934" calcext:value-type="float">
            <text:p>11.590934</text:p>
          </table:table-cell>
          <table:table-cell/>
          <table:table-cell office:value-type="float" office:value="10.601998" calcext:value-type="float">
            <text:p>10.601998</text:p>
          </table:table-cell>
          <table:table-cell office:value-type="float" office:value="0.531933695712617" calcext:value-type="float">
            <text:p>0.531933695712617</text:p>
          </table:table-cell>
          <table:table-cell office:value-type="float" office:value="0.00960058357750505" calcext:value-type="float">
            <text:p>0.009600583577505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198889040" calcext:value-type="float">
            <text:p>3198889040</text:p>
          </table:table-cell>
          <table:table-cell office:value-type="float" office:value="36789627168" calcext:value-type="float">
            <text:p>36789627168</text:p>
          </table:table-cell>
          <table:table-cell office:value-type="float" office:value="0.544769" calcext:value-type="float">
            <text:p>5.45E-01</text:p>
          </table:table-cell>
          <table:table-cell/>
          <table:table-cell office:value-type="float" office:value="54.036009" calcext:value-type="float">
            <text:p>54.036009</text:p>
          </table:table-cell>
          <table:table-cell office:value-type="float" office:value="2.67429" calcext:value-type="float">
            <text:p>2.67429</text:p>
          </table:table-cell>
          <table:table-cell office:value-type="float" office:value="17.516532" calcext:value-type="float">
            <text:p>17.516532</text:p>
          </table:table-cell>
          <table:table-cell office:value-type="float" office:value="17.381953" calcext:value-type="float">
            <text:p>17.381953</text:p>
          </table:table-cell>
          <table:table-cell office:value-type="float" office:value="1.407981" calcext:value-type="float">
            <text:p>1.407981</text:p>
          </table:table-cell>
          <table:table-cell office:value-type="float" office:value="2.277761" calcext:value-type="float">
            <text:p>2.277761</text:p>
          </table:table-cell>
          <table:table-cell office:value-type="float" office:value="11.56904" calcext:value-type="float">
            <text:p>11.56904</text:p>
          </table:table-cell>
          <table:table-cell/>
          <table:table-cell office:value-type="float" office:value="10.695785" calcext:value-type="float">
            <text:p>10.695785</text:p>
          </table:table-cell>
          <table:table-cell office:value-type="float" office:value="0.524778244468784" calcext:value-type="float">
            <text:p>0.524778244468784</text:p>
          </table:table-cell>
          <table:table-cell office:value-type="float" office:value="0.0112211691424757" calcext:value-type="float">
            <text:p>0.01122116914247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59746477" calcext:value-type="float">
            <text:p>2959746477</text:p>
          </table:table-cell>
          <table:table-cell office:value-type="float" office:value="31227060816" calcext:value-type="float">
            <text:p>31227060816</text:p>
          </table:table-cell>
          <table:table-cell office:value-type="float" office:value="0.527329" calcext:value-type="float">
            <text:p>5.27E-01</text:p>
          </table:table-cell>
          <table:table-cell/>
          <table:table-cell office:value-type="float" office:value="54.564747" calcext:value-type="float">
            <text:p>54.564747</text:p>
          </table:table-cell>
          <table:table-cell office:value-type="float" office:value="3.003944" calcext:value-type="float">
            <text:p>3.003944</text:p>
          </table:table-cell>
          <table:table-cell office:value-type="float" office:value="17.250654" calcext:value-type="float">
            <text:p>17.250654</text:p>
          </table:table-cell>
          <table:table-cell office:value-type="float" office:value="17.088693" calcext:value-type="float">
            <text:p>17.088693</text:p>
          </table:table-cell>
          <table:table-cell office:value-type="float" office:value="1.69205" calcext:value-type="float">
            <text:p>1.69205</text:p>
          </table:table-cell>
          <table:table-cell office:value-type="float" office:value="2.732251" calcext:value-type="float">
            <text:p>2.732251</text:p>
          </table:table-cell>
          <table:table-cell office:value-type="float" office:value="11.468669" calcext:value-type="float">
            <text:p>11.468669</text:p>
          </table:table-cell>
          <table:table-cell/>
          <table:table-cell office:value-type="float" office:value="11.437886" calcext:value-type="float">
            <text:p>11.437886</text:p>
          </table:table-cell>
          <table:table-cell office:value-type="float" office:value="0.565849105968579" calcext:value-type="float">
            <text:p>0.565849105968579</text:p>
          </table:table-cell>
          <table:table-cell office:value-type="float" office:value="0.00962447892324542" calcext:value-type="float">
            <text:p>0.009624478923245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88549800" calcext:value-type="float">
            <text:p>2688549800</text:p>
          </table:table-cell>
          <table:table-cell office:value-type="float" office:value="25804427400" calcext:value-type="float">
            <text:p>25804427400</text:p>
          </table:table-cell>
          <table:table-cell office:value-type="float" office:value="0.496521" calcext:value-type="float">
            <text:p>4.97E-01</text:p>
          </table:table-cell>
          <table:table-cell/>
          <table:table-cell office:value-type="float" office:value="53.28714" calcext:value-type="float">
            <text:p>53.28714</text:p>
          </table:table-cell>
          <table:table-cell office:value-type="float" office:value="2.872731" calcext:value-type="float">
            <text:p>2.872731</text:p>
          </table:table-cell>
          <table:table-cell office:value-type="float" office:value="17.107109" calcext:value-type="float">
            <text:p>17.107109</text:p>
          </table:table-cell>
          <table:table-cell office:value-type="float" office:value="16.876248" calcext:value-type="float">
            <text:p>16.876248</text:p>
          </table:table-cell>
          <table:table-cell office:value-type="float" office:value="1.575051" calcext:value-type="float">
            <text:p>1.575051</text:p>
          </table:table-cell>
          <table:table-cell office:value-type="float" office:value="2.59735" calcext:value-type="float">
            <text:p>2.59735</text:p>
          </table:table-cell>
          <table:table-cell office:value-type="float" office:value="11.116117" calcext:value-type="float">
            <text:p>11.116117</text:p>
          </table:table-cell>
          <table:table-cell/>
          <table:table-cell office:value-type="float" office:value="10.348297" calcext:value-type="float">
            <text:p>10.348297</text:p>
          </table:table-cell>
          <table:table-cell office:value-type="float" office:value="0.464408284807229" calcext:value-type="float">
            <text:p>0.464408284807229</text:p>
          </table:table-cell>
          <table:table-cell office:value-type="float" office:value="0.00968729913773438" calcext:value-type="float">
            <text:p>0.009687299137734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95850391" calcext:value-type="float">
            <text:p>2395850391</text:p>
          </table:table-cell>
          <table:table-cell office:value-type="float" office:value="20321505792" calcext:value-type="float">
            <text:p>20321505792</text:p>
          </table:table-cell>
          <table:table-cell office:value-type="float" office:value="0.469106" calcext:value-type="float">
            <text:p>4.69E-01</text:p>
          </table:table-cell>
          <table:table-cell/>
          <table:table-cell office:value-type="float" office:value="52.451421" calcext:value-type="float">
            <text:p>52.451421</text:p>
          </table:table-cell>
          <table:table-cell office:value-type="float" office:value="2.854683" calcext:value-type="float">
            <text:p>2.854683</text:p>
          </table:table-cell>
          <table:table-cell office:value-type="float" office:value="16.890978" calcext:value-type="float">
            <text:p>16.890978</text:p>
          </table:table-cell>
          <table:table-cell office:value-type="float" office:value="16.382525" calcext:value-type="float">
            <text:p>16.382525</text:p>
          </table:table-cell>
          <table:table-cell office:value-type="float" office:value="1.549987" calcext:value-type="float">
            <text:p>1.549987</text:p>
          </table:table-cell>
          <table:table-cell office:value-type="float" office:value="2.586202" calcext:value-type="float">
            <text:p>2.586202</text:p>
          </table:table-cell>
          <table:table-cell office:value-type="float" office:value="10.855652" calcext:value-type="float">
            <text:p>10.855652</text:p>
          </table:table-cell>
          <table:table-cell/>
          <table:table-cell office:value-type="float" office:value="9.598227" calcext:value-type="float">
            <text:p>9.598227</text:p>
          </table:table-cell>
          <table:table-cell office:value-type="float" office:value="0.419864960567877" calcext:value-type="float">
            <text:p>0.419864960567877</text:p>
          </table:table-cell>
          <table:table-cell office:value-type="float" office:value="0.0119679928235171" calcext:value-type="float">
            <text:p>0.01196799282351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52968045" calcext:value-type="float">
            <text:p>2052968045</text:p>
          </table:table-cell>
          <table:table-cell office:value-type="float" office:value="14929061184" calcext:value-type="float">
            <text:p>14929061184</text:p>
          </table:table-cell>
          <table:table-cell office:value-type="float" office:value="0.4255" calcext:value-type="float">
            <text:p>4.26E-01</text:p>
          </table:table-cell>
          <table:table-cell/>
          <table:table-cell office:value-type="float" office:value="51.631349" calcext:value-type="float">
            <text:p>51.631349</text:p>
          </table:table-cell>
          <table:table-cell office:value-type="float" office:value="3.172061" calcext:value-type="float">
            <text:p>3.172061</text:p>
          </table:table-cell>
          <table:table-cell office:value-type="float" office:value="16.515197" calcext:value-type="float">
            <text:p>16.515197</text:p>
          </table:table-cell>
          <table:table-cell office:value-type="float" office:value="15.771562" calcext:value-type="float">
            <text:p>15.771562</text:p>
          </table:table-cell>
          <table:table-cell office:value-type="float" office:value="1.636212" calcext:value-type="float">
            <text:p>1.636212</text:p>
          </table:table-cell>
          <table:table-cell office:value-type="float" office:value="2.757318" calcext:value-type="float">
            <text:p>2.757318</text:p>
          </table:table-cell>
          <table:table-cell office:value-type="float" office:value="10.364317" calcext:value-type="float">
            <text:p>10.364317</text:p>
          </table:table-cell>
          <table:table-cell/>
          <table:table-cell office:value-type="float" office:value="9.704287" calcext:value-type="float">
            <text:p>9.704287</text:p>
          </table:table-cell>
          <table:table-cell office:value-type="float" office:value="0.4264120933056" calcext:value-type="float">
            <text:p>0.4264120933056</text:p>
          </table:table-cell>
          <table:table-cell office:value-type="float" office:value="0.0123642758696138" calcext:value-type="float">
            <text:p>0.01236427586961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0381892" calcext:value-type="float">
            <text:p>1650381892</text:p>
          </table:table-cell>
          <table:table-cell office:value-type="float" office:value="9733471200" calcext:value-type="float">
            <text:p>9733471200</text:p>
          </table:table-cell>
          <table:table-cell office:value-type="float" office:value="0.373719" calcext:value-type="float">
            <text:p>3.74E-01</text:p>
          </table:table-cell>
          <table:table-cell/>
          <table:table-cell office:value-type="float" office:value="49.695152" calcext:value-type="float">
            <text:p>49.695152</text:p>
          </table:table-cell>
          <table:table-cell office:value-type="float" office:value="3.542086" calcext:value-type="float">
            <text:p>3.542086</text:p>
          </table:table-cell>
          <table:table-cell office:value-type="float" office:value="16.114218" calcext:value-type="float">
            <text:p>16.114218</text:p>
          </table:table-cell>
          <table:table-cell office:value-type="float" office:value="15.572048" calcext:value-type="float">
            <text:p>15.572048</text:p>
          </table:table-cell>
          <table:table-cell office:value-type="float" office:value="1.64741" calcext:value-type="float">
            <text:p>1.64741</text:p>
          </table:table-cell>
          <table:table-cell office:value-type="float" office:value="2.826884" calcext:value-type="float">
            <text:p>2.826884</text:p>
          </table:table-cell>
          <table:table-cell office:value-type="float" office:value="8.98635" calcext:value-type="float">
            <text:p>8.98635</text:p>
          </table:table-cell>
          <table:table-cell/>
          <table:table-cell office:value-type="float" office:value="8.203066" calcext:value-type="float">
            <text:p>8.203066</text:p>
          </table:table-cell>
          <table:table-cell office:value-type="float" office:value="0.320311650594436" calcext:value-type="float">
            <text:p>0.320311650594436</text:p>
          </table:table-cell>
          <table:table-cell office:value-type="float" office:value="0.012550598463125" calcext:value-type="float">
            <text:p>0.012550598463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9005550" calcext:value-type="float">
            <text:p>1079005550</text:p>
          </table:table-cell>
          <table:table-cell office:value-type="float" office:value="4600696752" calcext:value-type="float">
            <text:p>4600696752</text:p>
          </table:table-cell>
          <table:table-cell office:value-type="float" office:value="0.294777" calcext:value-type="float">
            <text:p>2.95E-01</text:p>
          </table:table-cell>
          <table:table-cell/>
          <table:table-cell office:value-type="float" office:value="45.932607" calcext:value-type="float">
            <text:p>45.932607</text:p>
          </table:table-cell>
          <table:table-cell office:value-type="float" office:value="3.994159" calcext:value-type="float">
            <text:p>3.994159</text:p>
          </table:table-cell>
          <table:table-cell office:value-type="float" office:value="15.191576" calcext:value-type="float">
            <text:p>15.191576</text:p>
          </table:table-cell>
          <table:table-cell office:value-type="float" office:value="14.174142" calcext:value-type="float">
            <text:p>14.174142</text:p>
          </table:table-cell>
          <table:table-cell office:value-type="float" office:value="2.125916" calcext:value-type="float">
            <text:p>2.125916</text:p>
          </table:table-cell>
          <table:table-cell office:value-type="float" office:value="3.378669" calcext:value-type="float">
            <text:p>3.378669</text:p>
          </table:table-cell>
          <table:table-cell office:value-type="float" office:value="5.737814" calcext:value-type="float">
            <text:p>5.737814</text:p>
          </table:table-cell>
          <table:table-cell/>
          <table:table-cell office:value-type="float" office:value="8.182129" calcext:value-type="float">
            <text:p>8.182129</text:p>
          </table:table-cell>
          <table:table-cell office:value-type="float" office:value="0.281823012773946" calcext:value-type="float">
            <text:p>0.281823012773946</text:p>
          </table:table-cell>
          <table:table-cell office:value-type="float" office:value="0.00963117325738331" calcext:value-type="float">
            <text:p>0.009631173257383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4991637" calcext:value-type="float">
            <text:p>654991637</text:p>
          </table:table-cell>
          <table:table-cell office:value-type="float" office:value="2228051520" calcext:value-type="float">
            <text:p>2228051520</text:p>
          </table:table-cell>
          <table:table-cell office:value-type="float" office:value="0.223246" calcext:value-type="float">
            <text:p>2.23E-01</text:p>
          </table:table-cell>
          <table:table-cell/>
          <table:table-cell office:value-type="float" office:value="44.142013" calcext:value-type="float">
            <text:p>44.142013</text:p>
          </table:table-cell>
          <table:table-cell office:value-type="float" office:value="4.585837" calcext:value-type="float">
            <text:p>4.585837</text:p>
          </table:table-cell>
          <table:table-cell office:value-type="float" office:value="14.549363" calcext:value-type="float">
            <text:p>14.549363</text:p>
          </table:table-cell>
          <table:table-cell office:value-type="float" office:value="13.682983" calcext:value-type="float">
            <text:p>13.682983</text:p>
          </table:table-cell>
          <table:table-cell office:value-type="float" office:value="3.255177" calcext:value-type="float">
            <text:p>3.255177</text:p>
          </table:table-cell>
          <table:table-cell office:value-type="float" office:value="3.551924" calcext:value-type="float">
            <text:p>3.551924</text:p>
          </table:table-cell>
          <table:table-cell office:value-type="float" office:value="3.113213" calcext:value-type="float">
            <text:p>3.113213</text:p>
          </table:table-cell>
          <table:table-cell/>
          <table:table-cell office:value-type="float" office:value="7.637332" calcext:value-type="float">
            <text:p>7.637332</text:p>
          </table:table-cell>
          <table:table-cell office:value-type="float" office:value="0.179479287671851" calcext:value-type="float">
            <text:p>0.179479287671851</text:p>
          </table:table-cell>
          <table:table-cell office:value-type="float" office:value="0.00171911821397521" calcext:value-type="float">
            <text:p>0.00171911821397521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78359055" calcext:value-type="float">
            <text:p>4478359055</text:p>
          </table:table-cell>
          <table:table-cell office:value-type="float" office:value="122598514836" calcext:value-type="float">
            <text:p>122598514836</text:p>
          </table:table-cell>
          <table:table-cell office:value-type="float" office:value="0.773185" calcext:value-type="float">
            <text:p>7.73E-01</text:p>
          </table:table-cell>
          <table:table-cell/>
          <table:table-cell office:value-type="float" office:value="65.03489" calcext:value-type="float">
            <text:p>65.03489</text:p>
          </table:table-cell>
          <table:table-cell office:value-type="float" office:value="2.60699" calcext:value-type="float">
            <text:p>2.60699</text:p>
          </table:table-cell>
          <table:table-cell office:value-type="float" office:value="19.123269" calcext:value-type="float">
            <text:p>19.123269</text:p>
          </table:table-cell>
          <table:table-cell office:value-type="float" office:value="25.188756" calcext:value-type="float">
            <text:p>25.188756</text:p>
          </table:table-cell>
          <table:table-cell office:value-type="float" office:value="1.372482" calcext:value-type="float">
            <text:p>1.372482</text:p>
          </table:table-cell>
          <table:table-cell office:value-type="float" office:value="2.096532" calcext:value-type="float">
            <text:p>2.096532</text:p>
          </table:table-cell>
          <table:table-cell office:value-type="float" office:value="13.589155" calcext:value-type="float">
            <text:p>13.589155</text:p>
          </table:table-cell>
          <table:table-cell/>
          <table:table-cell office:value-type="float" office:value="17.855785" calcext:value-type="float">
            <text:p>17.855785</text:p>
          </table:table-cell>
          <table:table-cell office:value-type="float" office:value="0.775792891135226" calcext:value-type="float">
            <text:p>0.775792891135226</text:p>
          </table:table-cell>
          <table:table-cell office:value-type="float" office:value="0.00730469158982036" calcext:value-type="float">
            <text:p>0.007304691589820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446046939" calcext:value-type="float">
            <text:p>4446046939</text:p>
          </table:table-cell>
          <table:table-cell office:value-type="float" office:value="119689458840" calcext:value-type="float">
            <text:p>119689458840</text:p>
          </table:table-cell>
          <table:table-cell office:value-type="float" office:value="0.770893" calcext:value-type="float">
            <text:p>7.71E-01</text:p>
          </table:table-cell>
          <table:table-cell/>
          <table:table-cell office:value-type="float" office:value="64.164743" calcext:value-type="float">
            <text:p>64.164743</text:p>
          </table:table-cell>
          <table:table-cell office:value-type="float" office:value="2.535303" calcext:value-type="float">
            <text:p>2.535303</text:p>
          </table:table-cell>
          <table:table-cell office:value-type="float" office:value="19.048763" calcext:value-type="float">
            <text:p>19.048763</text:p>
          </table:table-cell>
          <table:table-cell office:value-type="float" office:value="24.758496" calcext:value-type="float">
            <text:p>24.758496</text:p>
          </table:table-cell>
          <table:table-cell office:value-type="float" office:value="1.298268" calcext:value-type="float">
            <text:p>1.298268</text:p>
          </table:table-cell>
          <table:table-cell office:value-type="float" office:value="2.062089" calcext:value-type="float">
            <text:p>2.062089</text:p>
          </table:table-cell>
          <table:table-cell office:value-type="float" office:value="13.361411" calcext:value-type="float">
            <text:p>13.361411</text:p>
          </table:table-cell>
          <table:table-cell/>
          <table:table-cell office:value-type="float" office:value="16.916569" calcext:value-type="float">
            <text:p>16.916569</text:p>
          </table:table-cell>
          <table:table-cell office:value-type="float" office:value="0.75961192222469" calcext:value-type="float">
            <text:p>0.75961192222469</text:p>
          </table:table-cell>
          <table:table-cell office:value-type="float" office:value="0.00643960402223315" calcext:value-type="float">
            <text:p>0.006439604022233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404270987" calcext:value-type="float">
            <text:p>4404270987</text:p>
          </table:table-cell>
          <table:table-cell office:value-type="float" office:value="116729095428" calcext:value-type="float">
            <text:p>116729095428</text:p>
          </table:table-cell>
          <table:table-cell office:value-type="float" office:value="0.76853" calcext:value-type="float">
            <text:p>7.69E-01</text:p>
          </table:table-cell>
          <table:table-cell/>
          <table:table-cell office:value-type="float" office:value="65.221689" calcext:value-type="float">
            <text:p>65.221689</text:p>
          </table:table-cell>
          <table:table-cell office:value-type="float" office:value="2.729802" calcext:value-type="float">
            <text:p>2.729802</text:p>
          </table:table-cell>
          <table:table-cell office:value-type="float" office:value="19.067204" calcext:value-type="float">
            <text:p>19.067204</text:p>
          </table:table-cell>
          <table:table-cell office:value-type="float" office:value="24.659391" calcext:value-type="float">
            <text:p>24.659391</text:p>
          </table:table-cell>
          <table:table-cell office:value-type="float" office:value="1.826833" calcext:value-type="float">
            <text:p>1.826833</text:p>
          </table:table-cell>
          <table:table-cell office:value-type="float" office:value="2.321277" calcext:value-type="float">
            <text:p>2.321277</text:p>
          </table:table-cell>
          <table:table-cell office:value-type="float" office:value="13.505755" calcext:value-type="float">
            <text:p>13.505755</text:p>
          </table:table-cell>
          <table:table-cell/>
          <table:table-cell office:value-type="float" office:value="18.023832" calcext:value-type="float">
            <text:p>18.023832</text:p>
          </table:table-cell>
          <table:table-cell office:value-type="float" office:value="0.793652467796478" calcext:value-type="float">
            <text:p>0.793652467796478</text:p>
          </table:table-cell>
          <table:table-cell office:value-type="float" office:value="0.00762456904125568" calcext:value-type="float">
            <text:p>0.00762456904125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277723615" calcext:value-type="float">
            <text:p>4277723615</text:p>
          </table:table-cell>
          <table:table-cell office:value-type="float" office:value="107724668904" calcext:value-type="float">
            <text:p>107724668904</text:p>
          </table:table-cell>
          <table:table-cell office:value-type="float" office:value="0.757782" calcext:value-type="float">
            <text:p>7.58E-01</text:p>
          </table:table-cell>
          <table:table-cell/>
          <table:table-cell office:value-type="float" office:value="63.698436" calcext:value-type="float">
            <text:p>63.698436</text:p>
          </table:table-cell>
          <table:table-cell office:value-type="float" office:value="2.685548" calcext:value-type="float">
            <text:p>2.685548</text:p>
          </table:table-cell>
          <table:table-cell office:value-type="float" office:value="18.915271" calcext:value-type="float">
            <text:p>18.915271</text:p>
          </table:table-cell>
          <table:table-cell office:value-type="float" office:value="24.187121" calcext:value-type="float">
            <text:p>24.187121</text:p>
          </table:table-cell>
          <table:table-cell office:value-type="float" office:value="1.380308" calcext:value-type="float">
            <text:p>1.380308</text:p>
          </table:table-cell>
          <table:table-cell office:value-type="float" office:value="2.142704" calcext:value-type="float">
            <text:p>2.142704</text:p>
          </table:table-cell>
          <table:table-cell office:value-type="float" office:value="13.225561" calcext:value-type="float">
            <text:p>13.225561</text:p>
          </table:table-cell>
          <table:table-cell/>
          <table:table-cell office:value-type="float" office:value="16.116949" calcext:value-type="float">
            <text:p>16.116949</text:p>
          </table:table-cell>
          <table:table-cell office:value-type="float" office:value="0.772174101283261" calcext:value-type="float">
            <text:p>0.772174101283261</text:p>
          </table:table-cell>
          <table:table-cell office:value-type="float" office:value="0.00812135008380813" calcext:value-type="float">
            <text:p>0.008121350083808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124686854" calcext:value-type="float">
            <text:p>4124686854</text:p>
          </table:table-cell>
          <table:table-cell office:value-type="float" office:value="98953941240" calcext:value-type="float">
            <text:p>98953941240</text:p>
          </table:table-cell>
          <table:table-cell office:value-type="float" office:value="0.746141" calcext:value-type="float">
            <text:p>7.46E-01</text:p>
          </table:table-cell>
          <table:table-cell/>
          <table:table-cell office:value-type="float" office:value="62.833652" calcext:value-type="float">
            <text:p>62.833652</text:p>
          </table:table-cell>
          <table:table-cell office:value-type="float" office:value="2.463824" calcext:value-type="float">
            <text:p>2.463824</text:p>
          </table:table-cell>
          <table:table-cell office:value-type="float" office:value="18.929203" calcext:value-type="float">
            <text:p>18.929203</text:p>
          </table:table-cell>
          <table:table-cell office:value-type="float" office:value="24.419398" calcext:value-type="float">
            <text:p>24.419398</text:p>
          </table:table-cell>
          <table:table-cell office:value-type="float" office:value="1.149372" calcext:value-type="float">
            <text:p>1.149372</text:p>
          </table:table-cell>
          <table:table-cell office:value-type="float" office:value="1.834037" calcext:value-type="float">
            <text:p>1.834037</text:p>
          </table:table-cell>
          <table:table-cell office:value-type="float" office:value="12.879966" calcext:value-type="float">
            <text:p>12.879966</text:p>
          </table:table-cell>
          <table:table-cell/>
          <table:table-cell office:value-type="float" office:value="15.583276" calcext:value-type="float">
            <text:p>15.583276</text:p>
          </table:table-cell>
          <table:table-cell office:value-type="float" office:value="0.704202456532135" calcext:value-type="float">
            <text:p>0.704202456532135</text:p>
          </table:table-cell>
          <table:table-cell office:value-type="float" office:value="0.00918601538915043" calcext:value-type="float">
            <text:p>0.009186015389150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01186618" calcext:value-type="float">
            <text:p>4001186618</text:p>
          </table:table-cell>
          <table:table-cell office:value-type="float" office:value="90132362496" calcext:value-type="float">
            <text:p>90132362496</text:p>
          </table:table-cell>
          <table:table-cell office:value-type="float" office:value="0.734604" calcext:value-type="float">
            <text:p>7.35E-01</text:p>
          </table:table-cell>
          <table:table-cell/>
          <table:table-cell office:value-type="float" office:value="62.394515" calcext:value-type="float">
            <text:p>62.394515</text:p>
          </table:table-cell>
          <table:table-cell office:value-type="float" office:value="2.524511" calcext:value-type="float">
            <text:p>2.524511</text:p>
          </table:table-cell>
          <table:table-cell office:value-type="float" office:value="18.79545" calcext:value-type="float">
            <text:p>18.79545</text:p>
          </table:table-cell>
          <table:table-cell office:value-type="float" office:value="23.983912" calcext:value-type="float">
            <text:p>23.983912</text:p>
          </table:table-cell>
          <table:table-cell office:value-type="float" office:value="1.204316" calcext:value-type="float">
            <text:p>1.204316</text:p>
          </table:table-cell>
          <table:table-cell office:value-type="float" office:value="1.929329" calcext:value-type="float">
            <text:p>1.929329</text:p>
          </table:table-cell>
          <table:table-cell office:value-type="float" office:value="12.950369" calcext:value-type="float">
            <text:p>12.950369</text:p>
          </table:table-cell>
          <table:table-cell/>
          <table:table-cell office:value-type="float" office:value="15.082009" calcext:value-type="float">
            <text:p>15.082009</text:p>
          </table:table-cell>
          <table:table-cell office:value-type="float" office:value="0.704991090470695" calcext:value-type="float">
            <text:p>0.704991090470695</text:p>
          </table:table-cell>
          <table:table-cell office:value-type="float" office:value="0.00942498412723011" calcext:value-type="float">
            <text:p>0.009424984127230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34324069" calcext:value-type="float">
            <text:p>3834324069</text:p>
          </table:table-cell>
          <table:table-cell office:value-type="float" office:value="81398719368" calcext:value-type="float">
            <text:p>81398719368</text:p>
          </table:table-cell>
          <table:table-cell office:value-type="float" office:value="0.724944" calcext:value-type="float">
            <text:p>7.25E-01</text:p>
          </table:table-cell>
          <table:table-cell/>
          <table:table-cell office:value-type="float" office:value="63.903965" calcext:value-type="float">
            <text:p>63.903965</text:p>
          </table:table-cell>
          <table:table-cell office:value-type="float" office:value="2.786681" calcext:value-type="float">
            <text:p>2.786681</text:p>
          </table:table-cell>
          <table:table-cell office:value-type="float" office:value="18.696324" calcext:value-type="float">
            <text:p>18.696324</text:p>
          </table:table-cell>
          <table:table-cell office:value-type="float" office:value="24.54779" calcext:value-type="float">
            <text:p>24.54779</text:p>
          </table:table-cell>
          <table:table-cell office:value-type="float" office:value="1.524855" calcext:value-type="float">
            <text:p>1.524855</text:p>
          </table:table-cell>
          <table:table-cell office:value-type="float" office:value="2.303878" calcext:value-type="float">
            <text:p>2.303878</text:p>
          </table:table-cell>
          <table:table-cell office:value-type="float" office:value="12.793197" calcext:value-type="float">
            <text:p>12.793197</text:p>
          </table:table-cell>
          <table:table-cell/>
          <table:table-cell office:value-type="float" office:value="17.01463" calcext:value-type="float">
            <text:p>17.01463</text:p>
          </table:table-cell>
          <table:table-cell office:value-type="float" office:value="0.741978365681387" calcext:value-type="float">
            <text:p>0.741978365681387</text:p>
          </table:table-cell>
          <table:table-cell office:value-type="float" office:value="0.00895994495089219" calcext:value-type="float">
            <text:p>0.008959944950892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668686222" calcext:value-type="float">
            <text:p>3668686222</text:p>
          </table:table-cell>
          <table:table-cell office:value-type="float" office:value="72673671096" calcext:value-type="float">
            <text:p>72673671096</text:p>
          </table:table-cell>
          <table:table-cell office:value-type="float" office:value="0.709823" calcext:value-type="float">
            <text:p>7.10E-01</text:p>
          </table:table-cell>
          <table:table-cell/>
          <table:table-cell office:value-type="float" office:value="61.694161" calcext:value-type="float">
            <text:p>61.694161</text:p>
          </table:table-cell>
          <table:table-cell office:value-type="float" office:value="2.733567" calcext:value-type="float">
            <text:p>2.733567</text:p>
          </table:table-cell>
          <table:table-cell office:value-type="float" office:value="18.622548" calcext:value-type="float">
            <text:p>18.622548</text:p>
          </table:table-cell>
          <table:table-cell office:value-type="float" office:value="23.04582" calcext:value-type="float">
            <text:p>23.04582</text:p>
          </table:table-cell>
          <table:table-cell office:value-type="float" office:value="1.327384" calcext:value-type="float">
            <text:p>1.327384</text:p>
          </table:table-cell>
          <table:table-cell office:value-type="float" office:value="2.18294" calcext:value-type="float">
            <text:p>2.18294</text:p>
          </table:table-cell>
          <table:table-cell office:value-type="float" office:value="12.580032" calcext:value-type="float">
            <text:p>12.580032</text:p>
          </table:table-cell>
          <table:table-cell/>
          <table:table-cell office:value-type="float" office:value="16.083011" calcext:value-type="float">
            <text:p>16.083011</text:p>
          </table:table-cell>
          <table:table-cell office:value-type="float" office:value="0.711851363434674" calcext:value-type="float">
            <text:p>0.711851363434674</text:p>
          </table:table-cell>
          <table:table-cell office:value-type="float" office:value="0.00883115552162929" calcext:value-type="float">
            <text:p>0.008831155521629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493673339" calcext:value-type="float">
            <text:p>3493673339</text:p>
          </table:table-cell>
          <table:table-cell office:value-type="float" office:value="63945462132" calcext:value-type="float">
            <text:p>63945462132</text:p>
          </table:table-cell>
          <table:table-cell office:value-type="float" office:value="0.693271" calcext:value-type="float">
            <text:p>6.93E-01</text:p>
          </table:table-cell>
          <table:table-cell/>
          <table:table-cell office:value-type="float" office:value="61.452105" calcext:value-type="float">
            <text:p>61.452105</text:p>
          </table:table-cell>
          <table:table-cell office:value-type="float" office:value="2.672497" calcext:value-type="float">
            <text:p>2.672497</text:p>
          </table:table-cell>
          <table:table-cell office:value-type="float" office:value="18.565623" calcext:value-type="float">
            <text:p>18.565623</text:p>
          </table:table-cell>
          <table:table-cell office:value-type="float" office:value="23.057358" calcext:value-type="float">
            <text:p>23.057358</text:p>
          </table:table-cell>
          <table:table-cell office:value-type="float" office:value="1.503263" calcext:value-type="float">
            <text:p>1.503263</text:p>
          </table:table-cell>
          <table:table-cell office:value-type="float" office:value="2.364161" calcext:value-type="float">
            <text:p>2.364161</text:p>
          </table:table-cell>
          <table:table-cell office:value-type="float" office:value="12.323401" calcext:value-type="float">
            <text:p>12.323401</text:p>
          </table:table-cell>
          <table:table-cell/>
          <table:table-cell office:value-type="float" office:value="16.65919" calcext:value-type="float">
            <text:p>16.65919</text:p>
          </table:table-cell>
          <table:table-cell office:value-type="float" office:value="0.679702895804157" calcext:value-type="float">
            <text:p>0.679702895804157</text:p>
          </table:table-cell>
          <table:table-cell office:value-type="float" office:value="0.00899239907489315" calcext:value-type="float">
            <text:p>0.008992399074893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22674149" calcext:value-type="float">
            <text:p>3222674149</text:p>
          </table:table-cell>
          <table:table-cell office:value-type="float" office:value="55296488160" calcext:value-type="float">
            <text:p>55296488160</text:p>
          </table:table-cell>
          <table:table-cell office:value-type="float" office:value="0.679627" calcext:value-type="float">
            <text:p>6.80E-01</text:p>
          </table:table-cell>
          <table:table-cell/>
          <table:table-cell office:value-type="float" office:value="60.923981" calcext:value-type="float">
            <text:p>60.923981</text:p>
          </table:table-cell>
          <table:table-cell office:value-type="float" office:value="2.701312" calcext:value-type="float">
            <text:p>2.701312</text:p>
          </table:table-cell>
          <table:table-cell office:value-type="float" office:value="18.44827" calcext:value-type="float">
            <text:p>18.44827</text:p>
          </table:table-cell>
          <table:table-cell office:value-type="float" office:value="22.88835" calcext:value-type="float">
            <text:p>22.88835</text:p>
          </table:table-cell>
          <table:table-cell office:value-type="float" office:value="1.372496" calcext:value-type="float">
            <text:p>1.372496</text:p>
          </table:table-cell>
          <table:table-cell office:value-type="float" office:value="2.225729" calcext:value-type="float">
            <text:p>2.225729</text:p>
          </table:table-cell>
          <table:table-cell office:value-type="float" office:value="12.210443" calcext:value-type="float">
            <text:p>12.210443</text:p>
          </table:table-cell>
          <table:table-cell/>
          <table:table-cell office:value-type="float" office:value="16.174423" calcext:value-type="float">
            <text:p>16.174423</text:p>
          </table:table-cell>
          <table:table-cell office:value-type="float" office:value="0.660272433340561" calcext:value-type="float">
            <text:p>0.660272433340561</text:p>
          </table:table-cell>
          <table:table-cell office:value-type="float" office:value="0.00953094933750393" calcext:value-type="float">
            <text:p>0.009530949337503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11103496" calcext:value-type="float">
            <text:p>3111103496</text:p>
          </table:table-cell>
          <table:table-cell office:value-type="float" office:value="49338275472" calcext:value-type="float">
            <text:p>49338275472</text:p>
          </table:table-cell>
          <table:table-cell office:value-type="float" office:value="0.665342" calcext:value-type="float">
            <text:p>6.65E-01</text:p>
          </table:table-cell>
          <table:table-cell/>
          <table:table-cell office:value-type="float" office:value="55.948346" calcext:value-type="float">
            <text:p>55.948346</text:p>
          </table:table-cell>
          <table:table-cell office:value-type="float" office:value="2.226955" calcext:value-type="float">
            <text:p>2.226955</text:p>
          </table:table-cell>
          <table:table-cell office:value-type="float" office:value="18.353007" calcext:value-type="float">
            <text:p>18.353007</text:p>
          </table:table-cell>
          <table:table-cell office:value-type="float" office:value="18.243941" calcext:value-type="float">
            <text:p>18.243941</text:p>
          </table:table-cell>
          <table:table-cell office:value-type="float" office:value="1.577584" calcext:value-type="float">
            <text:p>1.577584</text:p>
          </table:table-cell>
          <table:table-cell office:value-type="float" office:value="2.474552" calcext:value-type="float">
            <text:p>2.474552</text:p>
          </table:table-cell>
          <table:table-cell office:value-type="float" office:value="11.923164" calcext:value-type="float">
            <text:p>11.923164</text:p>
          </table:table-cell>
          <table:table-cell/>
          <table:table-cell office:value-type="float" office:value="10.515053" calcext:value-type="float">
            <text:p>10.515053</text:p>
          </table:table-cell>
          <table:table-cell office:value-type="float" office:value="0.656023269167204" calcext:value-type="float">
            <text:p>0.656023269167204</text:p>
          </table:table-cell>
          <table:table-cell office:value-type="float" office:value="0.008100274748538" calcext:value-type="float">
            <text:p>0.0081002747485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914947971" calcext:value-type="float">
            <text:p>2914947971</text:p>
          </table:table-cell>
          <table:table-cell office:value-type="float" office:value="43648085952" calcext:value-type="float">
            <text:p>43648085952</text:p>
          </table:table-cell>
          <table:table-cell office:value-type="float" office:value="0.653094" calcext:value-type="float">
            <text:p>6.53E-01</text:p>
          </table:table-cell>
          <table:table-cell/>
          <table:table-cell office:value-type="float" office:value="55.07201" calcext:value-type="float">
            <text:p>55.07201</text:p>
          </table:table-cell>
          <table:table-cell office:value-type="float" office:value="2.175663" calcext:value-type="float">
            <text:p>2.175663</text:p>
          </table:table-cell>
          <table:table-cell office:value-type="float" office:value="18.19496" calcext:value-type="float">
            <text:p>18.19496</text:p>
          </table:table-cell>
          <table:table-cell office:value-type="float" office:value="18.15843" calcext:value-type="float">
            <text:p>18.15843</text:p>
          </table:table-cell>
          <table:table-cell office:value-type="float" office:value="1.287022" calcext:value-type="float">
            <text:p>1.287022</text:p>
          </table:table-cell>
          <table:table-cell office:value-type="float" office:value="2.063005" calcext:value-type="float">
            <text:p>2.063005</text:p>
          </table:table-cell>
          <table:table-cell office:value-type="float" office:value="11.894279" calcext:value-type="float">
            <text:p>11.894279</text:p>
          </table:table-cell>
          <table:table-cell/>
          <table:table-cell office:value-type="float" office:value="9.177164" calcext:value-type="float">
            <text:p>9.177164</text:p>
          </table:table-cell>
          <table:table-cell office:value-type="float" office:value="0.608560593547403" calcext:value-type="float">
            <text:p>0.608560593547403</text:p>
          </table:table-cell>
          <table:table-cell office:value-type="float" office:value="0.00802708429807782" calcext:value-type="float">
            <text:p>0.008027084298077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25093680" calcext:value-type="float">
            <text:p>2725093680</text:p>
          </table:table-cell>
          <table:table-cell office:value-type="float" office:value="37961076384" calcext:value-type="float">
            <text:p>37961076384</text:p>
          </table:table-cell>
          <table:table-cell office:value-type="float" office:value="0.634655" calcext:value-type="float">
            <text:p>6.35E-01</text:p>
          </table:table-cell>
          <table:table-cell/>
          <table:table-cell office:value-type="float" office:value="54.331182" calcext:value-type="float">
            <text:p>54.331182</text:p>
          </table:table-cell>
          <table:table-cell office:value-type="float" office:value="2.232708" calcext:value-type="float">
            <text:p>2.232708</text:p>
          </table:table-cell>
          <table:table-cell office:value-type="float" office:value="18.032511" calcext:value-type="float">
            <text:p>18.032511</text:p>
          </table:table-cell>
          <table:table-cell office:value-type="float" office:value="17.452322" calcext:value-type="float">
            <text:p>17.452322</text:p>
          </table:table-cell>
          <table:table-cell office:value-type="float" office:value="1.389306" calcext:value-type="float">
            <text:p>1.389306</text:p>
          </table:table-cell>
          <table:table-cell office:value-type="float" office:value="2.206849" calcext:value-type="float">
            <text:p>2.206849</text:p>
          </table:table-cell>
          <table:table-cell office:value-type="float" office:value="11.728693" calcext:value-type="float">
            <text:p>11.728693</text:p>
          </table:table-cell>
          <table:table-cell/>
          <table:table-cell office:value-type="float" office:value="10.024462" calcext:value-type="float">
            <text:p>10.024462</text:p>
          </table:table-cell>
          <table:table-cell office:value-type="float" office:value="0.604822945643185" calcext:value-type="float">
            <text:p>0.604822945643185</text:p>
          </table:table-cell>
          <table:table-cell office:value-type="float" office:value="0.00884227445652038" calcext:value-type="float">
            <text:p>0.008842274456520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27150940" calcext:value-type="float">
            <text:p>2527150940</text:p>
          </table:table-cell>
          <table:table-cell office:value-type="float" office:value="32287498560" calcext:value-type="float">
            <text:p>32287498560</text:p>
          </table:table-cell>
          <table:table-cell office:value-type="float" office:value="0.617363" calcext:value-type="float">
            <text:p>6.17E-01</text:p>
          </table:table-cell>
          <table:table-cell/>
          <table:table-cell office:value-type="float" office:value="55.635066" calcext:value-type="float">
            <text:p>55.635066</text:p>
          </table:table-cell>
          <table:table-cell office:value-type="float" office:value="2.453774" calcext:value-type="float">
            <text:p>2.453774</text:p>
          </table:table-cell>
          <table:table-cell office:value-type="float" office:value="17.894956" calcext:value-type="float">
            <text:p>17.894956</text:p>
          </table:table-cell>
          <table:table-cell office:value-type="float" office:value="17.396003" calcext:value-type="float">
            <text:p>17.396003</text:p>
          </table:table-cell>
          <table:table-cell office:value-type="float" office:value="2.101697" calcext:value-type="float">
            <text:p>2.101697</text:p>
          </table:table-cell>
          <table:table-cell office:value-type="float" office:value="2.901534" calcext:value-type="float">
            <text:p>2.901534</text:p>
          </table:table-cell>
          <table:table-cell office:value-type="float" office:value="11.823223" calcext:value-type="float">
            <text:p>11.823223</text:p>
          </table:table-cell>
          <table:table-cell/>
          <table:table-cell office:value-type="float" office:value="12.659063" calcext:value-type="float">
            <text:p>12.659063</text:p>
          </table:table-cell>
          <table:table-cell office:value-type="float" office:value="0.639079332017732" calcext:value-type="float">
            <text:p>0.639079332017732</text:p>
          </table:table-cell>
          <table:table-cell office:value-type="float" office:value="0.00856733168286414" calcext:value-type="float">
            <text:p>0.008567331682864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83969127" calcext:value-type="float">
            <text:p>2283969127</text:p>
          </table:table-cell>
          <table:table-cell office:value-type="float" office:value="26722384560" calcext:value-type="float">
            <text:p>26722384560</text:p>
          </table:table-cell>
          <table:table-cell office:value-type="float" office:value="0.591219" calcext:value-type="float">
            <text:p>5.91E-01</text:p>
          </table:table-cell>
          <table:table-cell/>
          <table:table-cell office:value-type="float" office:value="59.322568" calcext:value-type="float">
            <text:p>59.322568</text:p>
          </table:table-cell>
          <table:table-cell office:value-type="float" office:value="2.982173" calcext:value-type="float">
            <text:p>2.982173</text:p>
          </table:table-cell>
          <table:table-cell office:value-type="float" office:value="17.774745" calcext:value-type="float">
            <text:p>17.774745</text:p>
          </table:table-cell>
          <table:table-cell office:value-type="float" office:value="21.176382" calcext:value-type="float">
            <text:p>21.176382</text:p>
          </table:table-cell>
          <table:table-cell office:value-type="float" office:value="1.689305" calcext:value-type="float">
            <text:p>1.689305</text:p>
          </table:table-cell>
          <table:table-cell office:value-type="float" office:value="3.07154" calcext:value-type="float">
            <text:p>3.07154</text:p>
          </table:table-cell>
          <table:table-cell office:value-type="float" office:value="11.443335" calcext:value-type="float">
            <text:p>11.443335</text:p>
          </table:table-cell>
          <table:table-cell/>
          <table:table-cell office:value-type="float" office:value="18.461431" calcext:value-type="float">
            <text:p>18.461431</text:p>
          </table:table-cell>
          <table:table-cell office:value-type="float" office:value="0.60210275693116" calcext:value-type="float">
            <text:p>0.60210275693116</text:p>
          </table:table-cell>
          <table:table-cell office:value-type="float" office:value="0.0084682641595952" calcext:value-type="float">
            <text:p>0.00846826415959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42999932" calcext:value-type="float">
            <text:p>2042999932</text:p>
          </table:table-cell>
          <table:table-cell office:value-type="float" office:value="21047572512" calcext:value-type="float">
            <text:p>21047572512</text:p>
          </table:table-cell>
          <table:table-cell office:value-type="float" office:value="0.566205" calcext:value-type="float">
            <text:p>5.66E-01</text:p>
          </table:table-cell>
          <table:table-cell/>
          <table:table-cell office:value-type="float" office:value="52.93272" calcext:value-type="float">
            <text:p>52.93272</text:p>
          </table:table-cell>
          <table:table-cell office:value-type="float" office:value="2.467288" calcext:value-type="float">
            <text:p>2.467288</text:p>
          </table:table-cell>
          <table:table-cell office:value-type="float" office:value="17.384909" calcext:value-type="float">
            <text:p>17.384909</text:p>
          </table:table-cell>
          <table:table-cell office:value-type="float" office:value="16.86313" calcext:value-type="float">
            <text:p>16.86313</text:p>
          </table:table-cell>
          <table:table-cell office:value-type="float" office:value="1.506477" calcext:value-type="float">
            <text:p>1.506477</text:p>
          </table:table-cell>
          <table:table-cell office:value-type="float" office:value="2.440244" calcext:value-type="float">
            <text:p>2.440244</text:p>
          </table:table-cell>
          <table:table-cell office:value-type="float" office:value="10.947132" calcext:value-type="float">
            <text:p>10.947132</text:p>
          </table:table-cell>
          <table:table-cell/>
          <table:table-cell office:value-type="float" office:value="10.30022" calcext:value-type="float">
            <text:p>10.30022</text:p>
          </table:table-cell>
          <table:table-cell office:value-type="float" office:value="0.547529643502219" calcext:value-type="float">
            <text:p>0.547529643502219</text:p>
          </table:table-cell>
          <table:table-cell office:value-type="float" office:value="0.00755352434792023" calcext:value-type="float">
            <text:p>0.007553524347920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89865326" calcext:value-type="float">
            <text:p>1689865326</text:p>
          </table:table-cell>
          <table:table-cell office:value-type="float" office:value="15591763008" calcext:value-type="float">
            <text:p>15591763008</text:p>
          </table:table-cell>
          <table:table-cell office:value-type="float" office:value="0.531677" calcext:value-type="float">
            <text:p>5.32E-01</text:p>
          </table:table-cell>
          <table:table-cell/>
          <table:table-cell office:value-type="float" office:value="52.14003" calcext:value-type="float">
            <text:p>52.14003</text:p>
          </table:table-cell>
          <table:table-cell office:value-type="float" office:value="2.640019" calcext:value-type="float">
            <text:p>2.640019</text:p>
          </table:table-cell>
          <table:table-cell office:value-type="float" office:value="17.276475" calcext:value-type="float">
            <text:p>17.276475</text:p>
          </table:table-cell>
          <table:table-cell office:value-type="float" office:value="16.063729" calcext:value-type="float">
            <text:p>16.063729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2.863716" calcext:value-type="float">
            <text:p>2.863716</text:p>
          </table:table-cell>
          <table:table-cell office:value-type="float" office:value="10.440016" calcext:value-type="float">
            <text:p>10.440016</text:p>
          </table:table-cell>
          <table:table-cell/>
          <table:table-cell office:value-type="float" office:value="10.940507" calcext:value-type="float">
            <text:p>10.940507</text:p>
          </table:table-cell>
          <table:table-cell office:value-type="float" office:value="0.541301902265531" calcext:value-type="float">
            <text:p>0.541301902265531</text:p>
          </table:table-cell>
          <table:table-cell office:value-type="float" office:value="0.00751081199222025" calcext:value-type="float">
            <text:p>0.00751081199222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58802079" calcext:value-type="float">
            <text:p>1358802079</text:p>
          </table:table-cell>
          <table:table-cell office:value-type="float" office:value="10182860928" calcext:value-type="float">
            <text:p>10182860928</text:p>
          </table:table-cell>
          <table:table-cell office:value-type="float" office:value="0.4863" calcext:value-type="float">
            <text:p>4.86E-01</text:p>
          </table:table-cell>
          <table:table-cell/>
          <table:table-cell office:value-type="float" office:value="64.266712" calcext:value-type="float">
            <text:p>64.266712</text:p>
          </table:table-cell>
          <table:table-cell office:value-type="float" office:value="3.390809" calcext:value-type="float">
            <text:p>3.390809</text:p>
          </table:table-cell>
          <table:table-cell office:value-type="float" office:value="20.814762" calcext:value-type="float">
            <text:p>20.814762</text:p>
          </table:table-cell>
          <table:table-cell office:value-type="float" office:value="20.062109" calcext:value-type="float">
            <text:p>20.062109</text:p>
          </table:table-cell>
          <table:table-cell office:value-type="float" office:value="2.772719" calcext:value-type="float">
            <text:p>2.772719</text:p>
          </table:table-cell>
          <table:table-cell office:value-type="float" office:value="3.208454" calcext:value-type="float">
            <text:p>3.208454</text:p>
          </table:table-cell>
          <table:table-cell office:value-type="float" office:value="10.902736" calcext:value-type="float">
            <text:p>10.902736</text:p>
          </table:table-cell>
          <table:table-cell/>
          <table:table-cell office:value-type="float" office:value="24.579643" calcext:value-type="float">
            <text:p>24.579643</text:p>
          </table:table-cell>
          <table:table-cell office:value-type="float" office:value="0.504157944126203" calcext:value-type="float">
            <text:p>0.504157944126203</text:p>
          </table:table-cell>
          <table:table-cell office:value-type="float" office:value="0.00931754911392984" calcext:value-type="float">
            <text:p>0.009317549113929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9079216" calcext:value-type="float">
            <text:p>859079216</text:p>
          </table:table-cell>
          <table:table-cell office:value-type="float" office:value="4878380664" calcext:value-type="float">
            <text:p>4878380664</text:p>
          </table:table-cell>
          <table:table-cell office:value-type="float" office:value="0.413062" calcext:value-type="float">
            <text:p>4.13E-01</text:p>
          </table:table-cell>
          <table:table-cell/>
          <table:table-cell office:value-type="float" office:value="46.133698" calcext:value-type="float">
            <text:p>46.133698</text:p>
          </table:table-cell>
          <table:table-cell office:value-type="float" office:value="3.750475" calcext:value-type="float">
            <text:p>3.750475</text:p>
          </table:table-cell>
          <table:table-cell office:value-type="float" office:value="16.615509" calcext:value-type="float">
            <text:p>16.615509</text:p>
          </table:table-cell>
          <table:table-cell office:value-type="float" office:value="14.138769" calcext:value-type="float">
            <text:p>14.138769</text:p>
          </table:table-cell>
          <table:table-cell office:value-type="float" office:value="1.743804" calcext:value-type="float">
            <text:p>1.743804</text:p>
          </table:table-cell>
          <table:table-cell office:value-type="float" office:value="3.027483" calcext:value-type="float">
            <text:p>3.027483</text:p>
          </table:table-cell>
          <table:table-cell office:value-type="float" office:value="5.756622" calcext:value-type="float">
            <text:p>5.756622</text:p>
          </table:table-cell>
          <table:table-cell/>
          <table:table-cell office:value-type="float" office:value="10.071833" calcext:value-type="float">
            <text:p>10.071833</text:p>
          </table:table-cell>
          <table:table-cell office:value-type="float" office:value="0.390314206585557" calcext:value-type="float">
            <text:p>0.390314206585557</text:p>
          </table:table-cell>
          <table:table-cell office:value-type="float" office:value="0.00446325640856708" calcext:value-type="float">
            <text:p>0.004463256408567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6174566" calcext:value-type="float">
            <text:p>526174566</text:p>
          </table:table-cell>
          <table:table-cell office:value-type="float" office:value="2353788396" calcext:value-type="float">
            <text:p>2353788396</text:p>
          </table:table-cell>
          <table:table-cell office:value-type="float" office:value="0.33455" calcext:value-type="float">
            <text:p>3.35E-01</text:p>
          </table:table-cell>
          <table:table-cell/>
          <table:table-cell office:value-type="float" office:value="43.713071" calcext:value-type="float">
            <text:p>43.713071</text:p>
          </table:table-cell>
          <table:table-cell office:value-type="float" office:value="3.436905" calcext:value-type="float">
            <text:p>3.436905</text:p>
          </table:table-cell>
          <table:table-cell office:value-type="float" office:value="15.357805" calcext:value-type="float">
            <text:p>15.357805</text:p>
          </table:table-cell>
          <table:table-cell office:value-type="float" office:value="13.720891" calcext:value-type="float">
            <text:p>13.720891</text:p>
          </table:table-cell>
          <table:table-cell office:value-type="float" office:value="2.994277" calcext:value-type="float">
            <text:p>2.994277</text:p>
          </table:table-cell>
          <table:table-cell office:value-type="float" office:value="3.504196" calcext:value-type="float">
            <text:p>3.504196</text:p>
          </table:table-cell>
          <table:table-cell office:value-type="float" office:value="3.588987" calcext:value-type="float">
            <text:p>3.588987</text:p>
          </table:table-cell>
          <table:table-cell/>
          <table:table-cell office:value-type="float" office:value="9.902046" calcext:value-type="float">
            <text:p>9.902046</text:p>
          </table:table-cell>
          <table:table-cell office:value-type="float" office:value="0.342522071679339" calcext:value-type="float">
            <text:p>0.342522071679339</text:p>
          </table:table-cell>
          <table:table-cell office:value-type="float" office:value="0.00212789707635412" calcext:value-type="float">
            <text:p>0.0021278970763541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548" calcext:value-type="float">
            <text:p>1548</text:p>
          </table:table-cell>
          <table:table-cell/>
          <table:table-cell table:formula="of:=[.I25]" office:value-type="float" office:value="44.142013" calcext:value-type="float">
            <text:p>44.142013</text:p>
          </table:table-cell>
          <table:table-cell/>
          <table:table-cell table:formula="of:=[.A52]/[.A$71]" office:value-type="float" office:value="43" calcext:value-type="float">
            <text:p>43</text:p>
          </table:table-cell>
          <table:table-cell table:formula="of:=[.E6]/[.E$25]" office:value-type="float" office:value="7.62598993763946" calcext:value-type="float">
            <text:p>7.62598993763946</text:p>
          </table:table-cell>
          <table:table-cell table:style-name="Default" table:formula="of:=[.F6]/[.F$25]" office:value-type="float" office:value="53.8565851170264" calcext:value-type="float">
            <text:p>53.8565851170264</text:p>
          </table:table-cell>
          <table:table-cell/>
          <table:table-cell table:formula="of:=[.F29]/[.F$48]" office:value-type="float" office:value="52.0856144266589" calcext:value-type="float">
            <text:p>52.0856144266589</text:p>
          </table:table-cell>
          <table:table-cell/>
          <table:table-cell table:formula="of:=SUM([.J6:.O6])" office:value-type="float" office:value="62.488359" calcext:value-type="float">
            <text:p>62.488359</text:p>
          </table:table-cell>
          <table:table-cell/>
          <table:table-cell table:formula="of:=[.J6] / [.$K52]" office:value-type="float" office:value="0.0455829060897567" calcext:value-type="float">
            <text:p>0.0455829060897567</text:p>
          </table:table-cell>
          <table:table-cell table:formula="of:=[.K6] / [.$K52]" office:value-type="float" office:value="0.298537428387262" calcext:value-type="float">
            <text:p>0.298537428387262</text:p>
          </table:table-cell>
          <table:table-cell table:formula="of:=[.L6] / [.$K52]" office:value-type="float" office:value="0.390794483817378" calcext:value-type="float">
            <text:p>0.390794483817378</text:p>
          </table:table-cell>
          <table:table-cell table:formula="of:=[.M6] / [.$K52]" office:value-type="float" office:value="0.0204423195046617" calcext:value-type="float">
            <text:p>0.0204423195046617</text:p>
          </table:table-cell>
          <table:table-cell table:formula="of:=[.N6] / [.$K52]" office:value-type="float" office:value="0.0315792098173037" calcext:value-type="float">
            <text:p>0.0315792098173037</text:p>
          </table:table-cell>
          <table:table-cell table:formula="of:=[.O6] / [.$K52]" office:value-type="float" office:value="0.213063652383638" calcext:value-type="float">
            <text:p>0.213063652383638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9 iterations, starting with 1 graphs having 17 nodes" calcext:value-type="string">
            <text:p>for 9 iterations, starting with 1 graphs having 17 nodes</text:p>
          </table:table-cell>
        </table:table-row>
        <table:table-row table:style-name="ro1">
          <table:table-cell table:formula="of:=[.A7]*[.B7]*[.C7]" office:value-type="float" office:value="1512" calcext:value-type="float">
            <text:p>1512</text:p>
          </table:table-cell>
          <table:table-cell/>
          <table:table-cell table:formula="of:=[.C52]" office:value-type="float" office:value="44.142013" calcext:value-type="float">
            <text:p>44.142013</text:p>
          </table:table-cell>
          <table:table-cell/>
          <table:table-cell table:formula="of:=[.A53]/[.A$71]" office:value-type="float" office:value="42" calcext:value-type="float">
            <text:p>42</text:p>
          </table:table-cell>
          <table:table-cell table:formula="of:=[.E7]/[.E$25]" office:value-type="float" office:value="7.56242365427331" calcext:value-type="float">
            <text:p>7.56242365427331</text:p>
          </table:table-cell>
          <table:table-cell table:style-name="Default" table:formula="of:=[.F7]/[.F$25]" office:value-type="float" office:value="52.5724236681924" calcext:value-type="float">
            <text:p>52.5724236681924</text:p>
          </table:table-cell>
          <table:table-cell/>
          <table:table-cell table:formula="of:=[.F30]/[.F$48]" office:value-type="float" office:value="50.849710638135" calcext:value-type="float">
            <text:p>50.849710638135</text:p>
          </table:table-cell>
          <table:table-cell/>
          <table:table-cell table:formula="of:=SUM([.J7:.O7])" office:value-type="float" office:value="62.511756" calcext:value-type="float">
            <text:p>62.511756</text:p>
          </table:table-cell>
          <table:table-cell/>
          <table:table-cell table:formula="of:=[.J7] / [.$K53]" office:value-type="float" office:value="0.0458635012588672" calcext:value-type="float">
            <text:p>0.0458635012588672</text:p>
          </table:table-cell>
          <table:table-cell table:formula="of:=[.K7] / [.$K53]" office:value-type="float" office:value="0.297054557226004" calcext:value-type="float">
            <text:p>0.297054557226004</text:p>
          </table:table-cell>
          <table:table-cell table:formula="of:=[.L7] / [.$K53]" office:value-type="float" office:value="0.391576729983397" calcext:value-type="float">
            <text:p>0.391576729983397</text:p>
          </table:table-cell>
          <table:table-cell table:formula="of:=[.M7] / [.$K53]" office:value-type="float" office:value="0.0219488155155968" calcext:value-type="float">
            <text:p>0.0219488155155968</text:p>
          </table:table-cell>
          <table:table-cell table:formula="of:=[.N7] / [.$K53]" office:value-type="float" office:value="0.0336402803978183" calcext:value-type="float">
            <text:p>0.0336402803978183</text:p>
          </table:table-cell>
          <table:table-cell table:formula="of:=[.O7] / [.$K53]" office:value-type="float" office:value="0.209916115618317" calcext:value-type="float">
            <text:p>0.209916115618317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476" calcext:value-type="float">
            <text:p>1476</text:p>
          </table:table-cell>
          <table:table-cell/>
          <table:table-cell table:formula="of:=[.C53]" office:value-type="float" office:value="44.142013" calcext:value-type="float">
            <text:p>44.142013</text:p>
          </table:table-cell>
          <table:table-cell/>
          <table:table-cell table:formula="of:=[.A54]/[.A$71]" office:value-type="float" office:value="41" calcext:value-type="float">
            <text:p>41</text:p>
          </table:table-cell>
          <table:table-cell table:formula="of:=[.E8]/[.E$25]" office:value-type="float" office:value="7.54891910169534" calcext:value-type="float">
            <text:p>7.54891910169534</text:p>
          </table:table-cell>
          <table:table-cell table:style-name="Default" table:formula="of:=[.F8]/[.F$25]" office:value-type="float" office:value="51.2402889660289" calcext:value-type="float">
            <text:p>51.2402889660289</text:p>
          </table:table-cell>
          <table:table-cell/>
          <table:table-cell table:formula="of:=[.F31]/[.F$48]" office:value-type="float" office:value="49.592009046509" calcext:value-type="float">
            <text:p>49.592009046509</text:p>
          </table:table-cell>
          <table:table-cell/>
          <table:table-cell table:formula="of:=SUM([.J8:.O8])" office:value-type="float" office:value="62.991444" calcext:value-type="float">
            <text:p>62.991444</text:p>
          </table:table-cell>
          <table:table-cell/>
          <table:table-cell table:formula="of:=[.J8] / [.$K54]" office:value-type="float" office:value="0.0484204330988189" calcext:value-type="float">
            <text:p>0.0484204330988189</text:p>
          </table:table-cell>
          <table:table-cell table:formula="of:=[.K8] / [.$K54]" office:value-type="float" office:value="0.294372010268569" calcext:value-type="float">
            <text:p>0.294372010268569</text:p>
          </table:table-cell>
          <table:table-cell table:formula="of:=[.L8] / [.$K54]" office:value-type="float" office:value="0.384381250253606" calcext:value-type="float">
            <text:p>0.384381250253606</text:p>
          </table:table-cell>
          <table:table-cell table:formula="of:=[.M8] / [.$K54]" office:value-type="float" office:value="0.0234566300782055" calcext:value-type="float">
            <text:p>0.0234566300782055</text:p>
          </table:table-cell>
          <table:table-cell table:formula="of:=[.N8] / [.$K54]" office:value-type="float" office:value="0.0358058786523452" calcext:value-type="float">
            <text:p>0.0358058786523452</text:p>
          </table:table-cell>
          <table:table-cell table:formula="of:=[.O8] / [.$K54]" office:value-type="float" office:value="0.213563797648455" calcext:value-type="float">
            <text:p>0.213563797648455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368" calcext:value-type="float">
            <text:p>1368</text:p>
          </table:table-cell>
          <table:table-cell/>
          <table:table-cell table:formula="of:=[.C54]" office:value-type="float" office:value="44.142013" calcext:value-type="float">
            <text:p>44.142013</text:p>
          </table:table-cell>
          <table:table-cell/>
          <table:table-cell table:formula="of:=[.A55]/[.A$71]" office:value-type="float" office:value="38" calcext:value-type="float">
            <text:p>38</text:p>
          </table:table-cell>
          <table:table-cell table:formula="of:=[.E9]/[.E$25]" office:value-type="float" office:value="7.32054331710498" calcext:value-type="float">
            <text:p>7.32054331710498</text:p>
          </table:table-cell>
          <table:table-cell table:style-name="Default" table:formula="of:=[.F9]/[.F$25]" office:value-type="float" office:value="47.2992181006658" calcext:value-type="float">
            <text:p>47.2992181006658</text:p>
          </table:table-cell>
          <table:table-cell/>
          <table:table-cell table:formula="of:=[.F32]/[.F$48]" office:value-type="float" office:value="45.7665052164698" calcext:value-type="float">
            <text:p>45.7665052164698</text:p>
          </table:table-cell>
          <table:table-cell/>
          <table:table-cell table:formula="of:=SUM([.J9:.O9])" office:value-type="float" office:value="61.365025" calcext:value-type="float">
            <text:p>61.365025</text:p>
          </table:table-cell>
          <table:table-cell/>
          <table:table-cell table:formula="of:=[.J9] / [.$K55]" office:value-type="float" office:value="0.0431809487570485" calcext:value-type="float">
            <text:p>0.0431809487570485</text:p>
          </table:table-cell>
          <table:table-cell table:formula="of:=[.K9] / [.$K55]" office:value-type="float" office:value="0.301383923497139" calcext:value-type="float">
            <text:p>0.301383923497139</text:p>
          </table:table-cell>
          <table:table-cell table:formula="of:=[.L9] / [.$K55]" office:value-type="float" office:value="0.401295167727871" calcext:value-type="float">
            <text:p>0.401295167727871</text:p>
          </table:table-cell>
          <table:table-cell table:formula="of:=[.M9] / [.$K55]" office:value-type="float" office:value="0.0170672789589836" calcext:value-type="float">
            <text:p>0.0170672789589836</text:p>
          </table:table-cell>
          <table:table-cell table:formula="of:=[.N9] / [.$K55]" office:value-type="float" office:value="0.0278775084015691" calcext:value-type="float">
            <text:p>0.0278775084015691</text:p>
          </table:table-cell>
          <table:table-cell table:formula="of:=[.O9] / [.$K55]" office:value-type="float" office:value="0.209195172657389" calcext:value-type="float">
            <text:p>0.209195172657389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260" calcext:value-type="float">
            <text:p>1260</text:p>
          </table:table-cell>
          <table:table-cell/>
          <table:table-cell table:formula="of:=[.C55]" office:value-type="float" office:value="44.142013" calcext:value-type="float">
            <text:p>44.142013</text:p>
          </table:table-cell>
          <table:table-cell/>
          <table:table-cell table:formula="of:=[.A56]/[.A$71]" office:value-type="float" office:value="35" calcext:value-type="float">
            <text:p>35</text:p>
          </table:table-cell>
          <table:table-cell table:formula="of:=[.E10]/[.E$25]" office:value-type="float" office:value="7.10908843863605" calcext:value-type="float">
            <text:p>7.10908843863605</text:p>
          </table:table-cell>
          <table:table-cell table:style-name="Default" table:formula="of:=[.F10]/[.F$25]" office:value-type="float" office:value="43.4139830752208" calcext:value-type="float">
            <text:p>43.4139830752208</text:p>
          </table:table-cell>
          <table:table-cell/>
          <table:table-cell table:formula="of:=[.F33]/[.F$48]" office:value-type="float" office:value="42.0402876520936" calcext:value-type="float">
            <text:p>42.0402876520936</text:p>
          </table:table-cell>
          <table:table-cell/>
          <table:table-cell table:formula="of:=SUM([.J10:.O10])" office:value-type="float" office:value="61.893151" calcext:value-type="float">
            <text:p>61.893151</text:p>
          </table:table-cell>
          <table:table-cell/>
          <table:table-cell table:formula="of:=[.J10] / [.$K56]" office:value-type="float" office:value="0.0444488922530378" calcext:value-type="float">
            <text:p>0.0444488922530378</text:p>
          </table:table-cell>
          <table:table-cell table:formula="of:=[.K10] / [.$K56]" office:value-type="float" office:value="0.2986252711548" calcext:value-type="float">
            <text:p>0.2986252711548</text:p>
          </table:table-cell>
          <table:table-cell table:formula="of:=[.L10] / [.$K56]" office:value-type="float" office:value="0.399093511978409" calcext:value-type="float">
            <text:p>0.399093511978409</text:p>
          </table:table-cell>
          <table:table-cell table:formula="of:=[.M10] / [.$K56]" office:value-type="float" office:value="0.0206012778376722" calcext:value-type="float">
            <text:p>0.0206012778376722</text:p>
          </table:table-cell>
          <table:table-cell table:formula="of:=[.N10] / [.$K56]" office:value-type="float" office:value="0.0325363463883104" calcext:value-type="float">
            <text:p>0.0325363463883104</text:p>
          </table:table-cell>
          <table:table-cell table:formula="of:=[.O10] / [.$K56]" office:value-type="float" office:value="0.20469470038777" calcext:value-type="float">
            <text:p>0.20469470038777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1152" calcext:value-type="float">
            <text:p>1152</text:p>
          </table:table-cell>
          <table:table-cell/>
          <table:table-cell table:formula="of:=[.C56]" office:value-type="float" office:value="44.142013" calcext:value-type="float">
            <text:p>44.142013</text:p>
          </table:table-cell>
          <table:table-cell/>
          <table:table-cell table:formula="of:=[.A57]/[.A$71]" office:value-type="float" office:value="32" calcext:value-type="float">
            <text:p>32</text:p>
          </table:table-cell>
          <table:table-cell table:formula="of:=[.E11]/[.E$25]" office:value-type="float" office:value="6.88590410964285" calcext:value-type="float">
            <text:p>6.88590410964285</text:p>
          </table:table-cell>
          <table:table-cell table:style-name="Default" table:formula="of:=[.F11]/[.F$25]" office:value-type="float" office:value="39.5454539579049" calcext:value-type="float">
            <text:p>39.5454539579049</text:p>
          </table:table-cell>
          <table:table-cell/>
          <table:table-cell table:formula="of:=[.F34]/[.F$48]" office:value-type="float" office:value="38.2924661576078" calcext:value-type="float">
            <text:p>38.2924661576078</text:p>
          </table:table-cell>
          <table:table-cell/>
          <table:table-cell table:formula="of:=SUM([.J11:.O11])" office:value-type="float" office:value="61.462018" calcext:value-type="float">
            <text:p>61.462018</text:p>
          </table:table-cell>
          <table:table-cell/>
          <table:table-cell table:formula="of:=[.J11] / [.$K57]" office:value-type="float" office:value="0.0469118342323222" calcext:value-type="float">
            <text:p>0.0469118342323222</text:p>
          </table:table-cell>
          <table:table-cell table:formula="of:=[.K11] / [.$K57]" office:value-type="float" office:value="0.299366366395584" calcext:value-type="float">
            <text:p>0.299366366395584</text:p>
          </table:table-cell>
          <table:table-cell table:formula="of:=[.L11] / [.$K57]" office:value-type="float" office:value="0.389513862040781" calcext:value-type="float">
            <text:p>0.389513862040781</text:p>
          </table:table-cell>
          <table:table-cell table:formula="of:=[.M11] / [.$K57]" office:value-type="float" office:value="0.02140071287604" calcext:value-type="float">
            <text:p>0.02140071287604</text:p>
          </table:table-cell>
          <table:table-cell table:formula="of:=[.N11] / [.$K57]" office:value-type="float" office:value="0.0337335165272315" calcext:value-type="float">
            <text:p>0.0337335165272315</text:p>
          </table:table-cell>
          <table:table-cell table:formula="of:=[.O11] / [.$K57]" office:value-type="float" office:value="0.209073707928041" calcext:value-type="float">
            <text:p>0.209073707928041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1044" calcext:value-type="float">
            <text:p>1044</text:p>
          </table:table-cell>
          <table:table-cell/>
          <table:table-cell table:formula="of:=[.C57]" office:value-type="float" office:value="44.142013" calcext:value-type="float">
            <text:p>44.142013</text:p>
          </table:table-cell>
          <table:table-cell/>
          <table:table-cell table:formula="of:=[.A58]/[.A$71]" office:value-type="float" office:value="29" calcext:value-type="float">
            <text:p>29</text:p>
          </table:table-cell>
          <table:table-cell table:formula="of:=[.E12]/[.E$25]" office:value-type="float" office:value="6.65568722368283" calcext:value-type="float">
            <text:p>6.65568722368283</text:p>
          </table:table-cell>
          <table:table-cell table:style-name="Default" table:formula="of:=[.F12]/[.F$25]" office:value-type="float" office:value="35.6693507482269" calcext:value-type="float">
            <text:p>35.6693507482269</text:p>
          </table:table-cell>
          <table:table-cell/>
          <table:table-cell table:formula="of:=[.F35]/[.F$48]" office:value-type="float" office:value="34.5820038480638" calcext:value-type="float">
            <text:p>34.5820038480638</text:p>
          </table:table-cell>
          <table:table-cell/>
          <table:table-cell table:formula="of:=SUM([.J12:.O12])" office:value-type="float" office:value="62.314401" calcext:value-type="float">
            <text:p>62.314401</text:p>
          </table:table-cell>
          <table:table-cell/>
          <table:table-cell table:formula="of:=[.J12] / [.$K58]" office:value-type="float" office:value="0.0483367400097451" calcext:value-type="float">
            <text:p>0.0483367400097451</text:p>
          </table:table-cell>
          <table:table-cell table:formula="of:=[.K12] / [.$K58]" office:value-type="float" office:value="0.294173220087601" calcext:value-type="float">
            <text:p>0.294173220087601</text:p>
          </table:table-cell>
          <table:table-cell table:formula="of:=[.L12] / [.$K58]" office:value-type="float" office:value="0.395656294601949" calcext:value-type="float">
            <text:p>0.395656294601949</text:p>
          </table:table-cell>
          <table:table-cell table:formula="of:=[.M12] / [.$K58]" office:value-type="float" office:value="0.0232581389974366" calcext:value-type="float">
            <text:p>0.0232581389974366</text:p>
          </table:table-cell>
          <table:table-cell table:formula="of:=[.N12] / [.$K58]" office:value-type="float" office:value="0.0360672326770821" calcext:value-type="float">
            <text:p>0.0360672326770821</text:p>
          </table:table-cell>
          <table:table-cell table:formula="of:=[.O12] / [.$K58]" office:value-type="float" office:value="0.202508373626186" calcext:value-type="float">
            <text:p>0.202508373626186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936" calcext:value-type="float">
            <text:p>936</text:p>
          </table:table-cell>
          <table:table-cell/>
          <table:table-cell table:formula="of:=[.C58]" office:value-type="float" office:value="44.142013" calcext:value-type="float">
            <text:p>44.142013</text:p>
          </table:table-cell>
          <table:table-cell/>
          <table:table-cell table:formula="of:=[.A59]/[.A$71]" office:value-type="float" office:value="26" calcext:value-type="float">
            <text:p>26</text:p>
          </table:table-cell>
          <table:table-cell table:formula="of:=[.E13]/[.E$25]" office:value-type="float" office:value="6.34937585470271" calcext:value-type="float">
            <text:p>6.34937585470271</text:p>
          </table:table-cell>
          <table:table-cell table:style-name="Default" table:formula="of:=[.F13]/[.F$25]" office:value-type="float" office:value="31.8287363193469" calcext:value-type="float">
            <text:p>31.8287363193469</text:p>
          </table:table-cell>
          <table:table-cell/>
          <table:table-cell table:formula="of:=[.F36]/[.F$48]" office:value-type="float" office:value="30.8751930375308" calcext:value-type="float">
            <text:p>30.8751930375308</text:p>
          </table:table-cell>
          <table:table-cell/>
          <table:table-cell table:formula="of:=SUM([.J13:.O13])" office:value-type="float" office:value="60.195644" calcext:value-type="float">
            <text:p>60.195644</text:p>
          </table:table-cell>
          <table:table-cell/>
          <table:table-cell table:formula="of:=[.J13] / [.$K59]" office:value-type="float" office:value="0.0485222651658981" calcext:value-type="float">
            <text:p>0.0485222651658981</text:p>
          </table:table-cell>
          <table:table-cell table:formula="of:=[.K13] / [.$K59]" office:value-type="float" office:value="0.303373662718851" calcext:value-type="float">
            <text:p>0.303373662718851</text:p>
          </table:table-cell>
          <table:table-cell table:formula="of:=[.L13] / [.$K59]" office:value-type="float" office:value="0.381799005256925" calcext:value-type="float">
            <text:p>0.381799005256925</text:p>
          </table:table-cell>
          <table:table-cell table:formula="of:=[.M13] / [.$K59]" office:value-type="float" office:value="0.022952674117084" calcext:value-type="float">
            <text:p>0.022952674117084</text:p>
          </table:table-cell>
          <table:table-cell table:formula="of:=[.N13] / [.$K59]" office:value-type="float" office:value="0.037155711798681" calcext:value-type="float">
            <text:p>0.037155711798681</text:p>
          </table:table-cell>
          <table:table-cell table:formula="of:=[.O13] / [.$K59]" office:value-type="float" office:value="0.206196680942561" calcext:value-type="float">
            <text:p>0.206196680942561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828" calcext:value-type="float">
            <text:p>828</text:p>
          </table:table-cell>
          <table:table-cell/>
          <table:table-cell table:formula="of:=[.C59]" office:value-type="float" office:value="44.142013" calcext:value-type="float">
            <text:p>44.142013</text:p>
          </table:table-cell>
          <table:table-cell/>
          <table:table-cell table:formula="of:=[.A60]/[.A$71]" office:value-type="float" office:value="23" calcext:value-type="float">
            <text:p>23</text:p>
          </table:table-cell>
          <table:table-cell table:formula="of:=[.E14]/[.E$25]" office:value-type="float" office:value="6.06422017873795" calcext:value-type="float">
            <text:p>6.06422017873795</text:p>
          </table:table-cell>
          <table:table-cell table:style-name="Default" table:formula="of:=[.F14]/[.F$25]" office:value-type="float" office:value="27.985031164809" calcext:value-type="float">
            <text:p>27.985031164809</text:p>
          </table:table-cell>
          <table:table-cell/>
          <table:table-cell table:formula="of:=[.F37]/[.F$48]" office:value-type="float" office:value="27.1670394164013" calcext:value-type="float">
            <text:p>27.1670394164013</text:p>
          </table:table-cell>
          <table:table-cell/>
          <table:table-cell table:formula="of:=SUM([.J14:.O14])" office:value-type="float" office:value="59.624232" calcext:value-type="float">
            <text:p>59.624232</text:p>
          </table:table-cell>
          <table:table-cell/>
          <table:table-cell table:formula="of:=[.J14] / [.$K60]" office:value-type="float" office:value="0.0480579607297919" calcext:value-type="float">
            <text:p>0.0480579607297919</text:p>
          </table:table-cell>
          <table:table-cell table:formula="of:=[.K14] / [.$K60]" office:value-type="float" office:value="0.303188693482878" calcext:value-type="float">
            <text:p>0.303188693482878</text:p>
          </table:table-cell>
          <table:table-cell table:formula="of:=[.L14] / [.$K60]" office:value-type="float" office:value="0.384895892663238" calcext:value-type="float">
            <text:p>0.384895892663238</text:p>
          </table:table-cell>
          <table:table-cell table:formula="of:=[.M14] / [.$K60]" office:value-type="float" office:value="0.0231359458013648" calcext:value-type="float">
            <text:p>0.0231359458013648</text:p>
          </table:table-cell>
          <table:table-cell table:formula="of:=[.N14] / [.$K60]" office:value-type="float" office:value="0.0373888589458058" calcext:value-type="float">
            <text:p>0.0373888589458058</text:p>
          </table:table-cell>
          <table:table-cell table:formula="of:=[.O14] / [.$K60]" office:value-type="float" office:value="0.203332648376922" calcext:value-type="float">
            <text:p>0.203332648376922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720" calcext:value-type="float">
            <text:p>720</text:p>
          </table:table-cell>
          <table:table-cell/>
          <table:table-cell table:formula="of:=[.C60]" office:value-type="float" office:value="44.142013" calcext:value-type="float">
            <text:p>44.142013</text:p>
          </table:table-cell>
          <table:table-cell/>
          <table:table-cell table:formula="of:=[.A61]/[.A$71]" office:value-type="float" office:value="20" calcext:value-type="float">
            <text:p>20</text:p>
          </table:table-cell>
          <table:table-cell table:formula="of:=[.E15]/[.E$25]" office:value-type="float" office:value="5.71617498224638" calcext:value-type="float">
            <text:p>5.71617498224638</text:p>
          </table:table-cell>
          <table:table-cell table:style-name="Default" table:formula="of:=[.F15]/[.F$25]" office:value-type="float" office:value="24.1421029976901" calcext:value-type="float">
            <text:p>24.1421029976901</text:p>
          </table:table-cell>
          <table:table-cell/>
          <table:table-cell table:formula="of:=[.F38]/[.F$48]" office:value-type="float" office:value="23.4925485459824" calcext:value-type="float">
            <text:p>23.4925485459824</text:p>
          </table:table-cell>
          <table:table-cell/>
          <table:table-cell table:formula="of:=SUM([.J15:.O15])" office:value-type="float" office:value="59.507413" calcext:value-type="float">
            <text:p>59.507413</text:p>
          </table:table-cell>
          <table:table-cell/>
          <table:table-cell table:formula="of:=[.J15] / [.$K61]" office:value-type="float" office:value="0.0500446557809529" calcext:value-type="float">
            <text:p>0.0500446557809529</text:p>
          </table:table-cell>
          <table:table-cell table:formula="of:=[.K15] / [.$K61]" office:value-type="float" office:value="0.302019918089869" calcext:value-type="float">
            <text:p>0.302019918089869</text:p>
          </table:table-cell>
          <table:table-cell table:formula="of:=[.L15] / [.$K61]" office:value-type="float" office:value="0.381554950137053" calcext:value-type="float">
            <text:p>0.381554950137053</text:p>
          </table:table-cell>
          <table:table-cell table:formula="of:=[.M15] / [.$K61]" office:value-type="float" office:value="0.0244052283032368" calcext:value-type="float">
            <text:p>0.0244052283032368</text:p>
          </table:table-cell>
          <table:table-cell table:formula="of:=[.N15] / [.$K61]" office:value-type="float" office:value="0.0388233479415413" calcext:value-type="float">
            <text:p>0.0388233479415413</text:p>
          </table:table-cell>
          <table:table-cell table:formula="of:=[.O15] / [.$K61]" office:value-type="float" office:value="0.203151899747347" calcext:value-type="float">
            <text:p>0.203151899747347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648" calcext:value-type="float">
            <text:p>648</text:p>
          </table:table-cell>
          <table:table-cell/>
          <table:table-cell table:formula="of:=[.C61]" office:value-type="float" office:value="44.142013" calcext:value-type="float">
            <text:p>44.142013</text:p>
          </table:table-cell>
          <table:table-cell/>
          <table:table-cell table:formula="of:=[.A62]/[.A$71]" office:value-type="float" office:value="18" calcext:value-type="float">
            <text:p>18</text:p>
          </table:table-cell>
          <table:table-cell table:formula="of:=[.E16]/[.E$25]" office:value-type="float" office:value="5.50315956476861" calcext:value-type="float">
            <text:p>5.50315956476861</text:p>
          </table:table-cell>
          <table:table-cell table:style-name="Default" table:formula="of:=[.F16]/[.F$25]" office:value-type="float" office:value="21.5297855302736" calcext:value-type="float">
            <text:p>21.5297855302736</text:p>
          </table:table-cell>
          <table:table-cell/>
          <table:table-cell table:formula="of:=[.F39]/[.F$48]" office:value-type="float" office:value="20.9612196048909" calcext:value-type="float">
            <text:p>20.9612196048909</text:p>
          </table:table-cell>
          <table:table-cell/>
          <table:table-cell table:formula="of:=SUM([.J16:.O16])" office:value-type="float" office:value="54.526536" calcext:value-type="float">
            <text:p>54.526536</text:p>
          </table:table-cell>
          <table:table-cell/>
          <table:table-cell table:formula="of:=[.J16] / [.$K62]" office:value-type="float" office:value="0.0473508348302192" calcext:value-type="float">
            <text:p>0.0473508348302192</text:p>
          </table:table-cell>
          <table:table-cell table:formula="of:=[.K16] / [.$K62]" office:value-type="float" office:value="0.324973623851697" calcext:value-type="float">
            <text:p>0.324973623851697</text:p>
          </table:table-cell>
          <table:table-cell table:formula="of:=[.L16] / [.$K62]" office:value-type="float" office:value="0.333597443270557" calcext:value-type="float">
            <text:p>0.333597443270557</text:p>
          </table:table-cell>
          <table:table-cell table:formula="of:=[.M16] / [.$K62]" office:value-type="float" office:value="0.0287682863257626" calcext:value-type="float">
            <text:p>0.0287682863257626</text:p>
          </table:table-cell>
          <table:table-cell table:formula="of:=[.N16] / [.$K62]" office:value-type="float" office:value="0.0464538220436376" calcext:value-type="float">
            <text:p>0.0464538220436376</text:p>
          </table:table-cell>
          <table:table-cell table:formula="of:=[.O16] / [.$K62]" office:value-type="float" office:value="0.218855989678127" calcext:value-type="float">
            <text:p>0.218855989678127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576" calcext:value-type="float">
            <text:p>576</text:p>
          </table:table-cell>
          <table:table-cell/>
          <table:table-cell table:formula="of:=[.C62]" office:value-type="float" office:value="44.142013" calcext:value-type="float">
            <text:p>44.142013</text:p>
          </table:table-cell>
          <table:table-cell/>
          <table:table-cell table:formula="of:=[.A63]/[.A$71]" office:value-type="float" office:value="16" calcext:value-type="float">
            <text:p>16</text:p>
          </table:table-cell>
          <table:table-cell table:formula="of:=[.E17]/[.E$25]" office:value-type="float" office:value="5.20394289095328" calcext:value-type="float">
            <text:p>5.20394289095328</text:p>
          </table:table-cell>
          <table:table-cell table:style-name="Default" table:formula="of:=[.F17]/[.F$25]" office:value-type="float" office:value="19.0140198984268" calcext:value-type="float">
            <text:p>19.0140198984268</text:p>
          </table:table-cell>
          <table:table-cell/>
          <table:table-cell table:formula="of:=[.F40]/[.F$48]" office:value-type="float" office:value="18.5437595096378" calcext:value-type="float">
            <text:p>18.5437595096378</text:p>
          </table:table-cell>
          <table:table-cell/>
          <table:table-cell table:formula="of:=SUM([.J17:.O17])" office:value-type="float" office:value="53.456115" calcext:value-type="float">
            <text:p>53.456115</text:p>
          </table:table-cell>
          <table:table-cell/>
          <table:table-cell table:formula="of:=[.J17] / [.$K63]" office:value-type="float" office:value="0.0479491261196217" calcext:value-type="float">
            <text:p>0.0479491261196217</text:p>
          </table:table-cell>
          <table:table-cell table:formula="of:=[.K17] / [.$K63]" office:value-type="float" office:value="0.329529895691073" calcext:value-type="float">
            <text:p>0.329529895691073</text:p>
          </table:table-cell>
          <table:table-cell table:formula="of:=[.L17] / [.$K63]" office:value-type="float" office:value="0.336724002483158" calcext:value-type="float">
            <text:p>0.336724002483158</text:p>
          </table:table-cell>
          <table:table-cell table:formula="of:=[.M17] / [.$K63]" office:value-type="float" office:value="0.0265607031113279" calcext:value-type="float">
            <text:p>0.0265607031113279</text:p>
          </table:table-cell>
          <table:table-cell table:formula="of:=[.N17] / [.$K63]" office:value-type="float" office:value="0.0424054385545975" calcext:value-type="float">
            <text:p>0.0424054385545975</text:p>
          </table:table-cell>
          <table:table-cell table:formula="of:=[.O17] / [.$K63]" office:value-type="float" office:value="0.216830834040222" calcext:value-type="float">
            <text:p>0.216830834040222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504" calcext:value-type="float">
            <text:p>504</text:p>
          </table:table-cell>
          <table:table-cell/>
          <table:table-cell table:formula="of:=[.C63]" office:value-type="float" office:value="44.142013" calcext:value-type="float">
            <text:p>44.142013</text:p>
          </table:table-cell>
          <table:table-cell/>
          <table:table-cell table:formula="of:=[.A64]/[.A$71]" office:value-type="float" office:value="14" calcext:value-type="float">
            <text:p>14</text:p>
          </table:table-cell>
          <table:table-cell table:formula="of:=[.E18]/[.E$25]" office:value-type="float" office:value="4.8838624179258" calcext:value-type="float">
            <text:p>4.8838624179258</text:p>
          </table:table-cell>
          <table:table-cell table:style-name="Default" table:formula="of:=[.F18]/[.F$25]" office:value-type="float" office:value="16.5120181637452" calcext:value-type="float">
            <text:p>16.5120181637452</text:p>
          </table:table-cell>
          <table:table-cell/>
          <table:table-cell table:formula="of:=[.F41]/[.F$48]" office:value-type="float" office:value="16.1276504075348" calcext:value-type="float">
            <text:p>16.1276504075348</text:p>
          </table:table-cell>
          <table:table-cell/>
          <table:table-cell table:formula="of:=SUM([.J18:.O18])" office:value-type="float" office:value="52.827557" calcext:value-type="float">
            <text:p>52.827557</text:p>
          </table:table-cell>
          <table:table-cell/>
          <table:table-cell table:formula="of:=[.J18] / [.$K64]" office:value-type="float" office:value="0.0506230110167691" calcext:value-type="float">
            <text:p>0.0506230110167691</text:p>
          </table:table-cell>
          <table:table-cell table:formula="of:=[.K18] / [.$K64]" office:value-type="float" office:value="0.331579444417617" calcext:value-type="float">
            <text:p>0.331579444417617</text:p>
          </table:table-cell>
          <table:table-cell table:formula="of:=[.L18] / [.$K64]" office:value-type="float" office:value="0.329031929301595" calcext:value-type="float">
            <text:p>0.329031929301595</text:p>
          </table:table-cell>
          <table:table-cell table:formula="of:=[.M18] / [.$K64]" office:value-type="float" office:value="0.0266523965891514" calcext:value-type="float">
            <text:p>0.0266523965891514</text:p>
          </table:table-cell>
          <table:table-cell table:formula="of:=[.N18] / [.$K64]" office:value-type="float" office:value="0.0431169096083697" calcext:value-type="float">
            <text:p>0.0431169096083697</text:p>
          </table:table-cell>
          <table:table-cell table:formula="of:=[.O18] / [.$K64]" office:value-type="float" office:value="0.218996309066497" calcext:value-type="float">
            <text:p>0.218996309066497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432" calcext:value-type="float">
            <text:p>432</text:p>
          </table:table-cell>
          <table:table-cell/>
          <table:table-cell table:formula="of:=[.C64]" office:value-type="float" office:value="44.142013" calcext:value-type="float">
            <text:p>44.142013</text:p>
          </table:table-cell>
          <table:table-cell/>
          <table:table-cell table:formula="of:=[.A65]/[.A$71]" office:value-type="float" office:value="12" calcext:value-type="float">
            <text:p>12</text:p>
          </table:table-cell>
          <table:table-cell table:formula="of:=[.E19]/[.E$25]" office:value-type="float" office:value="4.51875460663324" calcext:value-type="float">
            <text:p>4.51875460663324</text:p>
          </table:table-cell>
          <table:table-cell table:style-name="Default" table:formula="of:=[.F19]/[.F$25]" office:value-type="float" office:value="14.0154123617393" calcext:value-type="float">
            <text:p>14.0154123617393</text:p>
          </table:table-cell>
          <table:table-cell/>
          <table:table-cell table:formula="of:=[.F42]/[.F$48]" office:value-type="float" office:value="13.7172477419249" calcext:value-type="float">
            <text:p>13.7172477419249</text:p>
          </table:table-cell>
          <table:table-cell/>
          <table:table-cell table:formula="of:=SUM([.J19:.O19])" office:value-type="float" office:value="53.236261" calcext:value-type="float">
            <text:p>53.236261</text:p>
          </table:table-cell>
          <table:table-cell/>
          <table:table-cell table:formula="of:=[.J19] / [.$K65]" office:value-type="float" office:value="0.0564266525028871" calcext:value-type="float">
            <text:p>0.0564266525028871</text:p>
          </table:table-cell>
          <table:table-cell table:formula="of:=[.K19] / [.$K65]" office:value-type="float" office:value="0.324039548908215" calcext:value-type="float">
            <text:p>0.324039548908215</text:p>
          </table:table-cell>
          <table:table-cell table:formula="of:=[.L19] / [.$K65]" office:value-type="float" office:value="0.320997242837922" calcext:value-type="float">
            <text:p>0.320997242837922</text:p>
          </table:table-cell>
          <table:table-cell table:formula="of:=[.M19] / [.$K65]" office:value-type="float" office:value="0.0317837873700409" calcext:value-type="float">
            <text:p>0.0317837873700409</text:p>
          </table:table-cell>
          <table:table-cell table:formula="of:=[.N19] / [.$K65]" office:value-type="float" office:value="0.051323119781083" calcext:value-type="float">
            <text:p>0.051323119781083</text:p>
          </table:table-cell>
          <table:table-cell table:formula="of:=[.O19] / [.$K65]" office:value-type="float" office:value="0.215429648599852" calcext:value-type="float">
            <text:p>0.215429648599852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360" calcext:value-type="float">
            <text:p>360</text:p>
          </table:table-cell>
          <table:table-cell/>
          <table:table-cell table:formula="of:=[.C65]" office:value-type="float" office:value="44.142013" calcext:value-type="float">
            <text:p>44.142013</text:p>
          </table:table-cell>
          <table:table-cell/>
          <table:table-cell table:formula="of:=[.A66]/[.A$71]" office:value-type="float" office:value="10" calcext:value-type="float">
            <text:p>10</text:p>
          </table:table-cell>
          <table:table-cell table:formula="of:=[.E20]/[.E$25]" office:value-type="float" office:value="4.10470859187474" calcext:value-type="float">
            <text:p>4.10470859187474</text:p>
          </table:table-cell>
          <table:table-cell table:style-name="Default" table:formula="of:=[.F20]/[.F$25]" office:value-type="float" office:value="11.5816116316736" calcext:value-type="float">
            <text:p>11.5816116316736</text:p>
          </table:table-cell>
          <table:table-cell/>
          <table:table-cell table:formula="of:=[.F43]/[.F$48]" office:value-type="float" office:value="11.3529256093758" calcext:value-type="float">
            <text:p>11.3529256093758</text:p>
          </table:table-cell>
          <table:table-cell/>
          <table:table-cell table:formula="of:=SUM([.J20:.O20])" office:value-type="float" office:value="52.144606" calcext:value-type="float">
            <text:p>52.144606</text:p>
          </table:table-cell>
          <table:table-cell/>
          <table:table-cell table:formula="of:=[.J20] / [.$K66]" office:value-type="float" office:value="0.055091623474919" calcext:value-type="float">
            <text:p>0.055091623474919</text:p>
          </table:table-cell>
          <table:table-cell table:formula="of:=[.K20] / [.$K66]" office:value-type="float" office:value="0.328070539069755" calcext:value-type="float">
            <text:p>0.328070539069755</text:p>
          </table:table-cell>
          <table:table-cell table:formula="of:=[.L20] / [.$K66]" office:value-type="float" office:value="0.32364321632807" calcext:value-type="float">
            <text:p>0.32364321632807</text:p>
          </table:table-cell>
          <table:table-cell table:formula="of:=[.M20] / [.$K66]" office:value-type="float" office:value="0.0302054444519151" calcext:value-type="float">
            <text:p>0.0302054444519151</text:p>
          </table:table-cell>
          <table:table-cell table:formula="of:=[.N20] / [.$K66]" office:value-type="float" office:value="0.0498105211495893" calcext:value-type="float">
            <text:p>0.0498105211495893</text:p>
          </table:table-cell>
          <table:table-cell table:formula="of:=[.O20] / [.$K66]" office:value-type="float" office:value="0.213178655525751" calcext:value-type="float">
            <text:p>0.213178655525751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288" calcext:value-type="float">
            <text:p>288</text:p>
          </table:table-cell>
          <table:table-cell/>
          <table:table-cell table:formula="of:=[.C66]" office:value-type="float" office:value="44.142013" calcext:value-type="float">
            <text:p>44.142013</text:p>
          </table:table-cell>
          <table:table-cell/>
          <table:table-cell table:formula="of:=[.A67]/[.A$71]" office:value-type="float" office:value="8" calcext:value-type="float">
            <text:p>8</text:p>
          </table:table-cell>
          <table:table-cell table:formula="of:=[.E21]/[.E$25]" office:value-type="float" office:value="3.65783355948406" calcext:value-type="float">
            <text:p>3.65783355948406</text:p>
          </table:table-cell>
          <table:table-cell table:style-name="Default" table:formula="of:=[.F21]/[.F$25]" office:value-type="float" office:value="9.12075219517366" calcext:value-type="float">
            <text:p>9.12075219517366</text:p>
          </table:table-cell>
          <table:table-cell/>
          <table:table-cell table:formula="of:=[.F44]/[.F$48]" office:value-type="float" office:value="8.94199858737004" calcext:value-type="float">
            <text:p>8.94199858737004</text:p>
          </table:table-cell>
          <table:table-cell/>
          <table:table-cell table:formula="of:=SUM([.J21:.O21])" office:value-type="float" office:value="51.120027" calcext:value-type="float">
            <text:p>51.120027</text:p>
          </table:table-cell>
          <table:table-cell/>
          <table:table-cell table:formula="of:=[.J21] / [.$K67]" office:value-type="float" office:value="0.0558427521957295" calcext:value-type="float">
            <text:p>0.0558427521957295</text:p>
          </table:table-cell>
          <table:table-cell table:formula="of:=[.K21] / [.$K67]" office:value-type="float" office:value="0.330418017971704" calcext:value-type="float">
            <text:p>0.330418017971704</text:p>
          </table:table-cell>
          <table:table-cell table:formula="of:=[.L21] / [.$K67]" office:value-type="float" office:value="0.320471759531739" calcext:value-type="float">
            <text:p>0.320471759531739</text:p>
          </table:table-cell>
          <table:table-cell table:formula="of:=[.M21] / [.$K67]" office:value-type="float" office:value="0.0303205434535471" calcext:value-type="float">
            <text:p>0.0303205434535471</text:p>
          </table:table-cell>
          <table:table-cell table:formula="of:=[.N21] / [.$K67]" office:value-type="float" office:value="0.0505907792263099" calcext:value-type="float">
            <text:p>0.0505907792263099</text:p>
          </table:table-cell>
          <table:table-cell table:formula="of:=[.O21] / [.$K67]" office:value-type="float" office:value="0.21235614762097" calcext:value-type="float">
            <text:p>0.21235614762097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216" calcext:value-type="float">
            <text:p>216</text:p>
          </table:table-cell>
          <table:table-cell/>
          <table:table-cell table:formula="of:=[.C67]" office:value-type="float" office:value="44.142013" calcext:value-type="float">
            <text:p>44.142013</text:p>
          </table:table-cell>
          <table:table-cell/>
          <table:table-cell table:formula="of:=[.A68]/[.A$71]" office:value-type="float" office:value="6" calcext:value-type="float">
            <text:p>6</text:p>
          </table:table-cell>
          <table:table-cell table:formula="of:=[.E22]/[.E$25]" office:value-type="float" office:value="3.1343423778707" calcext:value-type="float">
            <text:p>3.1343423778707</text:p>
          </table:table-cell>
          <table:table-cell table:style-name="Default" table:formula="of:=[.F22]/[.F$25]" office:value-type="float" office:value="6.70050088608364" calcext:value-type="float">
            <text:p>6.70050088608364</text:p>
          </table:table-cell>
          <table:table-cell/>
          <table:table-cell table:formula="of:=[.F45]/[.F$48]" office:value-type="float" office:value="6.62411414488085" calcext:value-type="float">
            <text:p>6.62411414488085</text:p>
          </table:table-cell>
          <table:table-cell/>
          <table:table-cell table:formula="of:=SUM([.J22:.O22])" office:value-type="float" office:value="50.216667" calcext:value-type="float">
            <text:p>50.216667</text:p>
          </table:table-cell>
          <table:table-cell/>
          <table:table-cell table:formula="of:=[.J22] / [.$K68]" office:value-type="float" office:value="0.0631674937725357" calcext:value-type="float">
            <text:p>0.0631674937725357</text:p>
          </table:table-cell>
          <table:table-cell table:formula="of:=[.K22] / [.$K68]" office:value-type="float" office:value="0.328878796356596" calcext:value-type="float">
            <text:p>0.328878796356596</text:p>
          </table:table-cell>
          <table:table-cell table:formula="of:=[.L22] / [.$K68]" office:value-type="float" office:value="0.31407026675028" calcext:value-type="float">
            <text:p>0.31407026675028</text:p>
          </table:table-cell>
          <table:table-cell table:formula="of:=[.M22] / [.$K68]" office:value-type="float" office:value="0.032583046580929" calcext:value-type="float">
            <text:p>0.032583046580929</text:p>
          </table:table-cell>
          <table:table-cell table:formula="of:=[.N22] / [.$K68]" office:value-type="float" office:value="0.0549084231336978" calcext:value-type="float">
            <text:p>0.0549084231336978</text:p>
          </table:table-cell>
          <table:table-cell table:formula="of:=[.O22] / [.$K68]" office:value-type="float" office:value="0.206391973405961" calcext:value-type="float">
            <text:p>0.206391973405961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144" calcext:value-type="float">
            <text:p>144</text:p>
          </table:table-cell>
          <table:table-cell/>
          <table:table-cell table:formula="of:=[.C68]" office:value-type="float" office:value="44.142013" calcext:value-type="float">
            <text:p>44.142013</text:p>
          </table:table-cell>
          <table:table-cell/>
          <table:table-cell table:formula="of:=[.A69]/[.A$71]" office:value-type="float" office:value="4" calcext:value-type="float">
            <text:p>4</text:p>
          </table:table-cell>
          <table:table-cell table:formula="of:=[.E23]/[.E$25]" office:value-type="float" office:value="2.5196991820523" calcext:value-type="float">
            <text:p>2.5196991820523</text:p>
          </table:table-cell>
          <table:table-cell table:style-name="Default" table:formula="of:=[.F23]/[.F$25]" office:value-type="float" office:value="4.36860239210268" calcext:value-type="float">
            <text:p>4.36860239210268</text:p>
          </table:table-cell>
          <table:table-cell/>
          <table:table-cell table:formula="of:=[.F46]/[.F$48]" office:value-type="float" office:value="4.32615818197788" calcext:value-type="float">
            <text:p>4.32615818197788</text:p>
          </table:table-cell>
          <table:table-cell/>
          <table:table-cell table:formula="of:=SUM([.J23:.O23])" office:value-type="float" office:value="48.688996" calcext:value-type="float">
            <text:p>48.688996</text:p>
          </table:table-cell>
          <table:table-cell/>
          <table:table-cell table:formula="of:=[.J23] / [.$K69]" office:value-type="float" office:value="0.0727492101089947" calcext:value-type="float">
            <text:p>0.0727492101089947</text:p>
          </table:table-cell>
          <table:table-cell table:formula="of:=[.K23] / [.$K69]" office:value-type="float" office:value="0.330962215774587" calcext:value-type="float">
            <text:p>0.330962215774587</text:p>
          </table:table-cell>
          <table:table-cell table:formula="of:=[.L23] / [.$K69]" office:value-type="float" office:value="0.319826845474489" calcext:value-type="float">
            <text:p>0.319826845474489</text:p>
          </table:table-cell>
          <table:table-cell table:formula="of:=[.M23] / [.$K69]" office:value-type="float" office:value="0.0338353660034395" calcext:value-type="float">
            <text:p>0.0338353660034395</text:p>
          </table:table-cell>
          <table:table-cell table:formula="of:=[.N23] / [.$K69]" office:value-type="float" office:value="0.0580600183252906" calcext:value-type="float">
            <text:p>0.0580600183252906</text:p>
          </table:table-cell>
          <table:table-cell table:formula="of:=[.O23] / [.$K69]" office:value-type="float" office:value="0.1845663443132" calcext:value-type="float">
            <text:p>0.1845663443132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72" calcext:value-type="float">
            <text:p>72</text:p>
          </table:table-cell>
          <table:table-cell/>
          <table:table-cell table:formula="of:=[.C69]" office:value-type="float" office:value="44.142013" calcext:value-type="float">
            <text:p>44.142013</text:p>
          </table:table-cell>
          <table:table-cell/>
          <table:table-cell table:formula="of:=[.A70]/[.A$71]" office:value-type="float" office:value="2" calcext:value-type="float">
            <text:p>2</text:p>
          </table:table-cell>
          <table:table-cell table:formula="of:=[.E24]/[.E$25]" office:value-type="float" office:value="1.64735775092041" calcext:value-type="float">
            <text:p>1.64735775092041</text:p>
          </table:table-cell>
          <table:table-cell table:style-name="Default" table:formula="of:=[.F24]/[.F$25]" office:value-type="float" office:value="2.0648969338016" calcext:value-type="float">
            <text:p>2.0648969338016</text:p>
          </table:table-cell>
          <table:table-cell/>
          <table:table-cell table:formula="of:=[.F47]/[.F$48]" office:value-type="float" office:value="2.07256551705763" calcext:value-type="float">
            <text:p>2.07256551705763</text:p>
          </table:table-cell>
          <table:table-cell/>
          <table:table-cell table:formula="of:=SUM([.J24:.O24])" office:value-type="float" office:value="44.602276" calcext:value-type="float">
            <text:p>44.602276</text:p>
          </table:table-cell>
          <table:table-cell/>
          <table:table-cell table:formula="of:=[.J24] / [.$K70]" office:value-type="float" office:value="0.0895505646393471" calcext:value-type="float">
            <text:p>0.0895505646393471</text:p>
          </table:table-cell>
          <table:table-cell table:formula="of:=[.K24] / [.$K70]" office:value-type="float" office:value="0.340600914625971" calcext:value-type="float">
            <text:p>0.340600914625971</text:p>
          </table:table-cell>
          <table:table-cell table:formula="of:=[.L24] / [.$K70]" office:value-type="float" office:value="0.317789657191485" calcext:value-type="float">
            <text:p>0.317789657191485</text:p>
          </table:table-cell>
          <table:table-cell table:formula="of:=[.M24] / [.$K70]" office:value-type="float" office:value="0.0476638456746019" calcext:value-type="float">
            <text:p>0.0476638456746019</text:p>
          </table:table-cell>
          <table:table-cell table:formula="of:=[.N24] / [.$K70]" office:value-type="float" office:value="0.0757510446327896" calcext:value-type="float">
            <text:p>0.0757510446327896</text:p>
          </table:table-cell>
          <table:table-cell table:formula="of:=[.O24] / [.$K70]" office:value-type="float" office:value="0.128643973235805" calcext:value-type="float">
            <text:p>0.128643973235805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C70]" office:value-type="float" office:value="44.142013" calcext:value-type="float">
            <text:p>44.142013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42.738497" calcext:value-type="float">
            <text:p>42.738497</text:p>
          </table:table-cell>
          <table:table-cell/>
          <table:table-cell table:formula="of:=[.J25] / [.$K71]" office:value-type="float" office:value="0.107299912769511" calcext:value-type="float">
            <text:p>0.107299912769511</text:p>
          </table:table-cell>
          <table:table-cell table:formula="of:=[.K25] / [.$K71]" office:value-type="float" office:value="0.340427577506996" calcext:value-type="float">
            <text:p>0.340427577506996</text:p>
          </table:table-cell>
          <table:table-cell table:formula="of:=[.L25] / [.$K71]" office:value-type="float" office:value="0.320155924060689" calcext:value-type="float">
            <text:p>0.320155924060689</text:p>
          </table:table-cell>
          <table:table-cell table:formula="of:=[.M25] / [.$K71]" office:value-type="float" office:value="0.0761649853994631" calcext:value-type="float">
            <text:p>0.0761649853994631</text:p>
          </table:table-cell>
          <table:table-cell table:formula="of:=[.N25] / [.$K71]" office:value-type="float" office:value="0.0831083039724116" calcext:value-type="float">
            <text:p>0.0831083039724116</text:p>
          </table:table-cell>
          <table:table-cell table:formula="of:=[.O25] / [.$K71]" office:value-type="float" office:value="0.0728432962909295" calcext:value-type="float">
            <text:p>0.072843296290929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9:.G26])" office:value-type="float" office:value="0.695933" calcext:value-type="float">
            <text:p>6.96E-01</text:p>
          </table:table-cell>
          <table:table-cell table:style-name="ce1" table:formula="of:=MIN([.G9:.G26])" office:value-type="float" office:value="0.223246" calcext:value-type="float">
            <text:p>2.23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02:00.6804204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12:11:11.485624984</dc:date>
    <meta:editing-duration>PT12H36M14S</meta:editing-duration>
    <meta:editing-cycles>78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14cm" svg:y="0.213cm" style:legend-expansion="custom" svg:width="13.339cm" svg:height="0.871cm" style:legend-expansion-aspect-ratio="15.3145809414466" chart:style-name="ch2"/>
        <chart:plot-area chart:style-name="ch3" table:cell-range-address="Sheet1.A52:Sheet1.A72 Sheet1.E51:Sheet1.G72 Sheet1.C52:Sheet1.C71 Sheet1.I6:Sheet1.I26" chart:data-source-has-labels="row" svg:x="0.865cm" svg:y="1.098cm" svg:width="18.345cm" svg:height="7.201cm">
          <chart:coordinate-region svg:x="1.486cm" svg:y="1.297cm" svg:width="17.103cm" svg:height="6.355cm"/>
          <chart:axis chart:dimension="x" chart:name="primary-x" chart:style-name="ch4">
            <chart:title svg:x="9.086cm" svg:y="8.314cm" chart:style-name="ch5">
              <text:p>#processes</text:p>
            </chart:title>
          </chart:axis>
          <chart:axis chart:dimension="y" chart:name="primary-y" chart:style-name="ch6">
            <chart:title svg:x="0.145cm" svg:y="5.81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4cm" svg:y="6.039cm" chart:style-name="ch7">
              <text:p>Relative #objects </text:p>
            </chart:title>
          </chart:axis>
          <chart:series chart:attached-axis="secondary-y" chart:style-name="ch10" chart:values-cell-range-address="Sheet1.E52:Sheet1.E72" chart:label-cell-address="Sheet1.E51:Sheet1.E51" chart:class="chart:scatter">
            <chart:domain table:cell-range-address="Sheet1.A52:Sheet1.A72"/>
            <chart:data-point chart:repeated="21"/>
          </chart:series>
          <chart:series chart:attached-axis="secondary-y" chart:style-name="ch11" chart:values-cell-range-address="Sheet1.F52:Sheet1.F72" chart:label-cell-address="Sheet1.F51:Sheet1.F51" chart:class="chart:scatter">
            <chart:data-point chart:repeated="21"/>
          </chart:series>
          <chart:series chart:attached-axis="secondary-y" chart:style-name="ch12" chart:values-cell-range-address="Sheet1.G52:Sheet1.G72" chart:label-cell-address="Sheet1.G51:Sheet1.G51" chart:class="chart:scatter">
            <chart:data-point chart:repeated="21"/>
          </chart:series>
          <chart:series chart:attached-axis="primary-y" chart:style-name="ch13" chart:values-cell-range-address="Sheet1.C52:Sheet1.C71" loext:label-string="&quot;ref runtime&quot;" chart:class="chart:scatter">
            <chart:data-point chart:repeated="21"/>
          </chart:series>
          <chart:series chart:attached-axis="primary-y" chart:style-name="ch14" chart:values-cell-range-address="Sheet1.I6:Sheet1.I26" loext:label-string="&quot;runtime&quot;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 runtime</text:p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">
                <text:p>1548</text:p>
                <draw:g>
                  <svg:desc>Sheet1.A52:Sheet1.A72</svg:desc>
                </draw:g>
              </table:table-cell>
              <table:table-cell office:value-type="float" office:value="43">
                <text:p>43</text:p>
                <draw:g>
                  <svg:desc>Sheet1.E52:Sheet1.E72</svg:desc>
                </draw:g>
              </table:table-cell>
              <table:table-cell office:value-type="float" office:value="7.62598993763946">
                <text:p>7.62598993763946</text:p>
                <draw:g>
                  <svg:desc>Sheet1.F52:Sheet1.F72</svg:desc>
                </draw:g>
              </table:table-cell>
              <table:table-cell office:value-type="float" office:value="53.8565851170264">
                <text:p>53.8565851170264</text:p>
                <draw:g>
                  <svg:desc>Sheet1.G52:Sheet1.G72</svg:desc>
                </draw:g>
              </table:table-cell>
              <table:table-cell office:value-type="float" office:value="44.142013">
                <text:p>44.142013</text:p>
                <draw:g>
                  <svg:desc>Sheet1.C52:Sheet1.C71</svg:desc>
                </draw:g>
              </table:table-cell>
              <table:table-cell office:value-type="float" office:value="63.469882">
                <text:p>63.469882</text:p>
                <draw:g>
                  <svg:desc>Sheet1.I6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">
                <text:p>1512</text:p>
              </table:table-cell>
              <table:table-cell office:value-type="float" office:value="42">
                <text:p>42</text:p>
              </table:table-cell>
              <table:table-cell office:value-type="float" office:value="7.56242365427331">
                <text:p>7.56242365427331</text:p>
              </table:table-cell>
              <table:table-cell office:value-type="float" office:value="52.5724236681924">
                <text:p>52.5724236681924</text:p>
              </table:table-cell>
              <table:table-cell office:value-type="float" office:value="44.142013">
                <text:p>44.142013</text:p>
              </table:table-cell>
              <table:table-cell office:value-type="float" office:value="63.536977">
                <text:p>63.536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41">
                <text:p>41</text:p>
              </table:table-cell>
              <table:table-cell office:value-type="float" office:value="7.54891910169534">
                <text:p>7.54891910169534</text:p>
              </table:table-cell>
              <table:table-cell office:value-type="float" office:value="51.2402889660289">
                <text:p>51.2402889660289</text:p>
              </table:table-cell>
              <table:table-cell office:value-type="float" office:value="44.142013">
                <text:p>44.142013</text:p>
              </table:table-cell>
              <table:table-cell office:value-type="float" office:value="64.092908">
                <text:p>64.092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7.32054331710498">
                <text:p>7.32054331710498</text:p>
              </table:table-cell>
              <table:table-cell office:value-type="float" office:value="47.2992181006658">
                <text:p>47.2992181006658</text:p>
              </table:table-cell>
              <table:table-cell office:value-type="float" office:value="44.142013">
                <text:p>44.142013</text:p>
              </table:table-cell>
              <table:table-cell office:value-type="float" office:value="62.321128">
                <text:p>62.321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7.10908843863605">
                <text:p>7.10908843863605</text:p>
              </table:table-cell>
              <table:table-cell office:value-type="float" office:value="43.4139830752208">
                <text:p>43.4139830752208</text:p>
              </table:table-cell>
              <table:table-cell office:value-type="float" office:value="44.142013">
                <text:p>44.142013</text:p>
              </table:table-cell>
              <table:table-cell office:value-type="float" office:value="62.879789">
                <text:p>62.879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6.88590410964285">
                <text:p>6.88590410964285</text:p>
              </table:table-cell>
              <table:table-cell office:value-type="float" office:value="39.5454539579049">
                <text:p>39.5454539579049</text:p>
              </table:table-cell>
              <table:table-cell office:value-type="float" office:value="44.142013">
                <text:p>44.142013</text:p>
              </table:table-cell>
              <table:table-cell office:value-type="float" office:value="62.570577">
                <text:p>62.570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6.65568722368283">
                <text:p>6.65568722368283</text:p>
              </table:table-cell>
              <table:table-cell office:value-type="float" office:value="35.6693507482269">
                <text:p>35.6693507482269</text:p>
              </table:table-cell>
              <table:table-cell office:value-type="float" office:value="44.142013">
                <text:p>44.142013</text:p>
              </table:table-cell>
              <table:table-cell office:value-type="float" office:value="63.4547">
                <text:p>63.4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6.34937585470271">
                <text:p>6.34937585470271</text:p>
              </table:table-cell>
              <table:table-cell office:value-type="float" office:value="31.8287363193469">
                <text:p>31.8287363193469</text:p>
              </table:table-cell>
              <table:table-cell office:value-type="float" office:value="44.142013">
                <text:p>44.142013</text:p>
              </table:table-cell>
              <table:table-cell office:value-type="float" office:value="61.184233">
                <text:p>61.184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6.06422017873795">
                <text:p>6.06422017873795</text:p>
              </table:table-cell>
              <table:table-cell office:value-type="float" office:value="27.985031164809">
                <text:p>27.985031164809</text:p>
              </table:table-cell>
              <table:table-cell office:value-type="float" office:value="44.142013">
                <text:p>44.142013</text:p>
              </table:table-cell>
              <table:table-cell office:value-type="float" office:value="60.361979">
                <text:p>60.361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5.71617498224638">
                <text:p>5.71617498224638</text:p>
              </table:table-cell>
              <table:table-cell office:value-type="float" office:value="24.1421029976901">
                <text:p>24.1421029976901</text:p>
              </table:table-cell>
              <table:table-cell office:value-type="float" office:value="44.142013">
                <text:p>44.142013</text:p>
              </table:table-cell>
              <table:table-cell office:value-type="float" office:value="60.369633">
                <text:p>60.369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5.50315956476861">
                <text:p>5.50315956476861</text:p>
              </table:table-cell>
              <table:table-cell office:value-type="float" office:value="21.5297855302736">
                <text:p>21.5297855302736</text:p>
              </table:table-cell>
              <table:table-cell office:value-type="float" office:value="44.142013">
                <text:p>44.142013</text:p>
              </table:table-cell>
              <table:table-cell office:value-type="float" office:value="55.720879">
                <text:p>55.720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5.20394289095328">
                <text:p>5.20394289095328</text:p>
              </table:table-cell>
              <table:table-cell office:value-type="float" office:value="19.0140198984268">
                <text:p>19.0140198984268</text:p>
              </table:table-cell>
              <table:table-cell office:value-type="float" office:value="44.142013">
                <text:p>44.142013</text:p>
              </table:table-cell>
              <table:table-cell office:value-type="float" office:value="54.601024">
                <text:p>54.601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4.8838624179258">
                <text:p>4.8838624179258</text:p>
              </table:table-cell>
              <table:table-cell office:value-type="float" office:value="16.5120181637452">
                <text:p>16.5120181637452</text:p>
              </table:table-cell>
              <table:table-cell office:value-type="float" office:value="44.142013">
                <text:p>44.142013</text:p>
              </table:table-cell>
              <table:table-cell office:value-type="float" office:value="54.036009">
                <text:p>54.036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4.51875460663324">
                <text:p>4.51875460663324</text:p>
              </table:table-cell>
              <table:table-cell office:value-type="float" office:value="14.0154123617393">
                <text:p>14.0154123617393</text:p>
              </table:table-cell>
              <table:table-cell office:value-type="float" office:value="44.142013">
                <text:p>44.142013</text:p>
              </table:table-cell>
              <table:table-cell office:value-type="float" office:value="54.564747">
                <text:p>54.564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4.10470859187474">
                <text:p>4.10470859187474</text:p>
              </table:table-cell>
              <table:table-cell office:value-type="float" office:value="11.5816116316736">
                <text:p>11.5816116316736</text:p>
              </table:table-cell>
              <table:table-cell office:value-type="float" office:value="44.142013">
                <text:p>44.142013</text:p>
              </table:table-cell>
              <table:table-cell office:value-type="float" office:value="53.28714">
                <text:p>53.28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3.65783355948406">
                <text:p>3.65783355948406</text:p>
              </table:table-cell>
              <table:table-cell office:value-type="float" office:value="9.12075219517366">
                <text:p>9.12075219517366</text:p>
              </table:table-cell>
              <table:table-cell office:value-type="float" office:value="44.142013">
                <text:p>44.142013</text:p>
              </table:table-cell>
              <table:table-cell office:value-type="float" office:value="52.451421">
                <text:p>52.451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3.1343423778707">
                <text:p>3.1343423778707</text:p>
              </table:table-cell>
              <table:table-cell office:value-type="float" office:value="6.70050088608364">
                <text:p>6.70050088608364</text:p>
              </table:table-cell>
              <table:table-cell office:value-type="float" office:value="44.142013">
                <text:p>44.142013</text:p>
              </table:table-cell>
              <table:table-cell office:value-type="float" office:value="51.631349">
                <text:p>51.631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2.5196991820523">
                <text:p>2.5196991820523</text:p>
              </table:table-cell>
              <table:table-cell office:value-type="float" office:value="4.36860239210268">
                <text:p>4.36860239210268</text:p>
              </table:table-cell>
              <table:table-cell office:value-type="float" office:value="44.142013">
                <text:p>44.142013</text:p>
              </table:table-cell>
              <table:table-cell office:value-type="float" office:value="49.695152">
                <text:p>49.695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64735775092041">
                <text:p>1.64735775092041</text:p>
              </table:table-cell>
              <table:table-cell office:value-type="float" office:value="2.0648969338016">
                <text:p>2.0648969338016</text:p>
              </table:table-cell>
              <table:table-cell office:value-type="float" office:value="44.142013">
                <text:p>44.142013</text:p>
              </table:table-cell>
              <table:table-cell office:value-type="float" office:value="45.932607">
                <text:p>45.932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4.142013">
                <text:p>44.142013</text:p>
              </table:table-cell>
              <table:table-cell office:value-type="float" office:value="44.142013">
                <text:p>44.142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127cm" svg:y="0.263cm" style:legend-expansion="custom" svg:width="14.498cm" svg:height="0.954cm" style:legend-expansion-aspect-ratio="15.1970649895178" chart:style-name="ch2"/>
        <chart:plot-area chart:style-name="ch3" table:cell-range-address="Sheet1.A52:Sheet1.A72 Sheet1.M51:Sheet1.R72" chart:data-source-has-labels="row" svg:x="0.801cm" svg:y="1.173cm" svg:width="18.923cm" svg:height="7.119cm">
          <chart:coordinate-region svg:x="1.713cm" svg:y="1.372cm" svg:width="17.64cm" svg:height="6.273cm"/>
          <chart:axis chart:dimension="x" chart:name="primary-x" chart:style-name="ch4">
            <chart:title svg:x="9.372cm" svg:y="8.341cm" chart:style-name="ch5">
              <text:p>#processes</text:p>
            </chart:title>
          </chart:axis>
          <chart:axis chart:dimension="y" chart:name="primary-y" chart:style-name="ch6">
            <chart:title svg:x="0.167cm" svg:y="6.629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2" chart:label-cell-address="Sheet1.M51:Sheet1.M51" chart:class="chart:scatter">
            <chart:domain table:cell-range-address="Sheet1.A52:Sheet1.A72"/>
            <chart:data-point chart:repeated="21"/>
          </chart:series>
          <chart:series chart:style-name="ch10" chart:values-cell-range-address="Sheet1.N52:Sheet1.N72" chart:label-cell-address="Sheet1.N51:Sheet1.N51" chart:class="chart:scatter">
            <chart:data-point chart:repeated="21"/>
          </chart:series>
          <chart:series chart:style-name="ch11" chart:values-cell-range-address="Sheet1.O52:Sheet1.O72" chart:label-cell-address="Sheet1.O51:Sheet1.O51" chart:class="chart:scatter">
            <chart:data-point chart:repeated="21"/>
          </chart:series>
          <chart:series chart:style-name="ch12" chart:values-cell-range-address="Sheet1.P52:Sheet1.P72" chart:label-cell-address="Sheet1.P51:Sheet1.P51" chart:class="chart:scatter">
            <chart:data-point chart:repeated="21"/>
          </chart:series>
          <chart:series chart:style-name="ch13" chart:values-cell-range-address="Sheet1.Q52:Sheet1.Q72" chart:label-cell-address="Sheet1.Q51:Sheet1.Q51" chart:class="chart:scatter">
            <chart:data-point chart:repeated="21"/>
          </chart:series>
          <chart:series chart:style-name="ch14" chart:values-cell-range-address="Sheet1.R52:Sheet1.R72" chart:label-cell-address="Sheet1.R51:Sheet1.R5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">
                <text:p>1548</text:p>
                <draw:g>
                  <svg:desc>Sheet1.A52:Sheet1.A72</svg:desc>
                </draw:g>
              </table:table-cell>
              <table:table-cell office:value-type="float" office:value="0.0455829060897567">
                <text:p>0.0455829060897567</text:p>
                <draw:g>
                  <svg:desc>Sheet1.M52:Sheet1.M72</svg:desc>
                </draw:g>
              </table:table-cell>
              <table:table-cell office:value-type="float" office:value="0.298537428387262">
                <text:p>0.298537428387262</text:p>
                <draw:g>
                  <svg:desc>Sheet1.N52:Sheet1.N72</svg:desc>
                </draw:g>
              </table:table-cell>
              <table:table-cell office:value-type="float" office:value="0.390794483817378">
                <text:p>0.390794483817378</text:p>
                <draw:g>
                  <svg:desc>Sheet1.O52:Sheet1.O72</svg:desc>
                </draw:g>
              </table:table-cell>
              <table:table-cell office:value-type="float" office:value="0.0204423195046617">
                <text:p>0.0204423195046617</text:p>
                <draw:g>
                  <svg:desc>Sheet1.P52:Sheet1.P72</svg:desc>
                </draw:g>
              </table:table-cell>
              <table:table-cell office:value-type="float" office:value="0.0315792098173037">
                <text:p>0.0315792098173037</text:p>
                <draw:g>
                  <svg:desc>Sheet1.Q52:Sheet1.Q72</svg:desc>
                </draw:g>
              </table:table-cell>
              <table:table-cell office:value-type="float" office:value="0.213063652383638">
                <text:p>0.213063652383638</text:p>
                <draw:g>
                  <svg:desc>Sheet1.R52:Sheet1.R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">
                <text:p>1512</text:p>
              </table:table-cell>
              <table:table-cell office:value-type="float" office:value="0.0458635012588672">
                <text:p>0.0458635012588672</text:p>
              </table:table-cell>
              <table:table-cell office:value-type="float" office:value="0.297054557226004">
                <text:p>0.297054557226004</text:p>
              </table:table-cell>
              <table:table-cell office:value-type="float" office:value="0.391576729983397">
                <text:p>0.391576729983397</text:p>
              </table:table-cell>
              <table:table-cell office:value-type="float" office:value="0.0219488155155968">
                <text:p>0.0219488155155968</text:p>
              </table:table-cell>
              <table:table-cell office:value-type="float" office:value="0.0336402803978183">
                <text:p>0.0336402803978183</text:p>
              </table:table-cell>
              <table:table-cell office:value-type="float" office:value="0.209916115618317">
                <text:p>0.209916115618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0.0484204330988189">
                <text:p>0.0484204330988189</text:p>
              </table:table-cell>
              <table:table-cell office:value-type="float" office:value="0.294372010268569">
                <text:p>0.294372010268569</text:p>
              </table:table-cell>
              <table:table-cell office:value-type="float" office:value="0.384381250253606">
                <text:p>0.384381250253606</text:p>
              </table:table-cell>
              <table:table-cell office:value-type="float" office:value="0.0234566300782055">
                <text:p>0.0234566300782055</text:p>
              </table:table-cell>
              <table:table-cell office:value-type="float" office:value="0.0358058786523452">
                <text:p>0.0358058786523452</text:p>
              </table:table-cell>
              <table:table-cell office:value-type="float" office:value="0.213563797648455">
                <text:p>0.213563797648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8">
                <text:p>1368</text:p>
              </table:table-cell>
              <table:table-cell office:value-type="float" office:value="0.0431809487570485">
                <text:p>0.0431809487570485</text:p>
              </table:table-cell>
              <table:table-cell office:value-type="float" office:value="0.301383923497139">
                <text:p>0.301383923497139</text:p>
              </table:table-cell>
              <table:table-cell office:value-type="float" office:value="0.401295167727871">
                <text:p>0.401295167727871</text:p>
              </table:table-cell>
              <table:table-cell office:value-type="float" office:value="0.0170672789589836">
                <text:p>0.0170672789589836</text:p>
              </table:table-cell>
              <table:table-cell office:value-type="float" office:value="0.0278775084015691">
                <text:p>0.0278775084015691</text:p>
              </table:table-cell>
              <table:table-cell office:value-type="float" office:value="0.209195172657389">
                <text:p>0.209195172657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  <table:table-cell office:value-type="float" office:value="0.0444488922530378">
                <text:p>0.0444488922530378</text:p>
              </table:table-cell>
              <table:table-cell office:value-type="float" office:value="0.2986252711548">
                <text:p>0.2986252711548</text:p>
              </table:table-cell>
              <table:table-cell office:value-type="float" office:value="0.399093511978409">
                <text:p>0.399093511978409</text:p>
              </table:table-cell>
              <table:table-cell office:value-type="float" office:value="0.0206012778376722">
                <text:p>0.0206012778376722</text:p>
              </table:table-cell>
              <table:table-cell office:value-type="float" office:value="0.0325363463883104">
                <text:p>0.0325363463883104</text:p>
              </table:table-cell>
              <table:table-cell office:value-type="float" office:value="0.20469470038777">
                <text:p>0.20469470038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">
                <text:p>1152</text:p>
              </table:table-cell>
              <table:table-cell office:value-type="float" office:value="0.0469118342323222">
                <text:p>0.0469118342323222</text:p>
              </table:table-cell>
              <table:table-cell office:value-type="float" office:value="0.299366366395584">
                <text:p>0.299366366395584</text:p>
              </table:table-cell>
              <table:table-cell office:value-type="float" office:value="0.389513862040781">
                <text:p>0.389513862040781</text:p>
              </table:table-cell>
              <table:table-cell office:value-type="float" office:value="0.02140071287604">
                <text:p>0.02140071287604</text:p>
              </table:table-cell>
              <table:table-cell office:value-type="float" office:value="0.0337335165272315">
                <text:p>0.0337335165272315</text:p>
              </table:table-cell>
              <table:table-cell office:value-type="float" office:value="0.209073707928041">
                <text:p>0.209073707928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">
                <text:p>1044</text:p>
              </table:table-cell>
              <table:table-cell office:value-type="float" office:value="0.0483367400097451">
                <text:p>0.0483367400097451</text:p>
              </table:table-cell>
              <table:table-cell office:value-type="float" office:value="0.294173220087601">
                <text:p>0.294173220087601</text:p>
              </table:table-cell>
              <table:table-cell office:value-type="float" office:value="0.395656294601949">
                <text:p>0.395656294601949</text:p>
              </table:table-cell>
              <table:table-cell office:value-type="float" office:value="0.0232581389974366">
                <text:p>0.0232581389974366</text:p>
              </table:table-cell>
              <table:table-cell office:value-type="float" office:value="0.0360672326770821">
                <text:p>0.0360672326770821</text:p>
              </table:table-cell>
              <table:table-cell office:value-type="float" office:value="0.202508373626186">
                <text:p>0.202508373626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6">
                <text:p>936</text:p>
              </table:table-cell>
              <table:table-cell office:value-type="float" office:value="0.0485222651658981">
                <text:p>0.0485222651658981</text:p>
              </table:table-cell>
              <table:table-cell office:value-type="float" office:value="0.303373662718851">
                <text:p>0.303373662718851</text:p>
              </table:table-cell>
              <table:table-cell office:value-type="float" office:value="0.381799005256925">
                <text:p>0.381799005256925</text:p>
              </table:table-cell>
              <table:table-cell office:value-type="float" office:value="0.022952674117084">
                <text:p>0.022952674117084</text:p>
              </table:table-cell>
              <table:table-cell office:value-type="float" office:value="0.037155711798681">
                <text:p>0.037155711798681</text:p>
              </table:table-cell>
              <table:table-cell office:value-type="float" office:value="0.206196680942561">
                <text:p>0.206196680942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">
                <text:p>828</text:p>
              </table:table-cell>
              <table:table-cell office:value-type="float" office:value="0.0480579607297919">
                <text:p>0.0480579607297919</text:p>
              </table:table-cell>
              <table:table-cell office:value-type="float" office:value="0.303188693482878">
                <text:p>0.303188693482878</text:p>
              </table:table-cell>
              <table:table-cell office:value-type="float" office:value="0.384895892663238">
                <text:p>0.384895892663238</text:p>
              </table:table-cell>
              <table:table-cell office:value-type="float" office:value="0.0231359458013648">
                <text:p>0.0231359458013648</text:p>
              </table:table-cell>
              <table:table-cell office:value-type="float" office:value="0.0373888589458058">
                <text:p>0.0373888589458058</text:p>
              </table:table-cell>
              <table:table-cell office:value-type="float" office:value="0.203332648376922">
                <text:p>0.203332648376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0.0500446557809529">
                <text:p>0.0500446557809529</text:p>
              </table:table-cell>
              <table:table-cell office:value-type="float" office:value="0.302019918089869">
                <text:p>0.302019918089869</text:p>
              </table:table-cell>
              <table:table-cell office:value-type="float" office:value="0.381554950137053">
                <text:p>0.381554950137053</text:p>
              </table:table-cell>
              <table:table-cell office:value-type="float" office:value="0.0244052283032368">
                <text:p>0.0244052283032368</text:p>
              </table:table-cell>
              <table:table-cell office:value-type="float" office:value="0.0388233479415413">
                <text:p>0.0388233479415413</text:p>
              </table:table-cell>
              <table:table-cell office:value-type="float" office:value="0.203151899747347">
                <text:p>0.203151899747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73508348302192">
                <text:p>0.0473508348302192</text:p>
              </table:table-cell>
              <table:table-cell office:value-type="float" office:value="0.324973623851697">
                <text:p>0.324973623851697</text:p>
              </table:table-cell>
              <table:table-cell office:value-type="float" office:value="0.333597443270557">
                <text:p>0.333597443270557</text:p>
              </table:table-cell>
              <table:table-cell office:value-type="float" office:value="0.0287682863257626">
                <text:p>0.0287682863257626</text:p>
              </table:table-cell>
              <table:table-cell office:value-type="float" office:value="0.0464538220436376">
                <text:p>0.0464538220436376</text:p>
              </table:table-cell>
              <table:table-cell office:value-type="float" office:value="0.218855989678127">
                <text:p>0.218855989678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">
                <text:p>576</text:p>
              </table:table-cell>
              <table:table-cell office:value-type="float" office:value="0.0479491261196217">
                <text:p>0.0479491261196217</text:p>
              </table:table-cell>
              <table:table-cell office:value-type="float" office:value="0.329529895691073">
                <text:p>0.329529895691073</text:p>
              </table:table-cell>
              <table:table-cell office:value-type="float" office:value="0.336724002483158">
                <text:p>0.336724002483158</text:p>
              </table:table-cell>
              <table:table-cell office:value-type="float" office:value="0.0265607031113279">
                <text:p>0.0265607031113279</text:p>
              </table:table-cell>
              <table:table-cell office:value-type="float" office:value="0.0424054385545975">
                <text:p>0.0424054385545975</text:p>
              </table:table-cell>
              <table:table-cell office:value-type="float" office:value="0.216830834040222">
                <text:p>0.216830834040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0.0506230110167691">
                <text:p>0.0506230110167691</text:p>
              </table:table-cell>
              <table:table-cell office:value-type="float" office:value="0.331579444417617">
                <text:p>0.331579444417617</text:p>
              </table:table-cell>
              <table:table-cell office:value-type="float" office:value="0.329031929301595">
                <text:p>0.329031929301595</text:p>
              </table:table-cell>
              <table:table-cell office:value-type="float" office:value="0.0266523965891514">
                <text:p>0.0266523965891514</text:p>
              </table:table-cell>
              <table:table-cell office:value-type="float" office:value="0.0431169096083697">
                <text:p>0.0431169096083697</text:p>
              </table:table-cell>
              <table:table-cell office:value-type="float" office:value="0.218996309066497">
                <text:p>0.218996309066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0.0564266525028871">
                <text:p>0.0564266525028871</text:p>
              </table:table-cell>
              <table:table-cell office:value-type="float" office:value="0.324039548908215">
                <text:p>0.324039548908215</text:p>
              </table:table-cell>
              <table:table-cell office:value-type="float" office:value="0.320997242837922">
                <text:p>0.320997242837922</text:p>
              </table:table-cell>
              <table:table-cell office:value-type="float" office:value="0.0317837873700409">
                <text:p>0.0317837873700409</text:p>
              </table:table-cell>
              <table:table-cell office:value-type="float" office:value="0.051323119781083">
                <text:p>0.051323119781083</text:p>
              </table:table-cell>
              <table:table-cell office:value-type="float" office:value="0.215429648599852">
                <text:p>0.215429648599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0.055091623474919">
                <text:p>0.055091623474919</text:p>
              </table:table-cell>
              <table:table-cell office:value-type="float" office:value="0.328070539069755">
                <text:p>0.328070539069755</text:p>
              </table:table-cell>
              <table:table-cell office:value-type="float" office:value="0.32364321632807">
                <text:p>0.32364321632807</text:p>
              </table:table-cell>
              <table:table-cell office:value-type="float" office:value="0.0302054444519151">
                <text:p>0.0302054444519151</text:p>
              </table:table-cell>
              <table:table-cell office:value-type="float" office:value="0.0498105211495893">
                <text:p>0.0498105211495893</text:p>
              </table:table-cell>
              <table:table-cell office:value-type="float" office:value="0.213178655525751">
                <text:p>0.213178655525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0.0558427521957295">
                <text:p>0.0558427521957295</text:p>
              </table:table-cell>
              <table:table-cell office:value-type="float" office:value="0.330418017971704">
                <text:p>0.330418017971704</text:p>
              </table:table-cell>
              <table:table-cell office:value-type="float" office:value="0.320471759531739">
                <text:p>0.320471759531739</text:p>
              </table:table-cell>
              <table:table-cell office:value-type="float" office:value="0.0303205434535471">
                <text:p>0.0303205434535471</text:p>
              </table:table-cell>
              <table:table-cell office:value-type="float" office:value="0.0505907792263099">
                <text:p>0.0505907792263099</text:p>
              </table:table-cell>
              <table:table-cell office:value-type="float" office:value="0.21235614762097">
                <text:p>0.21235614762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0.0631674937725357">
                <text:p>0.0631674937725357</text:p>
              </table:table-cell>
              <table:table-cell office:value-type="float" office:value="0.328878796356596">
                <text:p>0.328878796356596</text:p>
              </table:table-cell>
              <table:table-cell office:value-type="float" office:value="0.31407026675028">
                <text:p>0.31407026675028</text:p>
              </table:table-cell>
              <table:table-cell office:value-type="float" office:value="0.032583046580929">
                <text:p>0.032583046580929</text:p>
              </table:table-cell>
              <table:table-cell office:value-type="float" office:value="0.0549084231336978">
                <text:p>0.0549084231336978</text:p>
              </table:table-cell>
              <table:table-cell office:value-type="float" office:value="0.206391973405961">
                <text:p>0.206391973405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0.0727492101089947">
                <text:p>0.0727492101089947</text:p>
              </table:table-cell>
              <table:table-cell office:value-type="float" office:value="0.330962215774587">
                <text:p>0.330962215774587</text:p>
              </table:table-cell>
              <table:table-cell office:value-type="float" office:value="0.319826845474489">
                <text:p>0.319826845474489</text:p>
              </table:table-cell>
              <table:table-cell office:value-type="float" office:value="0.0338353660034395">
                <text:p>0.0338353660034395</text:p>
              </table:table-cell>
              <table:table-cell office:value-type="float" office:value="0.0580600183252906">
                <text:p>0.0580600183252906</text:p>
              </table:table-cell>
              <table:table-cell office:value-type="float" office:value="0.1845663443132">
                <text:p>0.1845663443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0.0895505646393471">
                <text:p>0.0895505646393471</text:p>
              </table:table-cell>
              <table:table-cell office:value-type="float" office:value="0.340600914625971">
                <text:p>0.340600914625971</text:p>
              </table:table-cell>
              <table:table-cell office:value-type="float" office:value="0.317789657191485">
                <text:p>0.317789657191485</text:p>
              </table:table-cell>
              <table:table-cell office:value-type="float" office:value="0.0476638456746019">
                <text:p>0.0476638456746019</text:p>
              </table:table-cell>
              <table:table-cell office:value-type="float" office:value="0.0757510446327896">
                <text:p>0.0757510446327896</text:p>
              </table:table-cell>
              <table:table-cell office:value-type="float" office:value="0.128643973235805">
                <text:p>0.128643973235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107299912769511">
                <text:p>0.107299912769511</text:p>
              </table:table-cell>
              <table:table-cell office:value-type="float" office:value="0.340427577506996">
                <text:p>0.340427577506996</text:p>
              </table:table-cell>
              <table:table-cell office:value-type="float" office:value="0.320155924060689">
                <text:p>0.320155924060689</text:p>
              </table:table-cell>
              <table:table-cell office:value-type="float" office:value="0.0761649853994631">
                <text:p>0.0761649853994631</text:p>
              </table:table-cell>
              <table:table-cell office:value-type="float" office:value="0.0831083039724116">
                <text:p>0.0831083039724116</text:p>
              </table:table-cell>
              <table:table-cell office:value-type="float" office:value="0.0728432962909295">
                <text:p>0.0728432962909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1.665cm" svg:y="5.841cm" style:legend-expansion="custom" svg:width="6.522cm" svg:height="1.583cm" style:legend-expansion-aspect-ratio="4.12002526847757" chart:style-name="ch2"/>
        <chart:plot-area chart:style-name="ch3" table:cell-range-address="Sheet1.F52:Sheet1.G72 Sheet1.G6:Sheet1.G26 Sheet1.G29:Sheet1.G48" chart:data-source-has-labels="row" svg:x="0.869cm" svg:y="0.125cm" svg:width="18.18cm" svg:height="8.176cm">
          <chart:coordinate-region svg:x="1.781cm" svg:y="0.324cm" svg:width="16.831cm" svg:height="7.33cm"/>
          <chart:axis chart:dimension="x" chart:name="primary-x" chart:style-name="ch4">
            <chart:title svg:x="8.011cm" svg:y="8.341cm" chart:style-name="ch5">
              <text:p>Relative symbolic #objects</text:p>
            </chart:title>
          </chart:axis>
          <chart:axis chart:dimension="y" chart:name="primary-y" chart:style-name="ch6">
            <chart:title svg:x="0.165cm" svg:y="5.553cm" chart:style-name="ch7">
              <text:p>Accuracy</text:p>
            </chart:title>
            <chart:grid chart:style-name="ch8" chart:class="major"/>
          </chart:axis>
          <chart:axis chart:dimension="y" chart:name="secondary-y" chart:style-name="ch9">
            <chart:title svg:x="19.276cm" svg:y="6.137cm" chart:style-name="ch7">
              <text:p>Relative #objects</text:p>
            </chart:title>
          </chart:axis>
          <chart:series chart:attached-axis="primary-y" chart:style-name="ch10" chart:values-cell-range-address="Sheet1.G6:Sheet1.G26" loext:label-string="&quot;probabilistic ranking accuracy&quot;" chart:class="chart:scatter">
            <chart:domain table:cell-range-address="Sheet1.G52:Sheet1.G72"/>
            <chart:data-point chart:repeated="21"/>
          </chart:series>
          <chart:series chart:attached-axis="primary-y" chart:style-name="ch11" chart:values-cell-range-address="Sheet1.G29:Sheet1.G48" loext:label-string="&quot;deterministic ranking accuracy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2" loext:label-string="&quot;#objects&quot;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 accuracy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 accuracy</text:p>
              </table:table-cell>
              <table:table-cell office:value-type="string">
                <text:p>#objec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8565851170264">
                <text:p>53.8565851170264</text:p>
                <draw:g>
                  <svg:desc>Sheet1.G52:Sheet1.G72</svg:desc>
                </draw:g>
              </table:table-cell>
              <table:table-cell office:value-type="float" office:value="0.713169">
                <text:p>0.713169</text:p>
                <draw:g>
                  <svg:desc>Sheet1.G6:Sheet1.G26</svg:desc>
                </draw:g>
              </table:table-cell>
              <table:table-cell office:value-type="float" office:value="52.0856144266589">
                <text:p>52.0856144266589</text:p>
                <draw:g>
                  <svg:desc>Sheet1.I52:Sheet1.I71</svg:desc>
                </draw:g>
              </table:table-cell>
              <table:table-cell office:value-type="float" office:value="0.773185">
                <text:p>0.773185</text:p>
                <draw:g>
                  <svg:desc>Sheet1.G29:Sheet1.G48</svg:desc>
                </draw:g>
              </table:table-cell>
              <table:table-cell office:value-type="float" office:value="7.62598993763946">
                <text:p>7.62598993763946</text:p>
                <draw:g>
                  <svg:desc>Sheet1.F52:Sheet1.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5724236681924">
                <text:p>52.5724236681924</text:p>
              </table:table-cell>
              <table:table-cell office:value-type="float" office:value="0.710976">
                <text:p>0.710976</text:p>
              </table:table-cell>
              <table:table-cell office:value-type="float" office:value="50.849710638135">
                <text:p>50.849710638135</text:p>
              </table:table-cell>
              <table:table-cell office:value-type="float" office:value="0.770893">
                <text:p>0.770893</text:p>
              </table:table-cell>
              <table:table-cell office:value-type="float" office:value="7.56242365427331">
                <text:p>7.56242365427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2402889660289">
                <text:p>51.2402889660289</text:p>
              </table:table-cell>
              <table:table-cell office:value-type="float" office:value="0.706199">
                <text:p>0.706199</text:p>
              </table:table-cell>
              <table:table-cell office:value-type="float" office:value="49.592009046509">
                <text:p>49.592009046509</text:p>
              </table:table-cell>
              <table:table-cell office:value-type="float" office:value="0.76853">
                <text:p>0.76853</text:p>
              </table:table-cell>
              <table:table-cell office:value-type="float" office:value="7.54891910169534">
                <text:p>7.54891910169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992181006658">
                <text:p>47.2992181006658</text:p>
              </table:table-cell>
              <table:table-cell office:value-type="float" office:value="0.695933">
                <text:p>0.695933</text:p>
              </table:table-cell>
              <table:table-cell office:value-type="float" office:value="45.7665052164698">
                <text:p>45.7665052164698</text:p>
              </table:table-cell>
              <table:table-cell office:value-type="float" office:value="0.757782">
                <text:p>0.757782</text:p>
              </table:table-cell>
              <table:table-cell office:value-type="float" office:value="7.32054331710498">
                <text:p>7.32054331710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4139830752208">
                <text:p>43.4139830752208</text:p>
              </table:table-cell>
              <table:table-cell office:value-type="float" office:value="0.681847">
                <text:p>0.681847</text:p>
              </table:table-cell>
              <table:table-cell office:value-type="float" office:value="42.0402876520936">
                <text:p>42.0402876520936</text:p>
              </table:table-cell>
              <table:table-cell office:value-type="float" office:value="0.746141">
                <text:p>0.746141</text:p>
              </table:table-cell>
              <table:table-cell office:value-type="float" office:value="7.10908843863605">
                <text:p>7.10908843863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454539579049">
                <text:p>39.5454539579049</text:p>
              </table:table-cell>
              <table:table-cell office:value-type="float" office:value="0.668748">
                <text:p>0.668748</text:p>
              </table:table-cell>
              <table:table-cell office:value-type="float" office:value="38.2924661576078">
                <text:p>38.2924661576078</text:p>
              </table:table-cell>
              <table:table-cell office:value-type="float" office:value="0.734604">
                <text:p>0.734604</text:p>
              </table:table-cell>
              <table:table-cell office:value-type="float" office:value="6.88590410964285">
                <text:p>6.88590410964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6693507482269">
                <text:p>35.6693507482269</text:p>
              </table:table-cell>
              <table:table-cell office:value-type="float" office:value="0.657807">
                <text:p>0.657807</text:p>
              </table:table-cell>
              <table:table-cell office:value-type="float" office:value="34.5820038480638">
                <text:p>34.5820038480638</text:p>
              </table:table-cell>
              <table:table-cell office:value-type="float" office:value="0.724944">
                <text:p>0.724944</text:p>
              </table:table-cell>
              <table:table-cell office:value-type="float" office:value="6.65568722368283">
                <text:p>6.65568722368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8287363193469">
                <text:p>31.8287363193469</text:p>
              </table:table-cell>
              <table:table-cell office:value-type="float" office:value="0.63772">
                <text:p>0.63772</text:p>
              </table:table-cell>
              <table:table-cell office:value-type="float" office:value="30.8751930375308">
                <text:p>30.8751930375308</text:p>
              </table:table-cell>
              <table:table-cell office:value-type="float" office:value="0.709823">
                <text:p>0.709823</text:p>
              </table:table-cell>
              <table:table-cell office:value-type="float" office:value="6.34937585470271">
                <text:p>6.34937585470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985031164809">
                <text:p>27.985031164809</text:p>
              </table:table-cell>
              <table:table-cell office:value-type="float" office:value="0.618444">
                <text:p>0.618444</text:p>
              </table:table-cell>
              <table:table-cell office:value-type="float" office:value="27.1670394164013">
                <text:p>27.1670394164013</text:p>
              </table:table-cell>
              <table:table-cell office:value-type="float" office:value="0.693271">
                <text:p>0.693271</text:p>
              </table:table-cell>
              <table:table-cell office:value-type="float" office:value="6.06422017873795">
                <text:p>6.06422017873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1421029976901">
                <text:p>24.1421029976901</text:p>
              </table:table-cell>
              <table:table-cell office:value-type="float" office:value="0.599541">
                <text:p>0.599541</text:p>
              </table:table-cell>
              <table:table-cell office:value-type="float" office:value="23.4925485459824">
                <text:p>23.4925485459824</text:p>
              </table:table-cell>
              <table:table-cell office:value-type="float" office:value="0.679627">
                <text:p>0.679627</text:p>
              </table:table-cell>
              <table:table-cell office:value-type="float" office:value="5.71617498224638">
                <text:p>5.71617498224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5297855302736">
                <text:p>21.5297855302736</text:p>
              </table:table-cell>
              <table:table-cell office:value-type="float" office:value="0.586596">
                <text:p>0.586596</text:p>
              </table:table-cell>
              <table:table-cell office:value-type="float" office:value="20.9612196048909">
                <text:p>20.9612196048909</text:p>
              </table:table-cell>
              <table:table-cell office:value-type="float" office:value="0.665342">
                <text:p>0.665342</text:p>
              </table:table-cell>
              <table:table-cell office:value-type="float" office:value="5.50315956476861">
                <text:p>5.50315956476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0140198984268">
                <text:p>19.0140198984268</text:p>
              </table:table-cell>
              <table:table-cell office:value-type="float" office:value="0.566594">
                <text:p>0.566594</text:p>
              </table:table-cell>
              <table:table-cell office:value-type="float" office:value="18.5437595096378">
                <text:p>18.5437595096378</text:p>
              </table:table-cell>
              <table:table-cell office:value-type="float" office:value="0.653094">
                <text:p>0.653094</text:p>
              </table:table-cell>
              <table:table-cell office:value-type="float" office:value="5.20394289095328">
                <text:p>5.20394289095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5120181637452">
                <text:p>16.5120181637452</text:p>
              </table:table-cell>
              <table:table-cell office:value-type="float" office:value="0.544769">
                <text:p>0.544769</text:p>
              </table:table-cell>
              <table:table-cell office:value-type="float" office:value="16.1276504075348">
                <text:p>16.1276504075348</text:p>
              </table:table-cell>
              <table:table-cell office:value-type="float" office:value="0.634655">
                <text:p>0.634655</text:p>
              </table:table-cell>
              <table:table-cell office:value-type="float" office:value="4.8838624179258">
                <text:p>4.8838624179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154123617393">
                <text:p>14.0154123617393</text:p>
              </table:table-cell>
              <table:table-cell office:value-type="float" office:value="0.527329">
                <text:p>0.527329</text:p>
              </table:table-cell>
              <table:table-cell office:value-type="float" office:value="13.7172477419249">
                <text:p>13.7172477419249</text:p>
              </table:table-cell>
              <table:table-cell office:value-type="float" office:value="0.617363">
                <text:p>0.617363</text:p>
              </table:table-cell>
              <table:table-cell office:value-type="float" office:value="4.51875460663324">
                <text:p>4.51875460663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816116316736">
                <text:p>11.5816116316736</text:p>
              </table:table-cell>
              <table:table-cell office:value-type="float" office:value="0.496521">
                <text:p>0.496521</text:p>
              </table:table-cell>
              <table:table-cell office:value-type="float" office:value="11.3529256093758">
                <text:p>11.3529256093758</text:p>
              </table:table-cell>
              <table:table-cell office:value-type="float" office:value="0.591219">
                <text:p>0.591219</text:p>
              </table:table-cell>
              <table:table-cell office:value-type="float" office:value="4.10470859187474">
                <text:p>4.10470859187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2075219517366">
                <text:p>9.12075219517366</text:p>
              </table:table-cell>
              <table:table-cell office:value-type="float" office:value="0.469106">
                <text:p>0.469106</text:p>
              </table:table-cell>
              <table:table-cell office:value-type="float" office:value="8.94199858737004">
                <text:p>8.94199858737004</text:p>
              </table:table-cell>
              <table:table-cell office:value-type="float" office:value="0.566205">
                <text:p>0.566205</text:p>
              </table:table-cell>
              <table:table-cell office:value-type="float" office:value="3.65783355948406">
                <text:p>3.65783355948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0050088608364">
                <text:p>6.70050088608364</text:p>
              </table:table-cell>
              <table:table-cell office:value-type="float" office:value="0.4255">
                <text:p>0.4255</text:p>
              </table:table-cell>
              <table:table-cell office:value-type="float" office:value="6.62411414488085">
                <text:p>6.62411414488085</text:p>
              </table:table-cell>
              <table:table-cell office:value-type="float" office:value="0.531677">
                <text:p>0.531677</text:p>
              </table:table-cell>
              <table:table-cell office:value-type="float" office:value="3.1343423778707">
                <text:p>3.1343423778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6860239210268">
                <text:p>4.36860239210268</text:p>
              </table:table-cell>
              <table:table-cell office:value-type="float" office:value="0.373719">
                <text:p>0.373719</text:p>
              </table:table-cell>
              <table:table-cell office:value-type="float" office:value="4.32615818197788">
                <text:p>4.32615818197788</text:p>
              </table:table-cell>
              <table:table-cell office:value-type="float" office:value="0.4863">
                <text:p>0.4863</text:p>
              </table:table-cell>
              <table:table-cell office:value-type="float" office:value="2.5196991820523">
                <text:p>2.5196991820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648969338016">
                <text:p>2.0648969338016</text:p>
              </table:table-cell>
              <table:table-cell office:value-type="float" office:value="0.294777">
                <text:p>0.294777</text:p>
              </table:table-cell>
              <table:table-cell office:value-type="float" office:value="2.07256551705763">
                <text:p>2.07256551705763</text:p>
              </table:table-cell>
              <table:table-cell office:value-type="float" office:value="0.413062">
                <text:p>0.413062</text:p>
              </table:table-cell>
              <table:table-cell office:value-type="float" office:value="1.64735775092041">
                <text:p>1.64735775092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23246">
                <text:p>0.223246</text:p>
              </table:table-cell>
              <table:table-cell office:value-type="float" office:value="1">
                <text:p>1</text:p>
              </table:table-cell>
              <table:table-cell office:value-type="float" office:value="0.33455">
                <text:p>0.33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